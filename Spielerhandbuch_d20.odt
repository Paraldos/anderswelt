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8" style:family="table">
      <style:table-properties style:width="505.3pt" table:align="margins" style:writing-mode="lr-tb"/>
    </style:style>
    <style:style style:name="Table8.A" style:family="table-column">
      <style:table-column-properties style:column-width="62.5pt" style:rel-column-width="8105*"/>
    </style:style>
    <style:style style:name="Table8.B" style:family="table-column">
      <style:table-column-properties style:column-width="442.8pt" style:rel-column-width="57430*"/>
    </style:style>
    <style:style style:name="Table8.A1" style:family="table-cell">
      <style:table-cell-properties fo:background-color="#10141f" fo:padding="2.75pt" fo:border-left="0.5pt solid #000000" fo:border-right="none" fo:border-top="0.5pt solid #000000" fo:border-bottom="0.5pt solid #000000">
        <style:background-image/>
      </style:table-cell-properties>
    </style:style>
    <style:style style:name="Table8.B1" style:family="table-cell">
      <style:table-cell-properties fo:background-color="#10141f" fo:padding="2.75pt" fo:border="0.5pt solid #000000">
        <style:background-image/>
      </style:table-cell-properties>
    </style:style>
    <style:style style:name="Table8.A2" style:family="table-cell">
      <style:table-cell-properties fo:padding="2.75pt" fo:border-left="0.5pt solid #000000" fo:border-right="none" fo:border-top="none" fo:border-bottom="0.5pt solid #000000"/>
    </style:style>
    <style:style style:name="Table8.B2" style:family="table-cell">
      <style:table-cell-properties fo:padding="2.75pt" fo:border-left="0.5pt solid #000000" fo:border-right="0.5pt solid #000000" fo:border-top="none" fo:border-bottom="0.5pt solid #000000"/>
    </style:style>
    <style:style style:name="Table8.A3" style:family="table-cell">
      <style:table-cell-properties fo:padding="2.75pt" fo:border-left="0.5pt solid #000000" fo:border-right="none" fo:border-top="none" fo:border-bottom="0.5pt solid #000000"/>
    </style:style>
    <style:style style:name="Table8.B3" style:family="table-cell">
      <style:table-cell-properties fo:padding="2.75pt" fo:border-left="0.5pt solid #000000" fo:border-right="0.5pt solid #000000" fo:border-top="none" fo:border-bottom="0.5pt solid #000000"/>
    </style:style>
    <style:style style:name="Table8.A4" style:family="table-cell">
      <style:table-cell-properties fo:padding="2.75pt" fo:border-left="0.5pt solid #000000" fo:border-right="none" fo:border-top="none" fo:border-bottom="0.5pt solid #000000"/>
    </style:style>
    <style:style style:name="Table8.B4" style:family="table-cell">
      <style:table-cell-properties fo:padding="2.75pt" fo:border-left="0.5pt solid #000000" fo:border-right="0.5pt solid #000000" fo:border-top="none" fo:border-bottom="0.5pt solid #000000"/>
    </style:style>
    <style:style style:name="Table4" style:family="table">
      <style:table-properties style:width="240.15pt" table:align="margins" style:writing-mode="lr-tb"/>
    </style:style>
    <style:style style:name="Table4.A" style:family="table-column">
      <style:table-column-properties style:column-width="80.05pt" style:rel-column-width="21845*"/>
    </style:style>
    <style:style style:name="Table4.A1" style:family="table-cell">
      <style:table-cell-properties style:vertical-align="" fo:background-color="#000000" fo:padding="2.75pt" fo:border-left="none" fo:border-right="none" fo:border-top="0.5pt solid #000000" fo:border-bottom="0.5pt solid #000000">
        <style:background-image/>
      </style:table-cell-properties>
    </style:style>
    <style:style style:name="Table4.A2" style:family="table-cell">
      <style:table-cell-properties style:vertical-align="" fo:padding="2.75pt" fo:border-left="none" fo:border-right="none" fo:border-top="none" fo:border-bottom="0.5pt solid #000000"/>
    </style:style>
    <style:style style:name="Table4.B2" style:family="table-cell">
      <style:table-cell-properties style:vertical-align="" fo:padding="2.75pt" fo:border-left="none" fo:border-right="none" fo:border-top="none" fo:border-bottom="0.5pt solid #000000"/>
    </style:style>
    <style:style style:name="Table4.C2" style:family="table-cell">
      <style:table-cell-properties style:vertical-align="" fo:padding="2.75pt" fo:border-left="none" fo:border-right="none" fo:border-top="none" fo:border-bottom="0.5pt solid #000000"/>
    </style:style>
    <style:style style:name="Table4.A3" style:family="table-cell">
      <style:table-cell-properties style:vertical-align="" fo:padding="2.75pt" fo:border-left="none" fo:border-right="none" fo:border-top="none" fo:border-bottom="0.5pt solid #000000"/>
    </style:style>
    <style:style style:name="Table4.B3" style:family="table-cell">
      <style:table-cell-properties style:vertical-align="" fo:padding="2.75pt" fo:border-left="none" fo:border-right="none" fo:border-top="none" fo:border-bottom="0.5pt solid #000000"/>
    </style:style>
    <style:style style:name="Table4.C3" style:family="table-cell">
      <style:table-cell-properties style:vertical-align="" fo:padding="2.75pt" fo:border-left="none" fo:border-right="none" fo:border-top="none" fo:border-bottom="0.5pt solid #000000"/>
    </style:style>
    <style:style style:name="Table4.A4" style:family="table-cell">
      <style:table-cell-properties style:vertical-align="" fo:padding="2.75pt" fo:border-left="none" fo:border-right="none" fo:border-top="none" fo:border-bottom="0.5pt solid #000000"/>
    </style:style>
    <style:style style:name="Table4.B4" style:family="table-cell">
      <style:table-cell-properties style:vertical-align="" fo:padding="2.75pt" fo:border-left="none" fo:border-right="none" fo:border-top="none" fo:border-bottom="0.5pt solid #000000"/>
    </style:style>
    <style:style style:name="Table4.C4" style:family="table-cell">
      <style:table-cell-properties style:vertical-align="" fo:padding="2.75pt" fo:border-left="none" fo:border-right="none" fo:border-top="none" fo:border-bottom="0.5pt solid #000000"/>
    </style:style>
    <style:style style:name="Table7" style:family="table">
      <style:table-properties style:width="505.3pt" table:align="margins" style:writing-mode="lr-tb"/>
    </style:style>
    <style:style style:name="Table7.A" style:family="table-column">
      <style:table-column-properties style:column-width="98.8pt" style:rel-column-width="12813*"/>
    </style:style>
    <style:style style:name="Table7.B" style:family="table-column">
      <style:table-column-properties style:column-width="35.6pt" style:rel-column-width="4617*"/>
    </style:style>
    <style:style style:name="Table7.C" style:family="table-column">
      <style:table-column-properties style:column-width="36.25pt" style:rel-column-width="4701*"/>
    </style:style>
    <style:style style:name="Table7.D" style:family="table-column">
      <style:table-column-properties style:column-width="334.65pt" style:rel-column-width="43404*"/>
    </style:style>
    <style:style style:name="Table7.A1" style:family="table-cell">
      <style:table-cell-properties fo:background-color="#000000" fo:padding="2.75pt" fo:border-left="none" fo:border-right="none" fo:border-top="0.5pt solid #000000" fo:border-bottom="0.5pt solid #000000">
        <style:background-image/>
      </style:table-cell-properties>
    </style:style>
    <style:style style:name="Table7.A2" style:family="table-cell">
      <style:table-cell-properties fo:padding="2.75pt" fo:border-left="none" fo:border-right="none" fo:border-top="none" fo:border-bottom="0.5pt solid #000000"/>
    </style:style>
    <style:style style:name="Table7.B2" style:family="table-cell">
      <style:table-cell-properties fo:padding="2.75pt" fo:border-left="none" fo:border-right="none" fo:border-top="none" fo:border-bottom="0.5pt solid #000000"/>
    </style:style>
    <style:style style:name="Table7.C2" style:family="table-cell">
      <style:table-cell-properties fo:padding="2.75pt" fo:border-left="none" fo:border-right="none" fo:border-top="none" fo:border-bottom="0.5pt solid #000000"/>
    </style:style>
    <style:style style:name="Table7.D2" style:family="table-cell">
      <style:table-cell-properties fo:padding="2.75pt" fo:border-left="none" fo:border-right="none" fo:border-top="none" fo:border-bottom="0.5pt solid #000000"/>
    </style:style>
    <style:style style:name="Table7.A3" style:family="table-cell">
      <style:table-cell-properties fo:padding="2.75pt" fo:border-left="none" fo:border-right="none" fo:border-top="none" fo:border-bottom="0.5pt solid #000000"/>
    </style:style>
    <style:style style:name="Table7.B3" style:family="table-cell">
      <style:table-cell-properties fo:padding="2.75pt" fo:border-left="none" fo:border-right="none" fo:border-top="none" fo:border-bottom="0.5pt solid #000000"/>
    </style:style>
    <style:style style:name="Table7.C3" style:family="table-cell">
      <style:table-cell-properties fo:padding="2.75pt" fo:border-left="none" fo:border-right="none" fo:border-top="none" fo:border-bottom="0.5pt solid #000000"/>
    </style:style>
    <style:style style:name="Table7.D3" style:family="table-cell">
      <style:table-cell-properties fo:padding="2.75pt" fo:border-left="none" fo:border-right="none" fo:border-top="none" fo:border-bottom="0.5pt solid #000000"/>
    </style:style>
    <style:style style:name="Table7.A4" style:family="table-cell">
      <style:table-cell-properties fo:padding="2.75pt" fo:border-left="none" fo:border-right="none" fo:border-top="none" fo:border-bottom="0.5pt solid #000000"/>
    </style:style>
    <style:style style:name="Table7.B4" style:family="table-cell">
      <style:table-cell-properties fo:padding="2.75pt" fo:border-left="none" fo:border-right="none" fo:border-top="none" fo:border-bottom="0.5pt solid #000000"/>
    </style:style>
    <style:style style:name="Table7.C4" style:family="table-cell">
      <style:table-cell-properties fo:padding="2.75pt" fo:border-left="none" fo:border-right="none" fo:border-top="none" fo:border-bottom="0.5pt solid #000000"/>
    </style:style>
    <style:style style:name="Table7.D4" style:family="table-cell">
      <style:table-cell-properties fo:padding="2.75pt" fo:border-left="none" fo:border-right="none" fo:border-top="none" fo:border-bottom="0.5pt solid #000000"/>
    </style:style>
    <style:style style:name="Table6" style:family="table">
      <style:table-properties style:width="505.3pt" table:align="margins" style:writing-mode="lr-tb"/>
    </style:style>
    <style:style style:name="Table6.A" style:family="table-column">
      <style:table-column-properties style:column-width="98.75pt" style:rel-column-width="12807*"/>
    </style:style>
    <style:style style:name="Table6.B" style:family="table-column">
      <style:table-column-properties style:column-width="35.65pt" style:rel-column-width="4623*"/>
    </style:style>
    <style:style style:name="Table6.C" style:family="table-column">
      <style:table-column-properties style:column-width="36.25pt" style:rel-column-width="4701*"/>
    </style:style>
    <style:style style:name="Table6.D" style:family="table-column">
      <style:table-column-properties style:column-width="334.65pt" style:rel-column-width="43404*"/>
    </style:style>
    <style:style style:name="Table6.A1" style:family="table-cell">
      <style:table-cell-properties fo:background-color="#000000" fo:padding="2.75pt" fo:border-left="none" fo:border-right="none" fo:border-top="0.5pt solid #000000" fo:border-bottom="0.5pt solid #000000">
        <style:background-image/>
      </style:table-cell-properties>
    </style:style>
    <style:style style:name="Table6.A2" style:family="table-cell">
      <style:table-cell-properties fo:padding="2.75pt" fo:border-left="none" fo:border-right="none" fo:border-top="none" fo:border-bottom="0.5pt solid #000000"/>
    </style:style>
    <style:style style:name="Table6.B2" style:family="table-cell">
      <style:table-cell-properties fo:padding="2.75pt" fo:border-left="none" fo:border-right="none" fo:border-top="none" fo:border-bottom="0.5pt solid #000000"/>
    </style:style>
    <style:style style:name="Table6.C2" style:family="table-cell">
      <style:table-cell-properties fo:padding="2.75pt" fo:border-left="none" fo:border-right="none" fo:border-top="none" fo:border-bottom="0.5pt solid #000000"/>
    </style:style>
    <style:style style:name="Table6.D2" style:family="table-cell">
      <style:table-cell-properties fo:padding="2.75pt" fo:border-left="none" fo:border-right="none" fo:border-top="none" fo:border-bottom="0.5pt solid #000000"/>
    </style:style>
    <style:style style:name="Table6.A3" style:family="table-cell">
      <style:table-cell-properties fo:padding="2.75pt" fo:border-left="none" fo:border-right="none" fo:border-top="none" fo:border-bottom="0.5pt solid #000000"/>
    </style:style>
    <style:style style:name="Table6.B3" style:family="table-cell">
      <style:table-cell-properties fo:padding="2.75pt" fo:border-left="none" fo:border-right="none" fo:border-top="none" fo:border-bottom="0.5pt solid #000000"/>
    </style:style>
    <style:style style:name="Table6.C3" style:family="table-cell">
      <style:table-cell-properties fo:padding="2.75pt" fo:border-left="none" fo:border-right="none" fo:border-top="none" fo:border-bottom="0.5pt solid #000000"/>
    </style:style>
    <style:style style:name="Table6.D3" style:family="table-cell">
      <style:table-cell-properties fo:padding="2.75pt" fo:border-left="none" fo:border-right="none" fo:border-top="none" fo:border-bottom="0.5pt solid #000000"/>
    </style:style>
    <style:style style:name="Table6.A4" style:family="table-cell">
      <style:table-cell-properties fo:padding="2.75pt" fo:border-left="none" fo:border-right="none" fo:border-top="none" fo:border-bottom="0.5pt solid #000000"/>
    </style:style>
    <style:style style:name="Table6.B4" style:family="table-cell">
      <style:table-cell-properties fo:padding="2.75pt" fo:border-left="none" fo:border-right="none" fo:border-top="none" fo:border-bottom="0.5pt solid #000000"/>
    </style:style>
    <style:style style:name="Table6.C4" style:family="table-cell">
      <style:table-cell-properties fo:padding="2.75pt" fo:border-left="none" fo:border-right="none" fo:border-top="none" fo:border-bottom="0.5pt solid #000000"/>
    </style:style>
    <style:style style:name="Table6.D4" style:family="table-cell">
      <style:table-cell-properties fo:padding="2.75pt" fo:border-left="none" fo:border-right="none" fo:border-top="none" fo:border-bottom="0.5pt solid #000000"/>
    </style:style>
    <style:style style:name="Table6.A5" style:family="table-cell">
      <style:table-cell-properties fo:padding="2.75pt" fo:border-left="none" fo:border-right="none" fo:border-top="none" fo:border-bottom="0.5pt solid #000000"/>
    </style:style>
    <style:style style:name="Table6.B5" style:family="table-cell">
      <style:table-cell-properties fo:padding="2.75pt" fo:border-left="none" fo:border-right="none" fo:border-top="none" fo:border-bottom="0.5pt solid #000000"/>
    </style:style>
    <style:style style:name="Table6.C5" style:family="table-cell">
      <style:table-cell-properties fo:padding="2.75pt" fo:border-left="none" fo:border-right="none" fo:border-top="none" fo:border-bottom="0.5pt solid #000000"/>
    </style:style>
    <style:style style:name="Table6.D5" style:family="table-cell">
      <style:table-cell-properties fo:padding="2.75pt" fo:border-left="none" fo:border-right="none" fo:border-top="none" fo:border-bottom="0.5pt solid #000000"/>
    </style:style>
    <style:style style:name="Table6.A6" style:family="table-cell">
      <style:table-cell-properties fo:padding="2.75pt" fo:border-left="none" fo:border-right="none" fo:border-top="none" fo:border-bottom="0.5pt solid #000000"/>
    </style:style>
    <style:style style:name="Table6.B6" style:family="table-cell">
      <style:table-cell-properties fo:padding="2.75pt" fo:border-left="none" fo:border-right="none" fo:border-top="none" fo:border-bottom="0.5pt solid #000000"/>
    </style:style>
    <style:style style:name="Table6.C6" style:family="table-cell">
      <style:table-cell-properties fo:padding="2.75pt" fo:border-left="none" fo:border-right="none" fo:border-top="none" fo:border-bottom="0.5pt solid #000000"/>
    </style:style>
    <style:style style:name="Table6.D6" style:family="table-cell">
      <style:table-cell-properties fo:padding="2.75pt" fo:border-left="none" fo:border-right="none" fo:border-top="none" fo:border-bottom="0.5pt solid #000000"/>
    </style:style>
    <style:style style:name="Table6.A7" style:family="table-cell">
      <style:table-cell-properties fo:padding="2.75pt" fo:border-left="none" fo:border-right="none" fo:border-top="none" fo:border-bottom="0.5pt solid #000000"/>
    </style:style>
    <style:style style:name="Table6.B7" style:family="table-cell">
      <style:table-cell-properties fo:padding="2.75pt" fo:border-left="none" fo:border-right="none" fo:border-top="none" fo:border-bottom="0.5pt solid #000000"/>
    </style:style>
    <style:style style:name="Table6.C7" style:family="table-cell">
      <style:table-cell-properties fo:padding="2.75pt" fo:border-left="none" fo:border-right="none" fo:border-top="none" fo:border-bottom="0.5pt solid #000000"/>
    </style:style>
    <style:style style:name="Table6.D7" style:family="table-cell">
      <style:table-cell-properties fo:padding="2.75pt" fo:border-left="none" fo:border-right="none" fo:border-top="none" fo:border-bottom="0.5pt solid #000000"/>
    </style:style>
    <style:style style:name="Table6.A8" style:family="table-cell">
      <style:table-cell-properties fo:padding="2.75pt" fo:border-left="none" fo:border-right="none" fo:border-top="none" fo:border-bottom="0.5pt solid #000000"/>
    </style:style>
    <style:style style:name="Table6.B8" style:family="table-cell">
      <style:table-cell-properties fo:padding="2.75pt" fo:border-left="none" fo:border-right="none" fo:border-top="none" fo:border-bottom="0.5pt solid #000000"/>
    </style:style>
    <style:style style:name="Table6.C8" style:family="table-cell">
      <style:table-cell-properties fo:padding="2.75pt" fo:border-left="none" fo:border-right="none" fo:border-top="none" fo:border-bottom="0.5pt solid #000000"/>
    </style:style>
    <style:style style:name="Table6.D8" style:family="table-cell">
      <style:table-cell-properties fo:padding="2.75pt" fo:border-left="none" fo:border-right="none" fo:border-top="none" fo:border-bottom="0.5pt solid #000000"/>
    </style:style>
    <style:style style:name="Table6.A9" style:family="table-cell">
      <style:table-cell-properties fo:padding="2.75pt" fo:border-left="none" fo:border-right="none" fo:border-top="none" fo:border-bottom="0.5pt solid #000000"/>
    </style:style>
    <style:style style:name="Table6.B9" style:family="table-cell">
      <style:table-cell-properties fo:padding="2.75pt" fo:border-left="none" fo:border-right="none" fo:border-top="none" fo:border-bottom="0.5pt solid #000000"/>
    </style:style>
    <style:style style:name="Table6.C9" style:family="table-cell">
      <style:table-cell-properties fo:padding="2.75pt" fo:border-left="none" fo:border-right="none" fo:border-top="none" fo:border-bottom="0.5pt solid #000000"/>
    </style:style>
    <style:style style:name="Table6.D9" style:family="table-cell">
      <style:table-cell-properties fo:padding="2.75pt" fo:border-left="none" fo:border-right="none" fo:border-top="none" fo:border-bottom="0.5pt solid #000000"/>
    </style:style>
    <style:style style:name="Table9" style:family="table">
      <style:table-properties style:width="505.3pt" table:align="margins" style:writing-mode="lr-tb"/>
    </style:style>
    <style:style style:name="Table9.A" style:family="table-column">
      <style:table-column-properties style:column-width="98.75pt" style:rel-column-width="12807*"/>
    </style:style>
    <style:style style:name="Table9.B" style:family="table-column">
      <style:table-column-properties style:column-width="35.65pt" style:rel-column-width="4623*"/>
    </style:style>
    <style:style style:name="Table9.C" style:family="table-column">
      <style:table-column-properties style:column-width="36.25pt" style:rel-column-width="4701*"/>
    </style:style>
    <style:style style:name="Table9.D" style:family="table-column">
      <style:table-column-properties style:column-width="334.65pt" style:rel-column-width="43404*"/>
    </style:style>
    <style:style style:name="Table9.A1" style:family="table-cell">
      <style:table-cell-properties fo:background-color="#000000" fo:padding="2.75pt" fo:border-left="none" fo:border-right="none" fo:border-top="0.5pt solid #000000" fo:border-bottom="0.5pt solid #000000">
        <style:background-image/>
      </style:table-cell-properties>
    </style:style>
    <style:style style:name="Table9.A2" style:family="table-cell">
      <style:table-cell-properties fo:padding="2.75pt" fo:border-left="none" fo:border-right="none" fo:border-top="none" fo:border-bottom="0.5pt solid #000000"/>
    </style:style>
    <style:style style:name="Table9.B2" style:family="table-cell">
      <style:table-cell-properties fo:padding="2.75pt" fo:border-left="none" fo:border-right="none" fo:border-top="none" fo:border-bottom="0.5pt solid #000000"/>
    </style:style>
    <style:style style:name="Table9.C2" style:family="table-cell">
      <style:table-cell-properties fo:padding="2.75pt" fo:border-left="none" fo:border-right="none" fo:border-top="none" fo:border-bottom="0.5pt solid #000000"/>
    </style:style>
    <style:style style:name="Table9.D2" style:family="table-cell">
      <style:table-cell-properties fo:padding="2.75pt" fo:border-left="none" fo:border-right="none" fo:border-top="none" fo:border-bottom="0.5pt solid #000000"/>
    </style:style>
    <style:style style:name="Table9.A3" style:family="table-cell">
      <style:table-cell-properties fo:padding="2.75pt" fo:border-left="none" fo:border-right="none" fo:border-top="none" fo:border-bottom="0.5pt solid #000000"/>
    </style:style>
    <style:style style:name="Table9.B3" style:family="table-cell">
      <style:table-cell-properties fo:padding="2.75pt" fo:border-left="none" fo:border-right="none" fo:border-top="none" fo:border-bottom="0.5pt solid #000000"/>
    </style:style>
    <style:style style:name="Table9.C3" style:family="table-cell">
      <style:table-cell-properties fo:padding="2.75pt" fo:border-left="none" fo:border-right="none" fo:border-top="none" fo:border-bottom="0.5pt solid #000000"/>
    </style:style>
    <style:style style:name="Table9.D3" style:family="table-cell">
      <style:table-cell-properties fo:padding="2.75pt" fo:border-left="none" fo:border-right="none" fo:border-top="none" fo:border-bottom="0.5pt solid #000000"/>
    </style:style>
    <style:style style:name="Table9.A4" style:family="table-cell">
      <style:table-cell-properties fo:padding="2.75pt" fo:border-left="none" fo:border-right="none" fo:border-top="none" fo:border-bottom="0.5pt solid #000000"/>
    </style:style>
    <style:style style:name="Table9.B4" style:family="table-cell">
      <style:table-cell-properties fo:padding="2.75pt" fo:border-left="none" fo:border-right="none" fo:border-top="none" fo:border-bottom="0.5pt solid #000000"/>
    </style:style>
    <style:style style:name="Table9.C4" style:family="table-cell">
      <style:table-cell-properties fo:padding="2.75pt" fo:border-left="none" fo:border-right="none" fo:border-top="none" fo:border-bottom="0.5pt solid #000000"/>
    </style:style>
    <style:style style:name="Table9.D4" style:family="table-cell">
      <style:table-cell-properties fo:padding="2.75pt" fo:border-left="none" fo:border-right="none" fo:border-top="none" fo:border-bottom="0.5pt solid #000000"/>
    </style:style>
    <style:style style:name="Table9.A5" style:family="table-cell">
      <style:table-cell-properties fo:padding="2.75pt" fo:border-left="none" fo:border-right="none" fo:border-top="none" fo:border-bottom="0.5pt solid #000000"/>
    </style:style>
    <style:style style:name="Table9.B5" style:family="table-cell">
      <style:table-cell-properties fo:padding="2.75pt" fo:border-left="none" fo:border-right="none" fo:border-top="none" fo:border-bottom="0.5pt solid #000000"/>
    </style:style>
    <style:style style:name="Table9.C5" style:family="table-cell">
      <style:table-cell-properties fo:padding="2.75pt" fo:border-left="none" fo:border-right="none" fo:border-top="none" fo:border-bottom="0.5pt solid #000000"/>
    </style:style>
    <style:style style:name="Table9.D5" style:family="table-cell">
      <style:table-cell-properties fo:padding="2.75pt" fo:border-left="none" fo:border-right="none" fo:border-top="none" fo:border-bottom="0.5pt solid #000000"/>
    </style:style>
    <style:style style:name="Table9.A6" style:family="table-cell">
      <style:table-cell-properties fo:padding="2.75pt" fo:border-left="none" fo:border-right="none" fo:border-top="none" fo:border-bottom="0.5pt solid #000000"/>
    </style:style>
    <style:style style:name="Table9.B6" style:family="table-cell">
      <style:table-cell-properties fo:padding="2.75pt" fo:border-left="none" fo:border-right="none" fo:border-top="none" fo:border-bottom="0.5pt solid #000000"/>
    </style:style>
    <style:style style:name="Table9.C6" style:family="table-cell">
      <style:table-cell-properties fo:padding="2.75pt" fo:border-left="none" fo:border-right="none" fo:border-top="none" fo:border-bottom="0.5pt solid #000000"/>
    </style:style>
    <style:style style:name="Table9.D6" style:family="table-cell">
      <style:table-cell-properties fo:padding="2.75pt" fo:border-left="none" fo:border-right="none" fo:border-top="none" fo:border-bottom="0.5pt solid #000000"/>
    </style:style>
    <style:style style:name="Table9.A7" style:family="table-cell">
      <style:table-cell-properties fo:padding="2.75pt" fo:border-left="none" fo:border-right="none" fo:border-top="none" fo:border-bottom="0.5pt solid #000000"/>
    </style:style>
    <style:style style:name="Table9.B7" style:family="table-cell">
      <style:table-cell-properties fo:padding="2.75pt" fo:border-left="none" fo:border-right="none" fo:border-top="none" fo:border-bottom="0.5pt solid #000000"/>
    </style:style>
    <style:style style:name="Table9.C7" style:family="table-cell">
      <style:table-cell-properties fo:padding="2.75pt" fo:border-left="none" fo:border-right="none" fo:border-top="none" fo:border-bottom="0.5pt solid #000000"/>
    </style:style>
    <style:style style:name="Table9.D7" style:family="table-cell">
      <style:table-cell-properties fo:padding="2.75pt" fo:border-left="none" fo:border-right="none" fo:border-top="none" fo:border-bottom="0.5pt solid #000000"/>
    </style:style>
    <style:style style:name="Table9.A8" style:family="table-cell">
      <style:table-cell-properties fo:padding="2.75pt" fo:border-left="none" fo:border-right="none" fo:border-top="none" fo:border-bottom="0.5pt solid #000000"/>
    </style:style>
    <style:style style:name="Table9.B8" style:family="table-cell">
      <style:table-cell-properties fo:padding="2.75pt" fo:border-left="none" fo:border-right="none" fo:border-top="none" fo:border-bottom="0.5pt solid #000000"/>
    </style:style>
    <style:style style:name="Table9.C8" style:family="table-cell">
      <style:table-cell-properties fo:padding="2.75pt" fo:border-left="none" fo:border-right="none" fo:border-top="none" fo:border-bottom="0.5pt solid #000000"/>
    </style:style>
    <style:style style:name="Table9.D8" style:family="table-cell">
      <style:table-cell-properties fo:padding="2.75pt" fo:border-left="none" fo:border-right="none" fo:border-top="none" fo:border-bottom="0.5pt solid #000000"/>
    </style:style>
    <style:style style:name="Table9.A9" style:family="table-cell">
      <style:table-cell-properties fo:padding="2.75pt" fo:border-left="none" fo:border-right="none" fo:border-top="none" fo:border-bottom="0.5pt solid #000000"/>
    </style:style>
    <style:style style:name="Table9.B9" style:family="table-cell">
      <style:table-cell-properties fo:padding="2.75pt" fo:border-left="none" fo:border-right="none" fo:border-top="none" fo:border-bottom="0.5pt solid #000000"/>
    </style:style>
    <style:style style:name="Table9.C9" style:family="table-cell">
      <style:table-cell-properties fo:padding="2.75pt" fo:border-left="none" fo:border-right="none" fo:border-top="none" fo:border-bottom="0.5pt solid #000000"/>
    </style:style>
    <style:style style:name="Table9.D9" style:family="table-cell">
      <style:table-cell-properties fo:padding="2.75pt" fo:border-left="none" fo:border-right="none" fo:border-top="none" fo:border-bottom="0.5pt solid #000000"/>
    </style:style>
    <style:style style:name="Table1" style:family="table">
      <style:table-properties style:width="505.3pt" table:align="margins" style:writing-mode="lr-tb"/>
    </style:style>
    <style:style style:name="Table1.A" style:family="table-column">
      <style:table-column-properties style:column-width="98.75pt" style:rel-column-width="12807*"/>
    </style:style>
    <style:style style:name="Table1.B" style:family="table-column">
      <style:table-column-properties style:column-width="35.65pt" style:rel-column-width="4623*"/>
    </style:style>
    <style:style style:name="Table1.C" style:family="table-column">
      <style:table-column-properties style:column-width="36.25pt" style:rel-column-width="4701*"/>
    </style:style>
    <style:style style:name="Table1.D" style:family="table-column">
      <style:table-column-properties style:column-width="334.65pt" style:rel-column-width="43404*"/>
    </style:style>
    <style:style style:name="Table1.A1" style:family="table-cell">
      <style:table-cell-properties fo:background-color="#000000" fo:padding="2.75pt" fo:border-left="none" fo:border-right="none" fo:border-top="0.5pt solid #000000" fo:border-bottom="0.5pt solid #000000">
        <style:background-image/>
      </style:table-cell-properties>
    </style:style>
    <style:style style:name="Table1.A2" style:family="table-cell">
      <style:table-cell-properties fo:padding="2.75pt" fo:border-left="none" fo:border-right="none" fo:border-top="none" fo:border-bottom="0.5pt solid #000000"/>
    </style:style>
    <style:style style:name="Table1.B2" style:family="table-cell">
      <style:table-cell-properties fo:padding="2.75pt" fo:border-left="none" fo:border-right="none" fo:border-top="none" fo:border-bottom="0.5pt solid #000000"/>
    </style:style>
    <style:style style:name="Table1.C2" style:family="table-cell">
      <style:table-cell-properties fo:padding="2.75pt" fo:border-left="none" fo:border-right="none" fo:border-top="none" fo:border-bottom="0.5pt solid #000000"/>
    </style:style>
    <style:style style:name="Table1.D2" style:family="table-cell">
      <style:table-cell-properties fo:padding="2.75pt" fo:border-left="none" fo:border-right="none" fo:border-top="none" fo:border-bottom="0.5pt solid #000000"/>
    </style:style>
    <style:style style:name="Table1.A3" style:family="table-cell">
      <style:table-cell-properties fo:padding="2.75pt" fo:border-left="none" fo:border-right="none" fo:border-top="none" fo:border-bottom="0.5pt solid #000000"/>
    </style:style>
    <style:style style:name="Table1.B3" style:family="table-cell">
      <style:table-cell-properties fo:padding="2.75pt" fo:border-left="none" fo:border-right="none" fo:border-top="none" fo:border-bottom="0.5pt solid #000000"/>
    </style:style>
    <style:style style:name="Table1.C3" style:family="table-cell">
      <style:table-cell-properties fo:padding="2.75pt" fo:border-left="none" fo:border-right="none" fo:border-top="none" fo:border-bottom="0.5pt solid #000000"/>
    </style:style>
    <style:style style:name="Table1.D3" style:family="table-cell">
      <style:table-cell-properties fo:padding="2.75pt" fo:border-left="none" fo:border-right="none" fo:border-top="none" fo:border-bottom="0.5pt solid #000000"/>
    </style:style>
    <style:style style:name="Table1.A4" style:family="table-cell">
      <style:table-cell-properties fo:padding="2.75pt" fo:border-left="none" fo:border-right="none" fo:border-top="none" fo:border-bottom="0.5pt solid #000000"/>
    </style:style>
    <style:style style:name="Table1.B4" style:family="table-cell">
      <style:table-cell-properties fo:padding="2.75pt" fo:border-left="none" fo:border-right="none" fo:border-top="none" fo:border-bottom="0.5pt solid #000000"/>
    </style:style>
    <style:style style:name="Table1.C4" style:family="table-cell">
      <style:table-cell-properties fo:padding="2.75pt" fo:border-left="none" fo:border-right="none" fo:border-top="none" fo:border-bottom="0.5pt solid #000000"/>
    </style:style>
    <style:style style:name="Table1.D4" style:family="table-cell">
      <style:table-cell-properties fo:padding="2.75pt" fo:border-left="none" fo:border-right="none" fo:border-top="none" fo:border-bottom="0.5pt solid #000000"/>
    </style:style>
    <style:style style:name="Table3" style:family="table">
      <style:table-properties style:width="505.3pt" table:align="margins" style:writing-mode="lr-tb"/>
    </style:style>
    <style:style style:name="Table3.A" style:family="table-column">
      <style:table-column-properties style:column-width="109.05pt" style:rel-column-width="14144*"/>
    </style:style>
    <style:style style:name="Table3.B" style:family="table-column">
      <style:table-column-properties style:column-width="396.25pt" style:rel-column-width="51391*"/>
    </style:style>
    <style:style style:name="Table3.A1" style:family="table-cell">
      <style:table-cell-properties fo:background-color="#000000" fo:padding="2.75pt" fo:border-left="none" fo:border-right="none" fo:border-top="0.5pt solid #000000" fo:border-bottom="0.5pt solid #000000">
        <style:background-image/>
      </style:table-cell-properties>
    </style:style>
    <style:style style:name="Table3.A2" style:family="table-cell">
      <style:table-cell-properties fo:padding="2.75pt" fo:border-left="none" fo:border-right="none" fo:border-top="none" fo:border-bottom="0.5pt solid #000000"/>
    </style:style>
    <style:style style:name="Table3.B2" style:family="table-cell">
      <style:table-cell-properties fo:padding="2.75pt" fo:border-left="none" fo:border-right="none" fo:border-top="none" fo:border-bottom="0.5pt solid #000000"/>
    </style:style>
    <style:style style:name="Table3.A3" style:family="table-cell">
      <style:table-cell-properties fo:padding="2.75pt" fo:border-left="none" fo:border-right="none" fo:border-top="none" fo:border-bottom="0.5pt solid #000000"/>
    </style:style>
    <style:style style:name="Table3.B3" style:family="table-cell">
      <style:table-cell-properties fo:padding="2.75pt" fo:border-left="none" fo:border-right="none" fo:border-top="none" fo:border-bottom="0.5pt solid #000000"/>
    </style:style>
    <style:style style:name="Table3.A4" style:family="table-cell">
      <style:table-cell-properties fo:padding="2.75pt" fo:border-left="none" fo:border-right="none" fo:border-top="none" fo:border-bottom="0.5pt solid #000000"/>
    </style:style>
    <style:style style:name="Table3.B4" style:family="table-cell">
      <style:table-cell-properties fo:padding="2.75pt" fo:border-left="none" fo:border-right="none" fo:border-top="none" fo:border-bottom="0.5pt solid #000000"/>
    </style:style>
    <style:style style:name="Table3.A5" style:family="table-cell">
      <style:table-cell-properties fo:padding="2.75pt" fo:border-left="none" fo:border-right="none" fo:border-top="none" fo:border-bottom="0.5pt solid #000000"/>
    </style:style>
    <style:style style:name="Table3.B5" style:family="table-cell">
      <style:table-cell-properties fo:padding="2.75pt" fo:border-left="none" fo:border-right="none" fo:border-top="none" fo:border-bottom="0.5pt solid #000000"/>
    </style:style>
    <style:style style:name="Table3.A6" style:family="table-cell">
      <style:table-cell-properties fo:padding="2.75pt" fo:border-left="none" fo:border-right="none" fo:border-top="none" fo:border-bottom="0.5pt solid #000000"/>
    </style:style>
    <style:style style:name="Table3.B6" style:family="table-cell">
      <style:table-cell-properties fo:padding="2.75pt" fo:border-left="none" fo:border-right="none" fo:border-top="none" fo:border-bottom="0.5pt solid #000000"/>
    </style:style>
    <style:style style:name="Table3.A7" style:family="table-cell">
      <style:table-cell-properties fo:padding="2.75pt" fo:border-left="none" fo:border-right="none" fo:border-top="none" fo:border-bottom="0.5pt solid #000000"/>
    </style:style>
    <style:style style:name="Table3.B7" style:family="table-cell">
      <style:table-cell-properties fo:padding="2.75pt" fo:border-left="none" fo:border-right="none" fo:border-top="none" fo:border-bottom="0.5pt solid #000000"/>
    </style:style>
    <style:style style:name="Table3.A8" style:family="table-cell">
      <style:table-cell-properties fo:padding="2.75pt" fo:border-left="none" fo:border-right="none" fo:border-top="none" fo:border-bottom="0.5pt solid #000000"/>
    </style:style>
    <style:style style:name="Table3.B8" style:family="table-cell">
      <style:table-cell-properties fo:padding="2.75pt" fo:border-left="none" fo:border-right="none" fo:border-top="none" fo:border-bottom="0.5pt solid #000000"/>
    </style:style>
    <style:style style:name="Table3.A9" style:family="table-cell">
      <style:table-cell-properties fo:padding="2.75pt" fo:border-left="none" fo:border-right="none" fo:border-top="none" fo:border-bottom="0.5pt solid #000000"/>
    </style:style>
    <style:style style:name="Table3.B9" style:family="table-cell">
      <style:table-cell-properties fo:padding="2.75pt" fo:border-left="none" fo:border-right="none" fo:border-top="none" fo:border-bottom="0.5pt solid #000000"/>
    </style:style>
    <style:style style:name="Table3.A10" style:family="table-cell">
      <style:table-cell-properties fo:padding="2.75pt" fo:border-left="none" fo:border-right="none" fo:border-top="none" fo:border-bottom="0.5pt solid #000000"/>
    </style:style>
    <style:style style:name="Table3.B10" style:family="table-cell">
      <style:table-cell-properties fo:padding="2.75pt" fo:border-left="none" fo:border-right="none" fo:border-top="none" fo:border-bottom="0.5pt solid #000000"/>
    </style:style>
    <style:style style:name="Table5" style:family="table">
      <style:table-properties style:width="240.15pt" table:align="margins" style:writing-mode="lr-tb"/>
    </style:style>
    <style:style style:name="Table5.A" style:family="table-column">
      <style:table-column-properties style:column-width="48.75pt" style:rel-column-width="13303*"/>
    </style:style>
    <style:style style:name="Table5.B" style:family="table-column">
      <style:table-column-properties style:column-width="191.4pt" style:rel-column-width="52232*"/>
    </style:style>
    <style:style style:name="Table5.A1" style:family="table-cell">
      <style:table-cell-properties fo:background-color="#000000" fo:padding="2.75pt" fo:border-left="none" fo:border-right="none" fo:border-top="0.5pt solid #000000" fo:border-bottom="0.5pt solid #000000">
        <style:background-image/>
      </style:table-cell-properties>
    </style:style>
    <style:style style:name="Table5.A2" style:family="table-cell">
      <style:table-cell-properties fo:padding="2.75pt" fo:border-left="none" fo:border-right="none" fo:border-top="none" fo:border-bottom="0.5pt solid #000000"/>
    </style:style>
    <style:style style:name="Table5.B2" style:family="table-cell">
      <style:table-cell-properties fo:padding="2.75pt" fo:border-left="none" fo:border-right="none" fo:border-top="none" fo:border-bottom="0.5pt solid #000000"/>
    </style:style>
    <style:style style:name="Table5.A3" style:family="table-cell">
      <style:table-cell-properties fo:padding="2.75pt" fo:border-left="none" fo:border-right="none" fo:border-top="none" fo:border-bottom="0.5pt solid #000000"/>
    </style:style>
    <style:style style:name="Table5.B3" style:family="table-cell">
      <style:table-cell-properties fo:padding="2.75pt" fo:border-left="none" fo:border-right="none" fo:border-top="none" fo:border-bottom="0.5pt solid #000000"/>
    </style:style>
    <style:style style:name="Table5.A4" style:family="table-cell">
      <style:table-cell-properties fo:padding="2.75pt" fo:border-left="none" fo:border-right="none" fo:border-top="none" fo:border-bottom="0.5pt solid #000000"/>
    </style:style>
    <style:style style:name="Table5.B4" style:family="table-cell">
      <style:table-cell-properties fo:padding="2.75pt" fo:border-left="none" fo:border-right="none" fo:border-top="none" fo:border-bottom="0.5pt solid #000000"/>
    </style:style>
    <style:style style:name="Table5.A5" style:family="table-cell">
      <style:table-cell-properties fo:padding="2.75pt" fo:border-left="none" fo:border-right="none" fo:border-top="none" fo:border-bottom="0.5pt solid #000000"/>
    </style:style>
    <style:style style:name="Table5.B5" style:family="table-cell">
      <style:table-cell-properties fo:padding="2.75pt" fo:border-left="none" fo:border-right="none" fo:border-top="none" fo:border-bottom="0.5pt solid #000000"/>
    </style:style>
    <style:style style:name="Table5.A6" style:family="table-cell">
      <style:table-cell-properties fo:padding="2.75pt" fo:border-left="none" fo:border-right="none" fo:border-top="none" fo:border-bottom="0.5pt solid #000000"/>
    </style:style>
    <style:style style:name="Table5.B6" style:family="table-cell">
      <style:table-cell-properties fo:padding="2.75pt" fo:border-left="none" fo:border-right="none"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Standard">
      <style:text-properties officeooo:paragraph-rsid="0105c84a"/>
    </style:style>
    <style:style style:name="P3" style:family="paragraph" style:parent-style-name="Standard" style:list-style-name="L1">
      <style:text-properties fo:font-weight="normal" officeooo:rsid="0218354f" officeooo:paragraph-rsid="02183ad5" style:font-weight-asian="normal" style:font-weight-complex="normal"/>
    </style:style>
    <style:style style:name="P4" style:family="paragraph" style:parent-style-name="Standard" style:list-style-name="L1">
      <style:text-properties officeooo:paragraph-rsid="01def656"/>
    </style:style>
    <style:style style:name="P5" style:family="paragraph" style:parent-style-name="Standard" style:list-style-name="L1">
      <style:text-properties officeooo:rsid="0105c84a" officeooo:paragraph-rsid="01fc890f"/>
    </style:style>
    <style:style style:name="P6" style:family="paragraph" style:parent-style-name="Standard" style:list-style-name="L1">
      <style:text-properties officeooo:paragraph-rsid="0139dde3"/>
    </style:style>
    <style:style style:name="P7" style:family="paragraph" style:parent-style-name="List_20_Paragraph" style:list-style-name="L2">
      <style:text-properties officeooo:rsid="011b3104" officeooo:paragraph-rsid="0139dde3"/>
    </style:style>
    <style:style style:name="P8" style:family="paragraph" style:parent-style-name="List_20_Paragraph" style:list-style-name="L2">
      <style:text-properties officeooo:rsid="01537011" officeooo:paragraph-rsid="01537011"/>
    </style:style>
    <style:style style:name="P9" style:family="paragraph" style:parent-style-name="Standard" style:list-style-name="L1">
      <style:text-properties officeooo:rsid="00fbd6a4" officeooo:paragraph-rsid="00fbd6a4"/>
    </style:style>
    <style:style style:name="P10" style:family="paragraph" style:parent-style-name="Standard" style:list-style-name="L1">
      <style:text-properties officeooo:paragraph-rsid="01f4d272"/>
    </style:style>
    <style:style style:name="P11" style:family="paragraph" style:parent-style-name="Standard" style:list-style-name="L1">
      <style:text-properties officeooo:paragraph-rsid="006cb291"/>
    </style:style>
    <style:style style:name="P12" style:family="paragraph" style:parent-style-name="Heading_20_1">
      <style:paragraph-properties fo:break-before="page"/>
      <style:text-properties officeooo:paragraph-rsid="003f62b7"/>
    </style:style>
    <style:style style:name="P13" style:family="paragraph" style:parent-style-name="Standard">
      <style:text-properties officeooo:paragraph-rsid="00d323f9"/>
    </style:style>
    <style:style style:name="P14" style:family="paragraph" style:parent-style-name="Heading_20_2">
      <style:text-properties officeooo:rsid="00ca99e7" officeooo:paragraph-rsid="00d323f9"/>
    </style:style>
    <style:style style:name="P15" style:family="paragraph" style:parent-style-name="Standard">
      <style:text-properties officeooo:rsid="00ca99e7" officeooo:paragraph-rsid="00d323f9"/>
    </style:style>
    <style:style style:name="P16" style:family="paragraph" style:parent-style-name="Standard">
      <style:text-properties officeooo:rsid="00c95a39" officeooo:paragraph-rsid="00d323f9"/>
    </style:style>
    <style:style style:name="P17" style:family="paragraph" style:parent-style-name="Heading_20_2">
      <style:text-properties officeooo:paragraph-rsid="0127a33f"/>
    </style:style>
    <style:style style:name="P18" style:family="paragraph" style:parent-style-name="Heading_20_3">
      <style:text-properties officeooo:paragraph-rsid="0127a33f"/>
    </style:style>
    <style:style style:name="P19" style:family="paragraph" style:parent-style-name="Standard">
      <style:text-properties officeooo:rsid="0127a33f" officeooo:paragraph-rsid="0127a33f"/>
    </style:style>
    <style:style style:name="P20" style:family="paragraph" style:parent-style-name="Standard">
      <style:text-properties officeooo:paragraph-rsid="0127a33f"/>
    </style:style>
    <style:style style:name="P21" style:family="paragraph" style:parent-style-name="Standard">
      <style:text-properties officeooo:rsid="0127a33f" officeooo:paragraph-rsid="01297e03"/>
    </style:style>
    <style:style style:name="P22" style:family="paragraph" style:parent-style-name="Standard">
      <style:text-properties officeooo:paragraph-rsid="01297e03"/>
    </style:style>
    <style:style style:name="P23" style:family="paragraph" style:parent-style-name="Heading_20_3">
      <style:text-properties officeooo:rsid="012b3e17" officeooo:paragraph-rsid="012b3e17"/>
    </style:style>
    <style:style style:name="P24" style:family="paragraph" style:parent-style-name="Heading_20_3">
      <style:text-properties officeooo:rsid="01297e03" officeooo:paragraph-rsid="01297e03"/>
    </style:style>
    <style:style style:name="P25" style:family="paragraph" style:parent-style-name="Heading_20_3">
      <style:text-properties officeooo:rsid="01e5b977" officeooo:paragraph-rsid="01e5b977"/>
    </style:style>
    <style:style style:name="P26" style:family="paragraph" style:parent-style-name="Standard">
      <style:text-properties officeooo:rsid="0127a33f" officeooo:paragraph-rsid="01e5b977"/>
    </style:style>
    <style:style style:name="P27" style:family="paragraph" style:parent-style-name="Standard">
      <style:text-properties officeooo:rsid="01af756d" officeooo:paragraph-rsid="01af756d"/>
    </style:style>
    <style:style style:name="P28" style:family="paragraph" style:parent-style-name="Table_20_Contents">
      <style:paragraph-properties fo:text-align="left" style:justify-single-word="false"/>
      <style:text-properties officeooo:rsid="00f7eed7" officeooo:paragraph-rsid="012e8789"/>
    </style:style>
    <style:style style:name="P29" style:family="paragraph" style:parent-style-name="Standard">
      <style:text-properties officeooo:rsid="00ccde7a"/>
    </style:style>
    <style:style style:name="P30" style:family="paragraph" style:parent-style-name="Heading_20_1">
      <style:paragraph-properties fo:break-before="page"/>
    </style:style>
    <style:style style:name="P31" style:family="paragraph" style:parent-style-name="Standard">
      <style:text-properties officeooo:rsid="02116a0a" officeooo:paragraph-rsid="02156d29"/>
    </style:style>
    <style:style style:name="P32" style:family="paragraph" style:parent-style-name="Table_20_Header">
      <style:text-properties officeooo:paragraph-rsid="02156d29"/>
    </style:style>
    <style:style style:name="P33" style:family="paragraph" style:parent-style-name="Table_20_Header">
      <style:paragraph-properties fo:text-align="left" style:justify-single-word="false"/>
      <style:text-properties officeooo:rsid="02156d29" officeooo:paragraph-rsid="02156d29"/>
    </style:style>
    <style:style style:name="P34" style:family="paragraph" style:parent-style-name="Table_20_Contents">
      <style:text-properties officeooo:rsid="02138e0f" officeooo:paragraph-rsid="02156d29"/>
    </style:style>
    <style:style style:name="P35" style:family="paragraph" style:parent-style-name="Table_20_Contents">
      <style:paragraph-properties fo:text-align="left" style:justify-single-word="false"/>
      <style:text-properties officeooo:rsid="02156d29" officeooo:paragraph-rsid="02156d29"/>
    </style:style>
    <style:style style:name="P36" style:family="paragraph" style:parent-style-name="Table_20_Contents">
      <style:text-properties officeooo:rsid="02156d29" officeooo:paragraph-rsid="02156d29"/>
    </style:style>
    <style:style style:name="P37" style:family="paragraph" style:parent-style-name="Heading_20_2">
      <style:text-properties officeooo:paragraph-rsid="02156d29"/>
    </style:style>
    <style:style style:name="P38" style:family="paragraph" style:parent-style-name="Standard">
      <style:text-properties officeooo:rsid="02116a0a" officeooo:paragraph-rsid="02116a0a"/>
    </style:style>
    <style:style style:name="P39" style:family="paragraph" style:parent-style-name="Standard">
      <style:text-properties officeooo:rsid="0201cdb5" officeooo:paragraph-rsid="02116a0a"/>
    </style:style>
    <style:style style:name="P40" style:family="paragraph" style:parent-style-name="Standard">
      <style:text-properties officeooo:paragraph-rsid="02128068"/>
    </style:style>
    <style:style style:name="P41" style:family="paragraph" style:parent-style-name="Standard">
      <style:text-properties officeooo:paragraph-rsid="021997ef"/>
    </style:style>
    <style:style style:name="P42" style:family="paragraph" style:parent-style-name="Standard">
      <style:text-properties fo:font-weight="normal" officeooo:rsid="0226b499" officeooo:paragraph-rsid="0226b499" style:font-weight-asian="normal" style:font-weight-complex="normal"/>
    </style:style>
    <style:style style:name="P43" style:family="paragraph" style:parent-style-name="Standard">
      <style:text-properties officeooo:rsid="0211e772" officeooo:paragraph-rsid="021997ef"/>
    </style:style>
    <style:style style:name="P44" style:family="paragraph" style:parent-style-name="Standard">
      <style:text-properties officeooo:rsid="02116a0a" officeooo:paragraph-rsid="0211e772"/>
    </style:style>
    <style:style style:name="P45" style:family="paragraph" style:parent-style-name="Standard">
      <style:text-properties officeooo:rsid="0201cdb5" officeooo:paragraph-rsid="021997ef"/>
    </style:style>
    <style:style style:name="P46" style:family="paragraph" style:parent-style-name="Standard">
      <style:text-properties fo:font-weight="normal" officeooo:rsid="0207719f" officeooo:paragraph-rsid="021997ef" style:font-weight-asian="normal" style:font-weight-complex="normal"/>
    </style:style>
    <style:style style:name="P47" style:family="paragraph" style:parent-style-name="Standard">
      <style:text-properties officeooo:rsid="02037b48" officeooo:paragraph-rsid="021997ef"/>
    </style:style>
    <style:style style:name="P48" style:family="paragraph" style:parent-style-name="Standard">
      <style:text-properties officeooo:rsid="02116a0a" officeooo:paragraph-rsid="02128068"/>
    </style:style>
    <style:style style:name="P49" style:family="paragraph" style:parent-style-name="Standard">
      <style:text-properties officeooo:rsid="0211e772" officeooo:paragraph-rsid="02235fcd"/>
    </style:style>
    <style:style style:name="P50" style:family="paragraph" style:parent-style-name="Standard">
      <style:text-properties officeooo:rsid="0201cdb5" officeooo:paragraph-rsid="02138e0f"/>
    </style:style>
    <style:style style:name="P51" style:family="paragraph" style:parent-style-name="Standard">
      <style:text-properties officeooo:rsid="0201cdb5" officeooo:paragraph-rsid="02156d29"/>
    </style:style>
    <style:style style:name="P52" style:family="paragraph" style:parent-style-name="TalentHeader">
      <style:text-properties officeooo:paragraph-rsid="02156d29"/>
    </style:style>
    <style:style style:name="P53" style:family="paragraph" style:parent-style-name="Standard">
      <style:text-properties fo:font-weight="normal" officeooo:rsid="0207f7f5" officeooo:paragraph-rsid="02197ae6" style:font-weight-asian="normal" style:font-weight-complex="normal"/>
    </style:style>
    <style:style style:name="P54" style:family="paragraph" style:parent-style-name="Standard">
      <style:text-properties officeooo:rsid="021b50ab" officeooo:paragraph-rsid="021b50ab"/>
    </style:style>
    <style:style style:name="P55" style:family="paragraph" style:parent-style-name="Standard">
      <style:text-properties officeooo:paragraph-rsid="02197ae6"/>
    </style:style>
    <style:style style:name="P56" style:family="paragraph" style:parent-style-name="Standard">
      <style:text-properties officeooo:rsid="0201cdb5" officeooo:paragraph-rsid="021b50ab"/>
    </style:style>
    <style:style style:name="P57" style:family="paragraph" style:parent-style-name="Standard">
      <style:text-properties fo:font-weight="normal" officeooo:rsid="021b50ab" officeooo:paragraph-rsid="021b50ab" style:font-weight-asian="normal" style:font-weight-complex="normal"/>
    </style:style>
    <style:style style:name="P58" style:family="paragraph" style:parent-style-name="Standard">
      <style:text-properties officeooo:paragraph-rsid="021e182c"/>
    </style:style>
    <style:style style:name="P59" style:family="paragraph" style:parent-style-name="Standard">
      <style:text-properties officeooo:rsid="02156d29" officeooo:paragraph-rsid="02197ae6"/>
    </style:style>
    <style:style style:name="P60" style:family="paragraph" style:parent-style-name="Standard">
      <style:text-properties officeooo:rsid="0201cdb5" officeooo:paragraph-rsid="02183ad5"/>
    </style:style>
    <style:style style:name="P61" style:family="paragraph" style:parent-style-name="TalentHeader">
      <style:text-properties officeooo:paragraph-rsid="02183ad5"/>
    </style:style>
    <style:style style:name="P62" style:family="paragraph" style:parent-style-name="Standard">
      <style:text-properties officeooo:rsid="022189ea" officeooo:paragraph-rsid="022189ea"/>
    </style:style>
    <style:style style:name="P63" style:family="paragraph" style:parent-style-name="Standard">
      <style:text-properties officeooo:rsid="0224779b" officeooo:paragraph-rsid="0224779b"/>
    </style:style>
    <style:style style:name="P64" style:family="paragraph" style:parent-style-name="Standard">
      <style:text-properties officeooo:rsid="02037b48" officeooo:paragraph-rsid="02235fcd"/>
    </style:style>
    <style:style style:name="P65" style:family="paragraph" style:parent-style-name="Standard">
      <style:text-properties fo:font-weight="bold" officeooo:rsid="02235fcd" officeooo:paragraph-rsid="02235fcd" style:font-weight-asian="bold" style:font-weight-complex="bold"/>
    </style:style>
    <style:style style:name="P66" style:family="paragraph" style:parent-style-name="Standard">
      <style:text-properties fo:font-weight="bold" officeooo:rsid="022189ea" officeooo:paragraph-rsid="022189ea" style:font-weight-asian="bold" style:font-weight-complex="bold"/>
    </style:style>
    <style:style style:name="P67" style:family="paragraph" style:parent-style-name="Standard">
      <style:text-properties officeooo:rsid="02235fcd" officeooo:paragraph-rsid="02235fcd"/>
    </style:style>
    <style:style style:name="P68" style:family="paragraph" style:parent-style-name="Standard">
      <style:text-properties officeooo:rsid="02116a0a" officeooo:paragraph-rsid="02183ad5"/>
    </style:style>
    <style:style style:name="P69" style:family="paragraph" style:parent-style-name="Standard">
      <style:text-properties officeooo:paragraph-rsid="022189ea"/>
    </style:style>
    <style:style style:name="P70" style:family="paragraph" style:parent-style-name="Standard">
      <style:text-properties officeooo:paragraph-rsid="02235fcd"/>
    </style:style>
    <style:style style:name="P71" style:family="paragraph" style:parent-style-name="Heading_20_2">
      <style:paragraph-properties fo:break-before="page"/>
    </style:style>
    <style:style style:name="P72" style:family="paragraph" style:parent-style-name="Standard">
      <style:text-properties officeooo:rsid="0201cdb5" officeooo:paragraph-rsid="0226b499"/>
    </style:style>
    <style:style style:name="P73" style:family="paragraph" style:parent-style-name="TalentHeader">
      <style:text-properties officeooo:paragraph-rsid="0226b499"/>
    </style:style>
    <style:style style:name="P74" style:family="paragraph" style:parent-style-name="Standard">
      <style:text-properties officeooo:paragraph-rsid="022757a5"/>
    </style:style>
    <style:style style:name="P75" style:family="paragraph" style:parent-style-name="Standard">
      <style:text-properties officeooo:rsid="022757a5" officeooo:paragraph-rsid="022757a5"/>
    </style:style>
    <style:style style:name="P76" style:family="paragraph" style:parent-style-name="Standard">
      <style:text-properties fo:font-weight="bold" officeooo:rsid="022757a5" officeooo:paragraph-rsid="022757a5" style:font-weight-asian="bold" style:font-weight-complex="bold"/>
    </style:style>
    <style:style style:name="P77" style:family="paragraph" style:parent-style-name="Standard">
      <style:text-properties fo:font-weight="normal" officeooo:rsid="022757a5" officeooo:paragraph-rsid="022757a5" style:font-weight-asian="normal" style:font-weight-complex="normal"/>
    </style:style>
    <style:style style:name="P78" style:family="paragraph" style:parent-style-name="Standard">
      <style:text-properties officeooo:rsid="0226b499" officeooo:paragraph-rsid="0226b499"/>
    </style:style>
    <style:style style:name="P79" style:family="paragraph" style:parent-style-name="Standard">
      <style:text-properties fo:font-weight="normal" officeooo:rsid="0226b499" officeooo:paragraph-rsid="022757a5" style:font-weight-asian="normal" style:font-weight-complex="normal"/>
    </style:style>
    <style:style style:name="P80" style:family="paragraph" style:parent-style-name="Standard">
      <style:text-properties officeooo:rsid="02116a0a" officeooo:paragraph-rsid="0226b499"/>
    </style:style>
    <style:style style:name="P81" style:family="paragraph" style:parent-style-name="Standard">
      <style:text-properties officeooo:rsid="022189ea" officeooo:paragraph-rsid="0226b499"/>
    </style:style>
    <style:style style:name="P82" style:family="paragraph" style:parent-style-name="Standard">
      <style:text-properties officeooo:rsid="0201cdb5" officeooo:paragraph-rsid="020fda2a"/>
    </style:style>
    <style:style style:name="P83" style:family="paragraph" style:parent-style-name="Standard">
      <style:text-properties officeooo:rsid="0201cdb5" officeooo:paragraph-rsid="0201cdb5"/>
    </style:style>
    <style:style style:name="P84" style:family="paragraph" style:parent-style-name="TalentHeader">
      <style:text-properties officeooo:paragraph-rsid="0207719f"/>
    </style:style>
    <style:style style:name="P85" style:family="paragraph" style:parent-style-name="Standard">
      <style:text-properties fo:font-weight="normal" officeooo:rsid="0207f7f5" officeooo:paragraph-rsid="0207f7f5" style:font-weight-asian="normal" style:font-weight-complex="normal"/>
    </style:style>
    <style:style style:name="P86" style:family="paragraph" style:parent-style-name="Standard">
      <style:text-properties fo:font-weight="normal" officeooo:rsid="02059233" officeooo:paragraph-rsid="020e1050" style:font-weight-asian="normal" style:font-weight-complex="normal"/>
    </style:style>
    <style:style style:name="P87" style:family="paragraph" style:parent-style-name="Standard">
      <style:text-properties fo:font-weight="normal" officeooo:rsid="0201cdb5" officeooo:paragraph-rsid="020a979f" style:font-weight-asian="normal" style:font-weight-complex="normal"/>
    </style:style>
    <style:style style:name="P88" style:family="paragraph" style:parent-style-name="Standard">
      <style:text-properties fo:font-weight="normal" officeooo:rsid="0201cdb5" officeooo:paragraph-rsid="0209225e" style:font-weight-asian="normal" style:font-weight-complex="normal"/>
    </style:style>
    <style:style style:name="P89" style:family="paragraph" style:parent-style-name="Standard">
      <style:text-properties fo:font-weight="normal" officeooo:rsid="0207f7f5" officeooo:paragraph-rsid="020e1050" style:font-weight-asian="normal" style:font-weight-complex="normal"/>
    </style:style>
    <style:style style:name="P90" style:family="paragraph" style:parent-style-name="Standard">
      <style:text-properties fo:font-weight="normal" officeooo:rsid="0201cdb5" officeooo:paragraph-rsid="0207719f" style:font-weight-asian="normal" style:font-weight-complex="normal"/>
    </style:style>
    <style:style style:name="P91" style:family="paragraph" style:parent-style-name="Standard">
      <style:text-properties officeooo:rsid="0201cdb5" officeooo:paragraph-rsid="0207719f"/>
    </style:style>
    <style:style style:name="P92" style:family="paragraph" style:parent-style-name="Standard">
      <style:text-properties officeooo:paragraph-rsid="0201cdb5"/>
    </style:style>
    <style:style style:name="P93" style:family="paragraph" style:parent-style-name="Standard">
      <style:text-properties officeooo:rsid="013cfc33" officeooo:paragraph-rsid="0201cdb5"/>
    </style:style>
    <style:style style:name="P94" style:family="paragraph" style:parent-style-name="Heading_20_1">
      <style:paragraph-properties fo:break-before="page"/>
      <style:text-properties officeooo:paragraph-rsid="0149ceb2"/>
    </style:style>
    <style:style style:name="P95" style:family="paragraph" style:parent-style-name="Heading_20_2">
      <style:text-properties fo:color="#080914" loext:opacity="100%" officeooo:paragraph-rsid="015530ac"/>
    </style:style>
    <style:style style:name="P96" style:family="paragraph" style:parent-style-name="TalentHeader">
      <style:text-properties officeooo:paragraph-rsid="0159bb1a"/>
    </style:style>
    <style:style style:name="P97" style:family="paragraph" style:parent-style-name="Standard">
      <style:text-properties officeooo:rsid="014b6f77" officeooo:paragraph-rsid="0159bb1a"/>
    </style:style>
    <style:style style:name="P98" style:family="paragraph" style:parent-style-name="TalentHeader">
      <style:text-properties officeooo:rsid="01503b34" officeooo:paragraph-rsid="0159bb1a"/>
    </style:style>
    <style:style style:name="P99" style:family="paragraph" style:parent-style-name="Standard">
      <style:text-properties officeooo:rsid="015530ac" officeooo:paragraph-rsid="0159bb1a"/>
    </style:style>
    <style:style style:name="P100" style:family="paragraph" style:parent-style-name="Standard">
      <style:text-properties officeooo:rsid="014b6f77" officeooo:paragraph-rsid="014b6f77"/>
    </style:style>
    <style:style style:name="P101" style:family="paragraph" style:parent-style-name="Heading_20_2">
      <style:paragraph-properties fo:break-before="page"/>
      <style:text-properties officeooo:rsid="0149ceb2" officeooo:paragraph-rsid="0149ceb2"/>
    </style:style>
    <style:style style:name="P102" style:family="paragraph" style:parent-style-name="Standard">
      <style:text-properties officeooo:rsid="013cfc33" officeooo:paragraph-rsid="0157ba6e"/>
    </style:style>
    <style:style style:name="P103" style:family="paragraph" style:parent-style-name="Standard">
      <style:text-properties officeooo:paragraph-rsid="013cfc33"/>
    </style:style>
    <style:style style:name="P104" style:family="paragraph" style:parent-style-name="Standard">
      <style:text-properties officeooo:rsid="013cfc33" officeooo:paragraph-rsid="013cfc33"/>
    </style:style>
    <style:style style:name="P105" style:family="paragraph" style:parent-style-name="Standard">
      <style:text-properties fo:font-weight="bold" officeooo:rsid="01d52328" officeooo:paragraph-rsid="01d52328" style:font-weight-asian="bold" style:font-weight-complex="bold"/>
    </style:style>
    <style:style style:name="P106" style:family="paragraph" style:parent-style-name="Standard">
      <style:text-properties officeooo:paragraph-rsid="01d36cea"/>
    </style:style>
    <style:style style:name="P107" style:family="paragraph" style:parent-style-name="Standard">
      <style:text-properties officeooo:rsid="013cfc33" officeooo:paragraph-rsid="01d36cea"/>
    </style:style>
    <style:style style:name="P108" style:family="paragraph" style:parent-style-name="Standard">
      <style:text-properties fo:font-weight="bold" officeooo:rsid="0144037e" officeooo:paragraph-rsid="0144037e" style:font-weight-asian="bold" style:font-weight-complex="bold"/>
    </style:style>
    <style:style style:name="P109" style:family="paragraph" style:parent-style-name="Standard">
      <style:text-properties officeooo:rsid="01405cf9" officeooo:paragraph-rsid="01405cf9"/>
    </style:style>
    <style:style style:name="P110" style:family="paragraph" style:parent-style-name="Standard">
      <style:text-properties officeooo:rsid="013cfc33" officeooo:paragraph-rsid="020199af"/>
    </style:style>
    <style:style style:name="P111" style:family="paragraph" style:parent-style-name="TalentHeader">
      <style:text-properties officeooo:paragraph-rsid="020199af"/>
    </style:style>
    <style:style style:name="P112" style:family="paragraph" style:parent-style-name="Standard">
      <style:text-properties fo:font-weight="bold" officeooo:rsid="01d52328" officeooo:paragraph-rsid="020199af" style:font-weight-asian="bold" style:font-weight-complex="bold"/>
    </style:style>
    <style:style style:name="P113" style:family="paragraph" style:parent-style-name="Standard">
      <style:text-properties officeooo:rsid="013c6743" officeooo:paragraph-rsid="013cfc33"/>
    </style:style>
    <style:style style:name="P114" style:family="paragraph" style:parent-style-name="Standard">
      <style:text-properties officeooo:rsid="013cfc33" officeooo:paragraph-rsid="01d52328"/>
    </style:style>
    <style:style style:name="P115" style:family="paragraph" style:parent-style-name="Standard">
      <style:text-properties officeooo:rsid="013cfc33" officeooo:paragraph-rsid="014145a3"/>
    </style:style>
    <style:style style:name="P116" style:family="paragraph" style:parent-style-name="TalentHeader">
      <style:text-properties officeooo:rsid="01a9c8bb" officeooo:paragraph-rsid="01a9c8bb"/>
    </style:style>
    <style:style style:name="P117" style:family="paragraph" style:parent-style-name="Standard">
      <style:text-properties officeooo:rsid="013cfc33" officeooo:paragraph-rsid="01a9c8bb"/>
    </style:style>
    <style:style style:name="P118" style:family="paragraph" style:parent-style-name="TalentHeader">
      <style:text-properties officeooo:rsid="0157ba6e" officeooo:paragraph-rsid="0157ba6e"/>
    </style:style>
    <style:style style:name="P119" style:family="paragraph" style:parent-style-name="Standard">
      <style:text-properties officeooo:rsid="013cfc33" officeooo:paragraph-rsid="01a911f0"/>
    </style:style>
    <style:style style:name="P120" style:family="paragraph" style:parent-style-name="Standard">
      <style:text-properties officeooo:rsid="013cfc33" officeooo:paragraph-rsid="013f71ff"/>
    </style:style>
    <style:style style:name="P121" style:family="paragraph" style:parent-style-name="Standard">
      <style:text-properties officeooo:rsid="013cfc33" officeooo:paragraph-rsid="01405cf9"/>
    </style:style>
    <style:style style:name="P122" style:family="paragraph" style:parent-style-name="Standard">
      <style:text-properties officeooo:rsid="013cfc33" officeooo:paragraph-rsid="013c6743"/>
    </style:style>
    <style:style style:name="P123" style:family="paragraph" style:parent-style-name="Heading_20_2">
      <style:paragraph-properties fo:break-before="page"/>
      <style:text-properties officeooo:rsid="01766d40" officeooo:paragraph-rsid="01766d40"/>
    </style:style>
    <style:style style:name="P124" style:family="paragraph" style:parent-style-name="Standard">
      <style:text-properties officeooo:rsid="01766d40" officeooo:paragraph-rsid="01766d40"/>
    </style:style>
    <style:style style:name="P125" style:family="paragraph" style:parent-style-name="TalentHeader">
      <style:text-properties officeooo:rsid="015e34d3" officeooo:paragraph-rsid="015e34d3"/>
    </style:style>
    <style:style style:name="P126" style:family="paragraph" style:parent-style-name="Standard">
      <style:text-properties officeooo:rsid="0159f948" officeooo:paragraph-rsid="015e34d3"/>
    </style:style>
    <style:style style:name="P127" style:family="paragraph" style:parent-style-name="Standard">
      <style:text-properties officeooo:rsid="015b2edc" officeooo:paragraph-rsid="015e34d3"/>
    </style:style>
    <style:style style:name="P128" style:family="paragraph" style:parent-style-name="Standard">
      <style:text-properties officeooo:rsid="015c1384" officeooo:paragraph-rsid="015e34d3"/>
    </style:style>
    <style:style style:name="P129" style:family="paragraph" style:parent-style-name="List_20_Paragraph" style:list-style-name="L3">
      <style:text-properties officeooo:rsid="015e34d3" officeooo:paragraph-rsid="0170ba8a"/>
    </style:style>
    <style:style style:name="P130" style:family="paragraph" style:parent-style-name="List_20_Paragraph">
      <style:text-properties officeooo:rsid="015e34d3" officeooo:paragraph-rsid="015e34d3"/>
    </style:style>
    <style:style style:name="P131" style:family="paragraph" style:parent-style-name="Standard">
      <style:text-properties officeooo:rsid="0159f948" officeooo:paragraph-rsid="01633829"/>
    </style:style>
    <style:style style:name="P132" style:family="paragraph" style:parent-style-name="Standard">
      <style:text-properties officeooo:rsid="015b2edc" officeooo:paragraph-rsid="01633829"/>
    </style:style>
    <style:style style:name="P133" style:family="paragraph" style:parent-style-name="Standard">
      <style:text-properties officeooo:rsid="015b2edc" officeooo:paragraph-rsid="0177c544"/>
    </style:style>
    <style:style style:name="P134" style:family="paragraph" style:parent-style-name="List_20_Paragraph" style:list-style-name="L3">
      <style:text-properties officeooo:rsid="01633829" officeooo:paragraph-rsid="01633829"/>
    </style:style>
    <style:style style:name="P135" style:family="paragraph" style:parent-style-name="List_20_Paragraph">
      <style:text-properties officeooo:rsid="015c1384" officeooo:paragraph-rsid="015e34d3"/>
    </style:style>
    <style:style style:name="P136" style:family="paragraph" style:parent-style-name="TalentHeader">
      <style:text-properties officeooo:rsid="015c1384" officeooo:paragraph-rsid="015c1384"/>
    </style:style>
    <style:style style:name="P137" style:family="paragraph" style:parent-style-name="Standard">
      <style:text-properties officeooo:rsid="0159f948" officeooo:paragraph-rsid="015c1384"/>
    </style:style>
    <style:style style:name="P138" style:family="paragraph" style:parent-style-name="Standard">
      <style:text-properties officeooo:rsid="015b2edc" officeooo:paragraph-rsid="015c1384"/>
    </style:style>
    <style:style style:name="P139" style:family="paragraph" style:parent-style-name="Standard">
      <style:text-properties officeooo:rsid="015c1384" officeooo:paragraph-rsid="015c1384"/>
    </style:style>
    <style:style style:name="P140" style:family="paragraph" style:parent-style-name="List_20_Paragraph" style:list-style-name="L3">
      <style:text-properties officeooo:rsid="01608c61" officeooo:paragraph-rsid="01608c61"/>
    </style:style>
    <style:style style:name="P141" style:family="paragraph" style:parent-style-name="List_20_Paragraph" style:list-style-name="L3">
      <style:text-properties officeooo:rsid="015c1384" officeooo:paragraph-rsid="015c1384"/>
    </style:style>
    <style:style style:name="P142" style:family="paragraph" style:parent-style-name="List_20_Paragraph" style:list-style-name="L3">
      <style:text-properties officeooo:rsid="01611b20" officeooo:paragraph-rsid="01611b20"/>
    </style:style>
    <style:style style:name="P143" style:family="paragraph" style:parent-style-name="List_20_Paragraph">
      <style:text-properties officeooo:rsid="015c1384" officeooo:paragraph-rsid="015c1384"/>
    </style:style>
    <style:style style:name="P144" style:family="paragraph" style:parent-style-name="TalentHeader">
      <style:text-properties officeooo:rsid="015b2edc" officeooo:paragraph-rsid="015b2edc"/>
    </style:style>
    <style:style style:name="P145" style:family="paragraph" style:parent-style-name="Standard">
      <style:text-properties officeooo:rsid="0159f948" officeooo:paragraph-rsid="015b2edc"/>
    </style:style>
    <style:style style:name="P146" style:family="paragraph" style:parent-style-name="Standard">
      <style:text-properties officeooo:rsid="015b2edc" officeooo:paragraph-rsid="015b2edc"/>
    </style:style>
    <style:style style:name="P147" style:family="paragraph" style:parent-style-name="Standard">
      <style:text-properties officeooo:rsid="015bf31d" officeooo:paragraph-rsid="015bf31d"/>
    </style:style>
    <style:style style:name="P148" style:family="paragraph" style:parent-style-name="List_20_Paragraph" style:list-style-name="L3">
      <style:text-properties officeooo:rsid="015b2edc" officeooo:paragraph-rsid="015b2edc"/>
    </style:style>
    <style:style style:name="P149" style:family="paragraph" style:parent-style-name="List_20_Paragraph" style:list-style-name="L3">
      <style:text-properties officeooo:rsid="015b2edc" officeooo:paragraph-rsid="01633829"/>
    </style:style>
    <style:style style:name="P150" style:family="paragraph" style:parent-style-name="Standard">
      <style:text-properties officeooo:rsid="0159f948" officeooo:paragraph-rsid="0159f948"/>
    </style:style>
    <style:style style:name="P151" style:family="paragraph" style:parent-style-name="Standard">
      <style:text-properties officeooo:rsid="0159f948" officeooo:paragraph-rsid="015e0bb9"/>
    </style:style>
    <style:style style:name="P152" style:family="paragraph" style:parent-style-name="Standard">
      <style:text-properties officeooo:paragraph-rsid="013c6743"/>
    </style:style>
    <style:style style:name="P153" style:family="paragraph" style:parent-style-name="TalentHeader">
      <style:text-properties officeooo:rsid="01738eff" officeooo:paragraph-rsid="01738eff"/>
    </style:style>
    <style:style style:name="P154" style:family="paragraph" style:parent-style-name="Standard">
      <style:text-properties officeooo:rsid="0159f948" officeooo:paragraph-rsid="01738eff"/>
    </style:style>
    <style:style style:name="P155" style:family="paragraph" style:parent-style-name="Standard">
      <style:text-properties officeooo:rsid="015b2edc" officeooo:paragraph-rsid="01738eff"/>
    </style:style>
    <style:style style:name="P156" style:family="paragraph" style:parent-style-name="Standard">
      <style:text-properties officeooo:rsid="0174db33" officeooo:paragraph-rsid="0174db33"/>
    </style:style>
    <style:style style:name="P157" style:family="paragraph" style:parent-style-name="Standard">
      <style:text-properties officeooo:rsid="013c6743" officeooo:paragraph-rsid="013c6743"/>
    </style:style>
    <style:style style:name="P158" style:family="paragraph" style:parent-style-name="TalentHeader">
      <style:text-properties officeooo:rsid="015e0bb9" officeooo:paragraph-rsid="015e0bb9"/>
    </style:style>
    <style:style style:name="P159" style:family="paragraph" style:parent-style-name="Standard">
      <style:text-properties officeooo:rsid="015b2edc" officeooo:paragraph-rsid="016dddb2"/>
    </style:style>
    <style:style style:name="P160" style:family="paragraph" style:parent-style-name="Standard">
      <style:text-properties officeooo:rsid="015bf31d" officeooo:paragraph-rsid="015e0bb9"/>
    </style:style>
    <style:style style:name="P161" style:family="paragraph" style:parent-style-name="Standard">
      <style:text-properties officeooo:rsid="015e0bb9" officeooo:paragraph-rsid="015e0bb9"/>
    </style:style>
    <style:style style:name="P162" style:family="paragraph" style:parent-style-name="List_20_Paragraph" style:list-style-name="L3">
      <style:text-properties officeooo:rsid="015c1384" officeooo:paragraph-rsid="016e3d94"/>
    </style:style>
    <style:style style:name="P163" style:family="paragraph" style:parent-style-name="List_20_Paragraph" style:list-style-name="L3">
      <style:text-properties officeooo:rsid="01b589aa" officeooo:paragraph-rsid="01b589aa"/>
    </style:style>
    <style:style style:name="P164" style:family="paragraph" style:parent-style-name="List_20_Paragraph" style:list-style-name="L3">
      <style:text-properties officeooo:rsid="01d7d05a" officeooo:paragraph-rsid="01d7d05a"/>
    </style:style>
    <style:style style:name="P165" style:family="paragraph" style:parent-style-name="Standard">
      <style:text-properties officeooo:rsid="013c6743" officeooo:paragraph-rsid="015e0bb9"/>
    </style:style>
    <style:style style:name="P166" style:family="paragraph" style:parent-style-name="TalentHeader">
      <style:text-properties officeooo:rsid="019935c4" officeooo:paragraph-rsid="019935c4"/>
    </style:style>
    <style:style style:name="P167" style:family="paragraph" style:parent-style-name="Standard">
      <style:text-properties officeooo:rsid="0159f948" officeooo:paragraph-rsid="019935c4"/>
    </style:style>
    <style:style style:name="P168" style:family="paragraph" style:parent-style-name="Standard">
      <style:text-properties officeooo:rsid="015b2edc" officeooo:paragraph-rsid="019935c4"/>
    </style:style>
    <style:style style:name="P169" style:family="paragraph" style:parent-style-name="List_20_Paragraph" style:list-style-name="L3">
      <style:text-properties officeooo:rsid="019935c4" officeooo:paragraph-rsid="019935c4"/>
    </style:style>
    <style:style style:name="P170" style:family="paragraph" style:parent-style-name="TalentHeader">
      <style:text-properties officeooo:rsid="0198b2aa" officeooo:paragraph-rsid="0198b2aa"/>
    </style:style>
    <style:style style:name="P171" style:family="paragraph" style:parent-style-name="Standard">
      <style:text-properties officeooo:rsid="0159f948" officeooo:paragraph-rsid="0198b2aa"/>
    </style:style>
    <style:style style:name="P172" style:family="paragraph" style:parent-style-name="Standard">
      <style:text-properties officeooo:rsid="015b2edc" officeooo:paragraph-rsid="0198b2aa"/>
    </style:style>
    <style:style style:name="P173" style:family="paragraph" style:parent-style-name="Standard">
      <style:text-properties officeooo:rsid="015bf31d" officeooo:paragraph-rsid="0198b2aa"/>
    </style:style>
    <style:style style:name="P174" style:family="paragraph" style:parent-style-name="List_20_Paragraph" style:list-style-name="L3">
      <style:text-properties officeooo:rsid="0198b2aa" officeooo:paragraph-rsid="0198b2aa"/>
    </style:style>
    <style:style style:name="P175" style:family="paragraph" style:parent-style-name="Standard">
      <style:text-properties officeooo:rsid="0159f948" officeooo:paragraph-rsid="015bf31d"/>
    </style:style>
    <style:style style:name="P176" style:family="paragraph" style:parent-style-name="Standard">
      <style:text-properties officeooo:rsid="015b2edc" officeooo:paragraph-rsid="015bf31d"/>
    </style:style>
    <style:style style:name="P177" style:family="paragraph" style:parent-style-name="List_20_Paragraph" style:list-style-name="L3">
      <style:text-properties officeooo:rsid="015e0bb9" officeooo:paragraph-rsid="01b9917d"/>
    </style:style>
    <style:style style:name="P178" style:family="paragraph" style:parent-style-name="Standard">
      <style:text-properties officeooo:rsid="013c6743" officeooo:paragraph-rsid="01675787"/>
    </style:style>
    <style:style style:name="P179" style:family="paragraph" style:parent-style-name="TalentHeader">
      <style:text-properties officeooo:rsid="016849bf" officeooo:paragraph-rsid="016849bf"/>
    </style:style>
    <style:style style:name="P180" style:family="paragraph" style:parent-style-name="Standard">
      <style:text-properties officeooo:rsid="0159f948" officeooo:paragraph-rsid="01675787"/>
    </style:style>
    <style:style style:name="P181" style:family="paragraph" style:parent-style-name="Standard">
      <style:text-properties officeooo:rsid="015b2edc" officeooo:paragraph-rsid="01675787"/>
    </style:style>
    <style:style style:name="P182" style:family="paragraph" style:parent-style-name="List_20_Paragraph" style:list-style-name="L3">
      <style:text-properties officeooo:rsid="015c1384" officeooo:paragraph-rsid="01675787"/>
    </style:style>
    <style:style style:name="P183" style:family="paragraph" style:parent-style-name="List_20_Paragraph" style:list-style-name="L3">
      <style:text-properties officeooo:rsid="016bdffd" officeooo:paragraph-rsid="016bdffd"/>
    </style:style>
    <style:style style:name="P184" style:family="paragraph" style:parent-style-name="List_20_Paragraph">
      <style:text-properties officeooo:rsid="016bdffd" officeooo:paragraph-rsid="016bdffd"/>
    </style:style>
    <style:style style:name="P185" style:family="paragraph" style:parent-style-name="TalentHeader">
      <style:text-properties officeooo:rsid="016fb640" officeooo:paragraph-rsid="016fb640"/>
    </style:style>
    <style:style style:name="P186" style:family="paragraph" style:parent-style-name="Standard">
      <style:text-properties officeooo:rsid="0159f948" officeooo:paragraph-rsid="016fb640"/>
    </style:style>
    <style:style style:name="P187" style:family="paragraph" style:parent-style-name="Standard">
      <style:text-properties officeooo:rsid="015b2edc" officeooo:paragraph-rsid="016fb640"/>
    </style:style>
    <style:style style:name="P188" style:family="paragraph" style:parent-style-name="Standard">
      <style:text-properties officeooo:rsid="0170ba8a" officeooo:paragraph-rsid="0170ba8a"/>
    </style:style>
    <style:style style:name="P189" style:family="paragraph" style:parent-style-name="Standard">
      <style:text-properties officeooo:rsid="0170ba8a" officeooo:paragraph-rsid="01738eff"/>
    </style:style>
    <style:style style:name="P190" style:family="paragraph" style:parent-style-name="List_20_Paragraph" style:list-style-name="L3">
      <style:text-properties officeooo:rsid="0170ba8a" officeooo:paragraph-rsid="0170ba8a"/>
    </style:style>
    <style:style style:name="P191" style:family="paragraph" style:parent-style-name="List_20_Paragraph">
      <style:text-properties officeooo:rsid="016bdffd" officeooo:paragraph-rsid="019732ab"/>
    </style:style>
    <style:style style:name="P192" style:family="paragraph" style:parent-style-name="TalentHeader">
      <style:text-properties officeooo:rsid="019732ab" officeooo:paragraph-rsid="019732ab"/>
    </style:style>
    <style:style style:name="P193" style:family="paragraph" style:parent-style-name="Standard">
      <style:text-properties officeooo:rsid="0159f948" officeooo:paragraph-rsid="019732ab"/>
    </style:style>
    <style:style style:name="P194" style:family="paragraph" style:parent-style-name="Standard">
      <style:text-properties officeooo:rsid="015b2edc" officeooo:paragraph-rsid="019732ab"/>
    </style:style>
    <style:style style:name="P195" style:family="paragraph" style:parent-style-name="Standard">
      <style:text-properties officeooo:rsid="01716fea" officeooo:paragraph-rsid="019732ab"/>
    </style:style>
    <style:style style:name="P196" style:family="paragraph" style:parent-style-name="List_20_Paragraph" style:list-style-name="L3">
      <style:text-properties officeooo:rsid="0197dbd1" officeooo:paragraph-rsid="0197dbd1"/>
    </style:style>
    <style:style style:name="P197" style:family="paragraph" style:parent-style-name="Standard">
      <style:text-properties officeooo:rsid="016bdffd" officeooo:paragraph-rsid="01675787"/>
    </style:style>
    <style:style style:name="P198" style:family="paragraph" style:parent-style-name="TalentHeader">
      <style:text-properties officeooo:rsid="017155ad" officeooo:paragraph-rsid="017155ad"/>
    </style:style>
    <style:style style:name="P199" style:family="paragraph" style:parent-style-name="Standard">
      <style:text-properties officeooo:rsid="0159f948" officeooo:paragraph-rsid="017155ad"/>
    </style:style>
    <style:style style:name="P200" style:family="paragraph" style:parent-style-name="Standard">
      <style:text-properties officeooo:rsid="015b2edc" officeooo:paragraph-rsid="017155ad"/>
    </style:style>
    <style:style style:name="P201" style:family="paragraph" style:parent-style-name="Standard">
      <style:text-properties officeooo:rsid="01716fea" officeooo:paragraph-rsid="01716fea"/>
    </style:style>
    <style:style style:name="P202" style:family="paragraph" style:parent-style-name="List_20_Paragraph" style:list-style-name="L3">
      <style:text-properties officeooo:rsid="01716fea" officeooo:paragraph-rsid="01716fea"/>
    </style:style>
    <style:style style:name="P203" style:family="paragraph" style:parent-style-name="Standard">
      <style:text-properties officeooo:paragraph-rsid="01675787"/>
    </style:style>
    <style:style style:name="P204" style:family="paragraph" style:parent-style-name="Standard">
      <style:text-properties officeooo:paragraph-rsid="01192e68"/>
    </style:style>
    <style:style style:name="P205" style:family="paragraph" style:parent-style-name="Heading_20_2">
      <style:text-properties officeooo:rsid="01127a28" officeooo:paragraph-rsid="01212211"/>
    </style:style>
    <style:style style:name="P206" style:family="paragraph" style:parent-style-name="Standard">
      <style:text-properties officeooo:rsid="01192e68" officeooo:paragraph-rsid="017cc684"/>
    </style:style>
    <style:style style:name="P207" style:family="paragraph" style:parent-style-name="Standard">
      <style:text-properties officeooo:rsid="0114a605" officeooo:paragraph-rsid="01192e68"/>
    </style:style>
    <style:style style:name="P208" style:family="paragraph" style:parent-style-name="Heading_20_2">
      <style:text-properties officeooo:rsid="01127a28" officeooo:paragraph-rsid="01192e68"/>
    </style:style>
    <style:style style:name="P209" style:family="paragraph" style:parent-style-name="Standard">
      <style:text-properties officeooo:rsid="01192e68" officeooo:paragraph-rsid="01192e68"/>
    </style:style>
    <style:style style:name="P210" style:family="paragraph" style:parent-style-name="Standard">
      <style:text-properties officeooo:rsid="01127a28" officeooo:paragraph-rsid="01192e68"/>
    </style:style>
    <style:style style:name="P211" style:family="paragraph" style:parent-style-name="Heading_20_2">
      <style:text-properties officeooo:paragraph-rsid="0190cc1c"/>
    </style:style>
    <style:style style:name="P212" style:family="paragraph" style:parent-style-name="Standard">
      <style:text-properties officeooo:rsid="017cc684" officeooo:paragraph-rsid="0190cc1c"/>
    </style:style>
    <style:style style:name="P213" style:family="paragraph" style:parent-style-name="Heading_20_2">
      <style:text-properties officeooo:rsid="00c34092" officeooo:paragraph-rsid="01212211"/>
    </style:style>
    <style:style style:name="P214" style:family="paragraph" style:parent-style-name="Standard">
      <style:text-properties officeooo:rsid="01192e68" officeooo:paragraph-rsid="01212211"/>
    </style:style>
    <style:style style:name="P215" style:family="paragraph" style:parent-style-name="List_20_Paragraph" style:list-style-name="L4">
      <style:text-properties fo:font-weight="normal" style:font-weight-asian="normal" style:font-weight-complex="normal"/>
    </style:style>
    <style:style style:name="P216" style:family="paragraph" style:parent-style-name="List_20_Paragraph" style:list-style-name="L4">
      <style:text-properties fo:font-weight="normal" officeooo:rsid="01c118ce" officeooo:paragraph-rsid="01c118ce" style:font-weight-asian="normal" style:font-weight-complex="normal"/>
    </style:style>
    <style:style style:name="P217" style:family="paragraph" style:parent-style-name="Standard">
      <style:text-properties officeooo:rsid="0114a605" officeooo:paragraph-rsid="01212211"/>
    </style:style>
    <style:style style:name="P218" style:family="paragraph" style:parent-style-name="Heading_20_2">
      <style:text-properties officeooo:rsid="01fb52c4" officeooo:paragraph-rsid="01fb52c4"/>
    </style:style>
    <style:style style:name="P219" style:family="paragraph" style:parent-style-name="Standard">
      <style:text-properties officeooo:rsid="011a8ea4" officeooo:paragraph-rsid="011a8ea4"/>
    </style:style>
    <style:style style:name="P220" style:family="paragraph" style:parent-style-name="List_20_Paragraph" style:list-style-name="L5"/>
    <style:style style:name="P221" style:family="paragraph" style:parent-style-name="Heading_20_1">
      <style:text-properties officeooo:paragraph-rsid="0091342b"/>
    </style:style>
    <style:style style:name="P222" style:family="paragraph" style:parent-style-name="Heading_20_2">
      <style:text-properties officeooo:rsid="011b3104" officeooo:paragraph-rsid="011b3104"/>
    </style:style>
    <style:style style:name="P223" style:family="paragraph" style:parent-style-name="Standard">
      <style:text-properties officeooo:rsid="011b3104" officeooo:paragraph-rsid="011b3104"/>
    </style:style>
    <style:style style:name="P224" style:family="paragraph" style:parent-style-name="Heading_20_2">
      <style:text-properties officeooo:paragraph-rsid="01212211"/>
    </style:style>
    <style:style style:name="P225" style:family="paragraph" style:parent-style-name="Standard">
      <style:text-properties officeooo:rsid="011e0b29" officeooo:paragraph-rsid="01212211"/>
    </style:style>
    <style:style style:name="P226" style:family="paragraph" style:parent-style-name="Standard">
      <style:text-properties officeooo:rsid="011e0b29" officeooo:paragraph-rsid="01ebd1bb"/>
    </style:style>
    <style:style style:name="P227" style:family="paragraph" style:parent-style-name="Standard">
      <style:text-properties officeooo:rsid="011b3104" officeooo:paragraph-rsid="01e9faac"/>
    </style:style>
    <style:style style:name="P228" style:family="paragraph" style:parent-style-name="Standard">
      <style:text-properties officeooo:rsid="01ebd1bb" officeooo:paragraph-rsid="01ebd1bb"/>
    </style:style>
    <style:style style:name="P229" style:family="paragraph" style:parent-style-name="Standard">
      <style:text-properties fo:font-weight="normal" officeooo:rsid="01fb52c4" officeooo:paragraph-rsid="01fb52c4" style:font-weight-asian="normal" style:font-weight-complex="normal"/>
    </style:style>
    <style:style style:name="P230" style:family="paragraph" style:parent-style-name="Standard">
      <style:text-properties fo:font-weight="normal" officeooo:rsid="01ebd1bb" officeooo:paragraph-rsid="01ee5f14" style:font-weight-asian="normal" style:font-weight-complex="normal"/>
    </style:style>
    <style:style style:name="P231" style:family="paragraph" style:parent-style-name="Standard">
      <style:text-properties officeooo:paragraph-rsid="01ee5f14"/>
    </style:style>
    <style:style style:name="P232"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Noto Serif" fo:font-size="11pt" fo:font-weight="normal" officeooo:paragraph-rsid="01fc8117" style:font-size-asian="12pt" style:font-name-complex="Arial1" style:font-size-complex="12pt"/>
    </style:style>
    <style:style style:name="P233"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Noto Serif" fo:font-size="11pt" fo:font-weight="normal" officeooo:paragraph-rsid="01fc8117" style:font-size-asian="12pt" style:font-name-complex="Arial1" style:font-size-complex="12pt"/>
    </style:style>
    <style:style style:name="P234" style:family="paragraph" style:parent-style-name="Standard">
      <style:text-properties officeooo:paragraph-rsid="01fc8117"/>
    </style:style>
    <style:style style:name="P235" style:family="paragraph" style:parent-style-name="List_20_Paragraph" style:list-style-name="L6"/>
    <style:style style:name="P236" style:family="paragraph" style:parent-style-name="List_20_Paragraph" style:list-style-name="L6">
      <style:text-properties officeooo:paragraph-rsid="01f04e4a"/>
    </style:style>
    <style:style style:name="P237" style:family="paragraph" style:parent-style-name="Heading_20_3">
      <style:paragraph-properties fo:break-before="page"/>
    </style:style>
    <style:style style:name="P238" style:family="paragraph" style:parent-style-name="Table_20_Header">
      <style:text-properties officeooo:paragraph-rsid="01c35ba4"/>
    </style:style>
    <style:style style:name="P239" style:family="paragraph" style:parent-style-name="Table_20_Header">
      <style:paragraph-properties fo:text-align="center" style:justify-single-word="false"/>
      <style:text-properties officeooo:rsid="01c35ba4" officeooo:paragraph-rsid="01c35ba4"/>
    </style:style>
    <style:style style:name="P240" style:family="paragraph" style:parent-style-name="Table_20_Header">
      <style:paragraph-properties fo:text-align="center" style:justify-single-word="false"/>
      <style:text-properties officeooo:rsid="01ca7f6e" officeooo:paragraph-rsid="01ca7f6e"/>
    </style:style>
    <style:style style:name="P241" style:family="paragraph" style:parent-style-name="Table_20_Header">
      <style:text-properties officeooo:rsid="01ebd1bb" officeooo:paragraph-rsid="01ebd1bb"/>
    </style:style>
    <style:style style:name="P242" style:family="paragraph" style:parent-style-name="Table_20_Contents">
      <style:text-properties officeooo:rsid="01c35ba4" officeooo:paragraph-rsid="01c35ba4"/>
    </style:style>
    <style:style style:name="P243" style:family="paragraph" style:parent-style-name="Table_20_Contents">
      <style:paragraph-properties fo:text-align="center" style:justify-single-word="false"/>
      <style:text-properties officeooo:rsid="01c35ba4" officeooo:paragraph-rsid="01c35ba4"/>
    </style:style>
    <style:style style:name="P244" style:family="paragraph" style:parent-style-name="Table_20_Contents">
      <style:paragraph-properties fo:text-align="center" style:justify-single-word="false"/>
      <style:text-properties officeooo:rsid="01ca7f6e" officeooo:paragraph-rsid="01ca7f6e"/>
    </style:style>
    <style:style style:name="P245" style:family="paragraph" style:parent-style-name="Table_20_Contents">
      <style:text-properties officeooo:rsid="01c87c41" officeooo:paragraph-rsid="01c87c41"/>
    </style:style>
    <style:style style:name="P246" style:family="paragraph" style:parent-style-name="Standard">
      <style:text-properties officeooo:rsid="011e0b29" officeooo:paragraph-rsid="01c35ba4"/>
    </style:style>
    <style:style style:name="P247" style:family="paragraph" style:parent-style-name="Table_20_Contents">
      <style:text-properties officeooo:rsid="01c6125d" officeooo:paragraph-rsid="01c6125d"/>
    </style:style>
    <style:style style:name="P248" style:family="paragraph" style:parent-style-name="Table_20_Contents">
      <style:paragraph-properties fo:text-align="center" style:justify-single-word="false"/>
      <style:text-properties officeooo:rsid="01c7a599" officeooo:paragraph-rsid="01c7a599"/>
    </style:style>
    <style:style style:name="P249" style:family="paragraph" style:parent-style-name="Table_20_Contents">
      <style:text-properties officeooo:rsid="01c6125d" officeooo:paragraph-rsid="01c7a599"/>
    </style:style>
    <style:style style:name="P250" style:family="paragraph" style:parent-style-name="Table_20_Contents">
      <style:text-properties officeooo:rsid="01c6abcc" officeooo:paragraph-rsid="01c6abcc"/>
    </style:style>
    <style:style style:name="P251" style:family="paragraph" style:parent-style-name="Table_20_Contents">
      <style:text-properties officeooo:rsid="01c6abcc" officeooo:paragraph-rsid="01c7a599"/>
    </style:style>
    <style:style style:name="P252" style:family="paragraph" style:parent-style-name="Table_20_Contents">
      <style:text-properties officeooo:rsid="01c78c2d" officeooo:paragraph-rsid="01c7a599"/>
    </style:style>
    <style:style style:name="P253" style:family="paragraph" style:parent-style-name="Table_20_Contents">
      <style:text-properties officeooo:rsid="01c6125d" officeooo:paragraph-rsid="01c78c2d"/>
    </style:style>
    <style:style style:name="P254" style:family="paragraph" style:parent-style-name="Table_20_Contents">
      <style:text-properties officeooo:rsid="01c6125d" officeooo:paragraph-rsid="01ca7f6e"/>
    </style:style>
    <style:style style:name="P255" style:family="paragraph" style:parent-style-name="Table_20_Header">
      <style:text-properties officeooo:paragraph-rsid="01c6125d"/>
    </style:style>
    <style:style style:name="P256" style:family="paragraph" style:parent-style-name="Table_20_Header">
      <style:paragraph-properties fo:text-align="center" style:justify-single-word="false"/>
      <style:text-properties officeooo:rsid="01c35ba4" officeooo:paragraph-rsid="01c6125d"/>
    </style:style>
    <style:style style:name="P257" style:family="paragraph" style:parent-style-name="Table_20_Contents">
      <style:text-properties officeooo:rsid="01c7a599" officeooo:paragraph-rsid="01c7a599"/>
    </style:style>
    <style:style style:name="P258" style:family="paragraph" style:parent-style-name="Standard">
      <style:text-properties officeooo:rsid="011e0b29" officeooo:paragraph-rsid="01c6125d"/>
    </style:style>
    <style:style style:name="P259" style:family="paragraph" style:parent-style-name="Table_20_Header">
      <style:text-properties officeooo:paragraph-rsid="01ca7f6e"/>
    </style:style>
    <style:style style:name="P260" style:family="paragraph" style:parent-style-name="Table_20_Header">
      <style:paragraph-properties fo:text-align="center" style:justify-single-word="false"/>
      <style:text-properties officeooo:rsid="01c35ba4" officeooo:paragraph-rsid="01ca7f6e"/>
    </style:style>
    <style:style style:name="P261" style:family="paragraph" style:parent-style-name="Table_20_Contents">
      <style:text-properties officeooo:rsid="01ca7f6e" officeooo:paragraph-rsid="01ca7f6e"/>
    </style:style>
    <style:style style:name="P262" style:family="paragraph" style:parent-style-name="Table_20_Contents">
      <style:paragraph-properties fo:text-align="center" style:justify-single-word="false"/>
      <style:text-properties officeooo:rsid="01e9faac" officeooo:paragraph-rsid="01e9faac"/>
    </style:style>
    <style:style style:name="P263" style:family="paragraph" style:parent-style-name="Table_20_Contents">
      <style:text-properties officeooo:rsid="01c7a599" officeooo:paragraph-rsid="01ca7f6e"/>
    </style:style>
    <style:style style:name="P264" style:family="paragraph" style:parent-style-name="Table_20_Contents">
      <style:text-properties officeooo:rsid="01c6abcc" officeooo:paragraph-rsid="01e9faac"/>
    </style:style>
    <style:style style:name="P265" style:family="paragraph" style:parent-style-name="Standard">
      <style:text-properties officeooo:rsid="01ca7f6e" officeooo:paragraph-rsid="01ca7f6e"/>
    </style:style>
    <style:style style:name="P266" style:family="paragraph" style:parent-style-name="Heading_20_1">
      <style:paragraph-properties fo:break-before="page"/>
      <style:text-properties officeooo:paragraph-rsid="012789ed"/>
    </style:style>
    <style:style style:name="P267" style:family="paragraph" style:parent-style-name="Standard">
      <style:text-properties officeooo:rsid="00e9bb14" officeooo:paragraph-rsid="012789ed"/>
    </style:style>
    <style:style style:name="P268" style:family="paragraph" style:parent-style-name="Standard">
      <style:text-properties officeooo:rsid="00f22a02" officeooo:paragraph-rsid="012789ed"/>
    </style:style>
    <style:style style:name="P269" style:family="paragraph" style:parent-style-name="Heading_20_2">
      <style:text-properties officeooo:paragraph-rsid="012789ed"/>
    </style:style>
    <style:style style:name="P270" style:family="paragraph" style:parent-style-name="Standard">
      <style:text-properties officeooo:rsid="00f2865b" officeooo:paragraph-rsid="012789ed"/>
    </style:style>
    <style:style style:name="P271" style:family="paragraph" style:parent-style-name="Heading_20_2">
      <style:paragraph-properties fo:break-before="page"/>
      <style:text-properties officeooo:paragraph-rsid="012789ed"/>
    </style:style>
    <style:style style:name="P272" style:family="paragraph" style:parent-style-name="Standard">
      <style:text-properties officeooo:paragraph-rsid="019c473e"/>
    </style:style>
    <style:style style:name="P273" style:family="paragraph" style:parent-style-name="Heading_20_2">
      <style:text-properties officeooo:paragraph-rsid="019c473e"/>
    </style:style>
    <style:style style:name="P274" style:family="paragraph" style:parent-style-name="Standard">
      <style:text-properties officeooo:rsid="01daf459" officeooo:paragraph-rsid="01daf459"/>
    </style:style>
    <style:style style:name="P275" style:family="paragraph" style:parent-style-name="Standard">
      <style:text-properties officeooo:paragraph-rsid="01daf459"/>
    </style:style>
    <style:style style:name="P276" style:family="paragraph" style:parent-style-name="Table_20_Header">
      <style:text-properties officeooo:rsid="01e3c922" officeooo:paragraph-rsid="01e3c922"/>
    </style:style>
    <style:style style:name="P277" style:family="paragraph" style:parent-style-name="Table_20_Contents">
      <style:text-properties officeooo:rsid="01daf459" officeooo:paragraph-rsid="01daf459"/>
    </style:style>
    <style:style style:name="P278" style:family="paragraph" style:parent-style-name="Table_20_Contents">
      <style:text-properties officeooo:rsid="01daabce" officeooo:paragraph-rsid="01daabce"/>
    </style:style>
    <style:style style:name="P279" style:family="paragraph" style:parent-style-name="Standard">
      <style:text-properties officeooo:paragraph-rsid="019f63fe"/>
    </style:style>
    <style:style style:name="P280" style:family="paragraph" style:parent-style-name="Standard">
      <style:text-properties officeooo:rsid="019c473e" officeooo:paragraph-rsid="019c473e"/>
    </style:style>
    <style:style style:name="P281" style:family="paragraph" style:parent-style-name="List_20_Paragraph" style:list-style-name="L7"/>
    <style:style style:name="P282" style:family="paragraph" style:parent-style-name="Heading_20_2">
      <style:text-properties officeooo:paragraph-rsid="01f7ba86"/>
    </style:style>
    <style:style style:name="P283" style:family="paragraph" style:parent-style-name="Standard">
      <style:text-properties officeooo:rsid="01f7ba86" officeooo:paragraph-rsid="01f7ba86"/>
    </style:style>
    <style:style style:name="P284" style:family="paragraph" style:parent-style-name="Standard">
      <style:paragraph-properties fo:text-align="left" style:justify-single-word="false"/>
    </style:style>
    <style:style style:name="P285" style:family="paragraph" style:parent-style-name="List_20_Paragraph" style:list-style-name="L8"/>
    <style:style style:name="P286" style:family="paragraph" style:parent-style-name="List_20_Paragraph" style:list-style-name="L8">
      <style:text-properties officeooo:rsid="018c19fc" officeooo:paragraph-rsid="018c19fc"/>
    </style:style>
    <style:style style:name="P287" style:family="paragraph" style:parent-style-name="Standard">
      <style:text-properties officeooo:paragraph-rsid="01f76d36"/>
    </style:style>
    <style:style style:name="P288" style:family="paragraph" style:parent-style-name="Standard">
      <style:text-properties fo:font-style="italic" officeooo:paragraph-rsid="01f76d36" style:font-style-asian="italic" style:font-style-complex="italic"/>
    </style:style>
    <style:style style:name="P289" style:family="paragraph" style:parent-style-name="Standard">
      <style:text-properties officeooo:paragraph-rsid="0123ce0b"/>
    </style:style>
    <style:style style:name="P290" style:family="paragraph" style:parent-style-name="Standard">
      <style:text-properties fo:font-style="italic" style:font-style-asian="italic" style:font-style-complex="italic"/>
    </style:style>
    <style:style style:name="P291" style:family="paragraph" style:parent-style-name="Standard">
      <style:text-properties officeooo:rsid="01902a68"/>
    </style:style>
    <style:style style:name="T1" style:family="text">
      <style:text-properties officeooo:rsid="017c4ffd"/>
    </style:style>
    <style:style style:name="T2" style:family="text">
      <style:text-properties officeooo:rsid="0071b42a"/>
    </style:style>
    <style:style style:name="T3" style:family="text">
      <style:text-properties fo:font-weight="bold" style:font-weight-asian="bold" style:font-weight-complex="bold"/>
    </style:style>
    <style:style style:name="T4" style:family="text">
      <style:text-properties officeooo:rsid="02183ad5"/>
    </style:style>
    <style:style style:name="T5" style:family="text">
      <style:text-properties fo:font-weight="bold" officeooo:rsid="0104135c" style:font-weight-asian="bold" style:font-weight-complex="bold"/>
    </style:style>
    <style:style style:name="T6" style:family="text">
      <style:text-properties officeooo:rsid="01def656"/>
    </style:style>
    <style:style style:name="T7" style:family="text">
      <style:text-properties officeooo:rsid="01e3c922"/>
    </style:style>
    <style:style style:name="T8" style:family="text">
      <style:text-properties officeooo:rsid="01e0a987"/>
    </style:style>
    <style:style style:name="T9" style:family="text">
      <style:text-properties officeooo:rsid="01f4d272"/>
    </style:style>
    <style:style style:name="T10" style:family="text">
      <style:text-properties fo:font-weight="bold" officeooo:rsid="00a87f7e" style:font-weight-asian="bold" style:font-weight-complex="bold"/>
    </style:style>
    <style:style style:name="T11" style:family="text">
      <style:text-properties officeooo:rsid="01e800a5"/>
    </style:style>
    <style:style style:name="T12" style:family="text">
      <style:text-properties officeooo:rsid="01cfb6e2"/>
    </style:style>
    <style:style style:name="T13" style:family="text">
      <style:text-properties officeooo:rsid="01e87dcd"/>
    </style:style>
    <style:style style:name="T14" style:family="text">
      <style:text-properties officeooo:rsid="0139dde3"/>
    </style:style>
    <style:style style:name="T15" style:family="text">
      <style:text-properties officeooo:rsid="01fc890f"/>
    </style:style>
    <style:style style:name="T16" style:family="text">
      <style:text-properties officeooo:rsid="006d553f"/>
    </style:style>
    <style:style style:name="T17" style:family="text">
      <style:text-properties officeooo:rsid="00921ee3"/>
    </style:style>
    <style:style style:name="T18" style:family="text">
      <style:text-properties officeooo:rsid="011b3104"/>
    </style:style>
    <style:style style:name="T19" style:family="text">
      <style:text-properties officeooo:rsid="0104135c"/>
    </style:style>
    <style:style style:name="T20" style:family="text">
      <style:text-properties officeooo:rsid="004170e7"/>
    </style:style>
    <style:style style:name="T21" style:family="text">
      <style:text-properties officeooo:rsid="00c6b19a"/>
    </style:style>
    <style:style style:name="T22" style:family="text">
      <style:text-properties officeooo:rsid="00b8c62e"/>
    </style:style>
    <style:style style:name="T23" style:family="text">
      <style:text-properties officeooo:rsid="00d00e52"/>
    </style:style>
    <style:style style:name="T24" style:family="text">
      <style:text-properties officeooo:rsid="00d1899e"/>
    </style:style>
    <style:style style:name="T25" style:family="text">
      <style:text-properties officeooo:rsid="0110a74e"/>
    </style:style>
    <style:style style:name="T26" style:family="text">
      <style:text-properties officeooo:rsid="00ca99e7"/>
    </style:style>
    <style:style style:name="T27" style:family="text">
      <style:text-properties fo:font-weight="bold" officeooo:rsid="0127a33f" style:font-weight-asian="bold" style:font-weight-complex="bold"/>
    </style:style>
    <style:style style:name="T28" style:family="text">
      <style:text-properties officeooo:rsid="0127a33f"/>
    </style:style>
    <style:style style:name="T29" style:family="text">
      <style:text-properties officeooo:rsid="00b3bc3d"/>
    </style:style>
    <style:style style:name="T30" style:family="text">
      <style:text-properties officeooo:rsid="01072a7f"/>
    </style:style>
    <style:style style:name="T31" style:family="text">
      <style:text-properties officeooo:rsid="00ce2b17"/>
    </style:style>
    <style:style style:name="T32" style:family="text">
      <style:text-properties officeooo:rsid="00ccc4aa"/>
    </style:style>
    <style:style style:name="T33" style:family="text">
      <style:text-properties officeooo:rsid="012b3e17"/>
    </style:style>
    <style:style style:name="T34" style:family="text">
      <style:text-properties officeooo:rsid="00b565f7"/>
    </style:style>
    <style:style style:name="T35" style:family="text">
      <style:text-properties officeooo:rsid="006bacdb"/>
    </style:style>
    <style:style style:name="T36" style:family="text">
      <style:text-properties officeooo:rsid="00e9bb14"/>
    </style:style>
    <style:style style:name="T37" style:family="text">
      <style:text-properties officeooo:rsid="01e78e96"/>
    </style:style>
    <style:style style:name="T38" style:family="text">
      <style:text-properties officeooo:rsid="01297e03"/>
    </style:style>
    <style:style style:name="T39" style:family="text">
      <style:text-properties officeooo:rsid="01e5b977"/>
    </style:style>
    <style:style style:name="T40" style:family="text">
      <style:text-properties fo:font-weight="bold" officeooo:rsid="01af756d" style:font-weight-asian="bold" style:font-weight-complex="bold"/>
    </style:style>
    <style:style style:name="T41" style:family="text">
      <style:text-properties officeooo:rsid="01af756d"/>
    </style:style>
    <style:style style:name="T42" style:family="text">
      <style:text-properties officeooo:rsid="02116a0a"/>
    </style:style>
    <style:style style:name="T43" style:family="text">
      <style:text-properties officeooo:rsid="02156d29"/>
    </style:style>
    <style:style style:name="T44" style:family="text">
      <style:text-properties fo:font-weight="bold" officeooo:rsid="02037b48" style:font-weight-asian="bold" style:font-weight-complex="bold"/>
    </style:style>
    <style:style style:name="T45" style:family="text">
      <style:text-properties officeooo:rsid="02037b48"/>
    </style:style>
    <style:style style:name="T46" style:family="text">
      <style:text-properties officeooo:rsid="021997ef"/>
    </style:style>
    <style:style style:name="T47" style:family="text">
      <style:text-properties officeooo:rsid="02039a7f"/>
    </style:style>
    <style:style style:name="T48" style:family="text">
      <style:text-properties fo:font-weight="bold" officeooo:rsid="0211e772" style:font-weight-asian="bold" style:font-weight-complex="bold"/>
    </style:style>
    <style:style style:name="T49" style:family="text">
      <style:text-properties fo:font-weight="normal" officeooo:rsid="0201cdb5" style:font-weight-asian="normal" style:font-weight-complex="normal"/>
    </style:style>
    <style:style style:name="T50" style:family="text">
      <style:text-properties fo:font-weight="normal" officeooo:rsid="02197ae6" style:font-weight-asian="normal" style:font-weight-complex="normal"/>
    </style:style>
    <style:style style:name="T51" style:family="text">
      <style:text-properties fo:font-weight="normal" officeooo:rsid="02138e0f" style:font-weight-asian="normal" style:font-weight-complex="normal"/>
    </style:style>
    <style:style style:name="T52" style:family="text">
      <style:text-properties fo:font-weight="bold" officeooo:rsid="0207f7f5" style:font-weight-asian="bold" style:font-weight-complex="bold"/>
    </style:style>
    <style:style style:name="T53" style:family="text">
      <style:text-properties fo:font-weight="normal" officeooo:rsid="0207f7f5" style:font-weight-asian="normal" style:font-weight-complex="normal"/>
    </style:style>
    <style:style style:name="T54" style:family="text">
      <style:text-properties fo:font-weight="normal" officeooo:rsid="02084106" style:font-weight-asian="normal" style:font-weight-complex="normal"/>
    </style:style>
    <style:style style:name="T55" style:family="text">
      <style:text-properties officeooo:rsid="02128068"/>
    </style:style>
    <style:style style:name="T56" style:family="text">
      <style:text-properties fo:font-weight="bold" officeooo:rsid="021997ef" style:font-weight-asian="bold" style:font-weight-complex="bold"/>
    </style:style>
    <style:style style:name="T57" style:family="text">
      <style:text-properties officeooo:rsid="02138e0f"/>
    </style:style>
    <style:style style:name="T58" style:family="text">
      <style:text-properties fo:font-weight="normal" officeooo:rsid="021997ef" style:font-weight-asian="normal"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2235fcd" style:font-weight-asian="normal" style:font-weight-complex="normal"/>
    </style:style>
    <style:style style:name="T61" style:family="text">
      <style:text-properties fo:font-weight="bold" officeooo:rsid="02138e0f" style:font-weight-asian="bold" style:font-weight-complex="bold"/>
    </style:style>
    <style:style style:name="T62" style:family="text">
      <style:text-properties officeooo:rsid="0211e772"/>
    </style:style>
    <style:style style:name="T63" style:family="text">
      <style:text-properties fo:font-weight="bold" officeooo:rsid="02128068" style:font-weight-asian="bold" style:font-weight-complex="bold"/>
    </style:style>
    <style:style style:name="T64" style:family="text">
      <style:text-properties officeooo:rsid="0207f7f5"/>
    </style:style>
    <style:style style:name="T65" style:family="text">
      <style:text-properties fo:font-weight="bold" officeooo:rsid="0216bb27" style:font-weight-asian="bold" style:font-weight-complex="bold"/>
    </style:style>
    <style:style style:name="T66" style:family="text">
      <style:text-properties officeooo:rsid="0201cdb5"/>
    </style:style>
    <style:style style:name="T67" style:family="text">
      <style:text-properties officeooo:rsid="02197ae6"/>
    </style:style>
    <style:style style:name="T68" style:family="text">
      <style:text-properties fo:font-weight="bold" officeooo:rsid="021cbc0c" style:font-weight-asian="bold" style:font-weight-complex="bold"/>
    </style:style>
    <style:style style:name="T69" style:family="text">
      <style:text-properties officeooo:rsid="021ad817"/>
    </style:style>
    <style:style style:name="T70" style:family="text">
      <style:text-properties fo:font-weight="bold"/>
    </style:style>
    <style:style style:name="T71" style:family="text">
      <style:text-properties officeooo:rsid="022189ea"/>
    </style:style>
    <style:style style:name="T72" style:family="text">
      <style:text-properties officeooo:rsid="0225ba22"/>
    </style:style>
    <style:style style:name="T73" style:family="text">
      <style:text-properties officeooo:rsid="0159f948"/>
    </style:style>
    <style:style style:name="T74" style:family="text">
      <style:text-properties fo:font-weight="bold" officeooo:rsid="02235fcd" style:font-weight-asian="bold" style:font-weight-complex="bold"/>
    </style:style>
    <style:style style:name="T75" style:family="text">
      <style:text-properties fo:font-weight="normal" officeooo:rsid="0211e772" style:font-weight-asian="normal" style:font-weight-complex="normal"/>
    </style:style>
    <style:style style:name="T76" style:family="text">
      <style:text-properties fo:font-weight="normal" officeooo:rsid="022189ea" style:font-weight-asian="normal" style:font-weight-complex="normal"/>
    </style:style>
    <style:style style:name="T77" style:family="text">
      <style:text-properties officeooo:rsid="02235fcd"/>
    </style:style>
    <style:style style:name="T78" style:family="text">
      <style:text-properties fo:font-weight="normal" officeooo:rsid="015b2edc" style:font-weight-asian="normal" style:font-weight-complex="normal"/>
    </style:style>
    <style:style style:name="T79" style:family="text">
      <style:text-properties fo:font-weight="bold" officeooo:rsid="022189ea" style:font-weight-asian="bold" style:font-weight-complex="bold"/>
    </style:style>
    <style:style style:name="T80" style:family="text">
      <style:text-properties fo:font-weight="bold" officeooo:rsid="0226b499" style:font-weight-asian="bold" style:font-weight-complex="bold"/>
    </style:style>
    <style:style style:name="T81" style:family="text">
      <style:text-properties officeooo:rsid="0226b499"/>
    </style:style>
    <style:style style:name="T82" style:family="text">
      <style:text-properties officeooo:rsid="0228ab9e"/>
    </style:style>
    <style:style style:name="T83" style:family="text">
      <style:text-properties officeooo:rsid="022884f8"/>
    </style:style>
    <style:style style:name="T84" style:family="text">
      <style:text-properties fo:font-weight="bold" officeooo:rsid="022884f8" style:font-weight-asian="bold" style:font-weight-complex="bold"/>
    </style:style>
    <style:style style:name="T85" style:family="text">
      <style:text-properties officeooo:rsid="022757a5"/>
    </style:style>
    <style:style style:name="T86" style:family="text">
      <style:text-properties officeooo:rsid="0207719f"/>
    </style:style>
    <style:style style:name="T87" style:family="text">
      <style:text-properties fo:font-weight="bold" officeooo:rsid="0201cdb5" style:font-weight-asian="bold" style:font-weight-complex="bold"/>
    </style:style>
    <style:style style:name="T88" style:family="text">
      <style:text-properties officeooo:rsid="020e1050"/>
    </style:style>
    <style:style style:name="T89" style:family="text">
      <style:text-properties officeooo:rsid="0209225e"/>
    </style:style>
    <style:style style:name="T90" style:family="text">
      <style:text-properties officeooo:rsid="020a979f"/>
    </style:style>
    <style:style style:name="T91" style:family="text">
      <style:text-properties fo:font-weight="normal" officeooo:rsid="02059233" style:font-weight-asian="normal" style:font-weight-complex="normal"/>
    </style:style>
    <style:style style:name="T92" style:family="text">
      <style:text-properties officeooo:rsid="013b6146"/>
    </style:style>
    <style:style style:name="T93" style:family="text">
      <style:text-properties officeooo:rsid="014b6f77"/>
    </style:style>
    <style:style style:name="T94" style:family="text">
      <style:text-properties officeooo:rsid="015530ac"/>
    </style:style>
    <style:style style:name="T95" style:family="text">
      <style:text-properties officeooo:rsid="01ab8e97"/>
    </style:style>
    <style:style style:name="T96" style:family="text">
      <style:text-properties officeooo:rsid="01ab8da1"/>
    </style:style>
    <style:style style:name="T97" style:family="text">
      <style:text-properties officeooo:rsid="01cdcd43"/>
    </style:style>
    <style:style style:name="T98" style:family="text">
      <style:text-properties officeooo:rsid="01766d40"/>
    </style:style>
    <style:style style:name="T99" style:family="text">
      <style:text-properties fo:font-weight="bold" officeooo:rsid="0157ba6e" style:font-weight-asian="bold" style:font-weight-complex="bold"/>
    </style:style>
    <style:style style:name="T100" style:family="text">
      <style:text-properties officeooo:rsid="0148ac44"/>
    </style:style>
    <style:style style:name="T101" style:family="text">
      <style:text-properties fo:font-weight="bold" officeooo:rsid="013cfc33" style:font-weight-asian="bold" style:font-weight-complex="bold"/>
    </style:style>
    <style:style style:name="T102" style:family="text">
      <style:text-properties officeooo:rsid="013cfc33"/>
    </style:style>
    <style:style style:name="T103" style:family="text">
      <style:text-properties officeooo:rsid="01a63b6f"/>
    </style:style>
    <style:style style:name="T104" style:family="text">
      <style:text-properties officeooo:rsid="01d36cea"/>
    </style:style>
    <style:style style:name="T105" style:family="text">
      <style:text-properties officeooo:rsid="0144037e"/>
    </style:style>
    <style:style style:name="T106" style:family="text">
      <style:text-properties officeooo:rsid="01434c57"/>
    </style:style>
    <style:style style:name="T107" style:family="text">
      <style:text-properties officeooo:rsid="020199af"/>
    </style:style>
    <style:style style:name="T108" style:family="text">
      <style:text-properties officeooo:rsid="014145a3"/>
    </style:style>
    <style:style style:name="T109" style:family="text">
      <style:text-properties officeooo:rsid="01d52328"/>
    </style:style>
    <style:style style:name="T110" style:family="text">
      <style:text-properties officeooo:rsid="013f71ff"/>
    </style:style>
    <style:style style:name="T111" style:family="text">
      <style:text-properties officeooo:rsid="01a9c8bb"/>
    </style:style>
    <style:style style:name="T112" style:family="text">
      <style:text-properties officeooo:rsid="01a911f0"/>
    </style:style>
    <style:style style:name="T113" style:family="text">
      <style:text-properties officeooo:rsid="0157ba6e"/>
    </style:style>
    <style:style style:name="T114" style:family="text">
      <style:text-properties officeooo:rsid="01405cf9"/>
    </style:style>
    <style:style style:name="T115" style:family="text">
      <style:text-properties fo:font-weight="normal" officeooo:rsid="01434c57" style:font-weight-asian="normal" style:font-weight-complex="normal"/>
    </style:style>
    <style:style style:name="T116" style:family="text">
      <style:text-properties officeooo:rsid="015e34d3"/>
    </style:style>
    <style:style style:name="T117" style:family="text">
      <style:text-properties fo:font-weight="bold" officeooo:rsid="01633829" style:font-weight-asian="bold" style:font-weight-complex="bold"/>
    </style:style>
    <style:style style:name="T118" style:family="text">
      <style:text-properties fo:font-weight="bold" officeooo:rsid="0177c544" style:font-weight-asian="bold" style:font-weight-complex="bold"/>
    </style:style>
    <style:style style:name="T119" style:family="text">
      <style:text-properties officeooo:rsid="01633829"/>
    </style:style>
    <style:style style:name="T120" style:family="text">
      <style:text-properties officeooo:rsid="01783f57"/>
    </style:style>
    <style:style style:name="T121" style:family="text">
      <style:text-properties officeooo:rsid="01608c61"/>
    </style:style>
    <style:style style:name="T122" style:family="text">
      <style:text-properties officeooo:rsid="015c1384"/>
    </style:style>
    <style:style style:name="T123" style:family="text">
      <style:text-properties officeooo:rsid="015bf31d"/>
    </style:style>
    <style:style style:name="T124" style:family="text">
      <style:text-properties officeooo:rsid="01d7d05a"/>
    </style:style>
    <style:style style:name="T125" style:family="text">
      <style:text-properties officeooo:rsid="01b26e41"/>
    </style:style>
    <style:style style:name="T126" style:family="text">
      <style:text-properties officeooo:rsid="015b2edc"/>
    </style:style>
    <style:style style:name="T127" style:family="text">
      <style:text-properties fo:font-weight="bold" officeooo:rsid="015e0bb9" style:font-weight-asian="bold" style:font-weight-complex="bold"/>
    </style:style>
    <style:style style:name="T128" style:family="text">
      <style:text-properties fo:font-weight="bold" officeooo:rsid="01637c57" style:font-weight-asian="bold" style:font-weight-complex="bold"/>
    </style:style>
    <style:style style:name="T129" style:family="text">
      <style:text-properties officeooo:rsid="0174db33"/>
    </style:style>
    <style:style style:name="T130" style:family="text">
      <style:text-properties officeooo:rsid="01738eff"/>
    </style:style>
    <style:style style:name="T131" style:family="text">
      <style:text-properties officeooo:rsid="017834a9"/>
    </style:style>
    <style:style style:name="T132" style:family="text">
      <style:text-properties officeooo:rsid="015e0bb9"/>
    </style:style>
    <style:style style:name="T133" style:family="text">
      <style:text-properties fo:font-weight="bold" officeooo:rsid="01657580" style:font-weight-asian="bold" style:font-weight-complex="bold"/>
    </style:style>
    <style:style style:name="T134" style:family="text">
      <style:text-properties officeooo:rsid="019935c4"/>
    </style:style>
    <style:style style:name="T135" style:family="text">
      <style:text-properties officeooo:rsid="0198b2aa"/>
    </style:style>
    <style:style style:name="T136" style:family="text">
      <style:text-properties officeooo:rsid="01b589aa"/>
    </style:style>
    <style:style style:name="T137" style:family="text">
      <style:text-properties officeooo:rsid="016a31e5"/>
    </style:style>
    <style:style style:name="T138" style:family="text">
      <style:text-properties officeooo:rsid="016849bf"/>
    </style:style>
    <style:style style:name="T139" style:family="text">
      <style:text-properties officeooo:rsid="016fb640"/>
    </style:style>
    <style:style style:name="T140" style:family="text">
      <style:text-properties officeooo:rsid="016a996d"/>
    </style:style>
    <style:style style:name="T141" style:family="text">
      <style:text-properties officeooo:rsid="016bdffd"/>
    </style:style>
    <style:style style:name="T142" style:family="text">
      <style:text-properties officeooo:rsid="0170ba8a"/>
    </style:style>
    <style:style style:name="T143" style:family="text">
      <style:text-properties officeooo:rsid="0197dbd1"/>
    </style:style>
    <style:style style:name="T144" style:family="text">
      <style:text-properties officeooo:rsid="01716fea"/>
    </style:style>
    <style:style style:name="T145" style:family="text">
      <style:text-properties officeooo:rsid="01734875"/>
    </style:style>
    <style:style style:name="T146" style:family="text">
      <style:text-properties officeooo:rsid="019732ab"/>
    </style:style>
    <style:style style:name="T147" style:family="text">
      <style:text-properties officeooo:rsid="017155ad"/>
    </style:style>
    <style:style style:name="T148" style:family="text">
      <style:text-properties officeooo:rsid="01bacd4e"/>
    </style:style>
    <style:style style:name="T149" style:family="text">
      <style:text-properties officeooo:rsid="017cc684"/>
    </style:style>
    <style:style style:name="T150" style:family="text">
      <style:text-properties officeooo:rsid="0124f932"/>
    </style:style>
    <style:style style:name="T151" style:family="text">
      <style:text-properties officeooo:rsid="01bf34c2"/>
    </style:style>
    <style:style style:name="T152" style:family="text">
      <style:text-properties fo:font-weight="bold" officeooo:rsid="01173f79" style:font-weight-asian="bold" style:font-weight-complex="bold"/>
    </style:style>
    <style:style style:name="T153" style:family="text">
      <style:text-properties officeooo:rsid="01fb52c4"/>
    </style:style>
    <style:style style:name="T154" style:family="text">
      <style:text-properties fo:font-weight="bold" officeooo:rsid="0124f932" style:font-weight-asian="bold" style:font-weight-complex="bold"/>
    </style:style>
    <style:style style:name="T155" style:family="text">
      <style:text-properties officeooo:rsid="0124ef49"/>
    </style:style>
    <style:style style:name="T156" style:family="text">
      <style:text-properties officeooo:rsid="011d1ff8"/>
    </style:style>
    <style:style style:name="T157" style:family="text">
      <style:text-properties fo:font-weight="normal" officeooo:rsid="01ebd1bb" style:font-weight-asian="normal" style:font-weight-complex="normal"/>
    </style:style>
    <style:style style:name="T158" style:family="text">
      <style:text-properties fo:font-weight="bold" officeooo:rsid="01ebd1bb" style:font-weight-asian="bold" style:font-weight-complex="bold"/>
    </style:style>
    <style:style style:name="T159" style:family="text">
      <style:text-properties officeooo:rsid="01ebd1bb"/>
    </style:style>
    <style:style style:name="T160" style:family="text">
      <style:text-properties officeooo:rsid="01fc8117"/>
    </style:style>
    <style:style style:name="T161" style:family="text">
      <style:text-properties officeooo:rsid="01f04e4a"/>
    </style:style>
    <style:style style:name="T162" style:family="text">
      <style:text-properties officeooo:rsid="01e9faac"/>
    </style:style>
    <style:style style:name="T163" style:family="text">
      <style:text-properties officeooo:rsid="01fe05bd"/>
    </style:style>
    <style:style style:name="T164" style:family="text">
      <style:text-properties officeooo:rsid="01fd73b3"/>
    </style:style>
    <style:style style:name="T165" style:family="text">
      <style:text-properties officeooo:rsid="01ca7f6e"/>
    </style:style>
    <style:style style:name="T166" style:family="text">
      <style:text-properties officeooo:rsid="01c6abcc"/>
    </style:style>
    <style:style style:name="T167" style:family="text">
      <style:text-properties officeooo:rsid="012789ed"/>
    </style:style>
    <style:style style:name="T168" style:family="text">
      <style:text-properties officeooo:rsid="0108eef9"/>
    </style:style>
    <style:style style:name="T169" style:family="text">
      <style:text-properties officeooo:rsid="010d918c"/>
    </style:style>
    <style:style style:name="T170" style:family="text">
      <style:text-properties officeooo:rsid="00f2865b"/>
    </style:style>
    <style:style style:name="T171" style:family="text">
      <style:text-properties officeooo:rsid="00f44568"/>
    </style:style>
    <style:style style:name="T172" style:family="text">
      <style:text-properties officeooo:rsid="00ee0f78"/>
    </style:style>
    <style:style style:name="T173" style:family="text">
      <style:text-properties officeooo:rsid="010d7baa"/>
    </style:style>
    <style:style style:name="T174" style:family="text">
      <style:text-properties officeooo:rsid="01380cb9"/>
    </style:style>
    <style:style style:name="T175" style:family="text">
      <style:text-properties officeooo:rsid="010c03e8"/>
    </style:style>
    <style:style style:name="T176" style:family="text">
      <style:text-properties officeooo:rsid="0049c165"/>
    </style:style>
    <style:style style:name="T177" style:family="text">
      <style:text-properties officeooo:rsid="0104f98a"/>
    </style:style>
    <style:style style:name="T178" style:family="text">
      <style:text-properties officeooo:rsid="0105c84a"/>
    </style:style>
    <style:style style:name="T179" style:family="text">
      <style:text-properties fo:font-style="italic" style:font-style-asian="italic" style:font-style-complex="italic"/>
    </style:style>
    <style:style style:name="T180" style:family="text">
      <style:text-properties fo:font-style="italic" officeooo:rsid="0123ce0b" style:font-style-asian="italic" style:font-style-complex="italic"/>
    </style:style>
    <style:style style:name="T181" style:family="text">
      <style:text-properties officeooo:rsid="01daf459"/>
    </style:style>
    <style:style style:name="T182" style:family="text">
      <style:text-properties officeooo:rsid="012243b4"/>
    </style:style>
    <style:style style:name="T183" style:family="text">
      <style:text-properties officeooo:rsid="01f76d36"/>
    </style:style>
    <style:style style:name="T184" style:family="text">
      <style:text-properties officeooo:rsid="018163c9"/>
    </style:style>
    <style:style style:name="T185" style:family="text">
      <style:text-properties fo:font-weight="bold" officeooo:rsid="01f76d36" style:font-weight-asian="bold" style:font-weight-complex="bold"/>
    </style:style>
    <style:style style:name="T186" style:family="text">
      <style:text-properties officeooo:rsid="01f7ba86"/>
    </style:style>
    <style:style style:name="T187" style:family="text">
      <style:text-properties fo:font-style="italic" officeooo:rsid="01f76d36" style:font-style-asian="italic" style:font-style-complex="italic"/>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Kapitel 1: <text:span text:style-name="T1">Heldenerschaffung</text:span></text:p>
        <text:p text:style-name="P2">Natürlich ist dein Charakter für dich das Zentrum des Spiels. Vermutlich hast du schon ein paar konkrete Vorstellungen und Ideen, die du gerne umsetzen möchtest.</text:p>
        <text:p text:style-name="P2">Also lass uns keine Zeit verschwenden. <text:span text:style-name="T2">Erschaffen wir deinen Helden!</text:span></text:p>
        <text:p text:style-name="Standard"/>
        <table:table table:name="Table2" table:style-name="Table2">
          <table:table-column table:style-name="Table2.A"/>
          <table:table-row>
            <table:table-cell table:style-name="Table2.A1" office:value-type="string">
              <text:list xml:id="list2225592444" text:style-name="L1">
                <text:list-item>
                  <text:p text:style-name="P3"><text:span text:style-name="T3">Klasse</text:span>: <text:span text:style-name="T4">Wähle eine Klasse. Du startest mit Stufe 1 und darfst entsprechend ein Bronzetalent der Klasse auswählen.</text:span></text:p>
                </text:list-item>
                <text:list-item>
                  <text:p text:style-name="P4"><text:span text:style-name="T5">Fertigkeiten</text:span>: <text:span text:style-name="T6">Verteil folgende Werte auf deine Fertigkeiten: 1</text:span><text:span text:style-name="T7">3</text:span><text:span text:style-name="T6">, 1</text:span><text:span text:style-name="T7">2</text:span><text:span text:style-name="T6">, 1</text:span><text:span text:style-name="T8">1</text:span><text:span text:style-name="T6">, 9, 8. Alle anderen Fertigkeiten starten auf 10.</text:span></text:p>
                </text:list-item>
                <text:list-item>
                  <text:p text:style-name="P5"><text:span text:style-name="T3">Spezialisierungen</text:span>: Wähle <text:span text:style-name="T9">3</text:span> Spezialisierungen.</text:p>
                </text:list-item>
                <text:list-item>
                  <text:p text:style-name="P6"><text:span text:style-name="T10">Merkmale</text:span>: Du startest mit:</text:p>
                </text:list-item>
              </text:list>
              <text:list text:style-name="L2">
                <text:list-item>
                  <text:list>
                    <text:list-item>
                      <text:p text:style-name="P7">AP: <text:span text:style-name="T11">6</text:span></text:p>
                    </text:list-item>
                    <text:list-item>
                      <text:p text:style-name="P7">LP: <text:span text:style-name="T11">4</text:span></text:p>
                    </text:list-item>
                    <text:list-item>
                      <text:p text:style-name="P8">SP: <text:span text:style-name="T12">3</text:span></text:p>
                    </text:list-item>
                    <text:list-item>
                      <text:p text:style-name="P7">EP: 0</text:p>
                    </text:list-item>
                    <text:list-item>
                      <text:p text:style-name="P7">Taler: <text:span text:style-name="T13">3W6</text:span></text:p>
                    </text:list-item>
                  </text:list>
                </text:list-item>
              </text:list>
              <text:list text:continue-list="list2225592444" text:style-name="L1">
                <text:list-item>
                  <text:p text:style-name="P9"><text:span text:style-name="T3">Optional, Vorteil</text:span>: <text:span text:style-name="T14">Wähle </text:span><text:span text:style-name="T9">1 oder maximal 2</text:span><text:span text:style-name="T14"> Vorteil</text:span><text:span text:style-name="T9">e</text:span><text:span text:style-name="T14">.</text:span></text:p>
                </text:list-item>
                <text:list-item>
                  <text:p text:style-name="P10"><text:span text:style-name="T10">Inventar</text:span>: <text:span text:style-name="T15">Sofern der Erzähler nichts anderes bestimmt, startest du mit 2 bis 3 Gegenständen die zu deinem Charakter passen und 3 Vorräten.</text:span></text:p>
                </text:list-item>
                <text:list-item>
                  <text:p text:style-name="P11"><text:span text:style-name="T10">Details</text:span>: <text:span text:style-name="T16">Gib deinem Charakter einen Namen, leg fest wo er herkommt, was ihn motiviert und beschreibe ein paar Details zu ihm (z.B. Geschlecht, Haarfarbe, </text:span><text:span text:style-name="T17">oder </text:span><text:span text:style-name="T16">Alter).</text:span></text:p>
                </text:list-item>
              </text:list>
            </table:table-cell>
          </table:table-row>
        </table:table>
        <text:p text:style-name="Standard"/>
        <text:p text:style-name="P12">Kapitel <text:span text:style-name="T18">x: </text:span><text:span text:style-name="T19">Fertigkeiten</text:span></text:p>
        <text:p text:style-name="P13"><text:span text:style-name="T19">Fertigkeiten</text:span><text:span text:style-name="T20"> verkörpern die Fähigkeiten deines Helden. </text:span><text:span text:style-name="T21">Sie zeigen was er kann und</text:span><text:span text:style-name="T20"> bilden die Basis für alle </text:span><text:span text:style-name="T22">seine </text:span><text:span text:style-name="T20">Proben.</text:span></text:p>
        <text:p text:style-name="P13"/>
        <text:section text:style-name="Sect2" text:name="Section5">
          <text:h text:style-name="P14" text:outline-level="2"><text:span text:style-name="T23">S</text:span>pezialisierungen</text:h>
          <text:p text:style-name="P15">Spezialisierungen verkörpern <text:span text:style-name="T24">Training in einem</text:span> bestimmten <text:span text:style-name="T25">Fachb</text:span>ereich <text:span text:style-name="T21">eine</text:span><text:span text:style-name="T19">r Fertigkeit</text:span><text:span text:style-name="T21">.</text:span></text:p>
          <text:p text:style-name="P16">Du erhältst +2 auf alle Proben, für die dein Held wenigstens eine passende <text:span text:style-name="T26">Spezialisierung</text:span> hat.</text:p>
          <text:p text:style-name="P16"/>
          <text:h text:style-name="P17" text:outline-level="2">Standard Fertigkeiten</text:h>
          <text:h text:style-name="P18" text:outline-level="3">Charisma</text:h>
          <text:p text:style-name="P19"><text:span text:style-name="T3">Spezialisierungen</text:span>: Etikette, Singen, Tanzen, Überreden, Verführen</text:p>
          <text:p text:style-name="P20"><text:span text:style-name="T27">Beschreibung</text:span><text:span text:style-name="T28">: </text:span>Charisma steht für Auftreten, Überzeugungskraft und den geschickten Umgang mit anderen Menschen.</text:p>
          <text:p text:style-name="P19"/>
          <text:h text:style-name="Heading_20_3" text:outline-level="3">Gerissenheit</text:h>
          <text:p text:style-name="P21"><text:span text:style-name="T3">Spezialisierungen</text:span>: <text:span text:style-name="T29">Fälschen, </text:span>Gassenwissen, Schleichen, <text:span text:style-name="T30">Schlösser</text:span><text:span text:style-name="T2"> knacken</text:span>, <text:span text:style-name="T29">Taschendiebstahl, Verkleiden</text:span></text:p>
          <text:p text:style-name="P22"><text:span text:style-name="T27">Beschreibung</text:span><text:span text:style-name="T28">: Gerissenheit steht für List, Heimlichkeit und die Fähigkeit, Hindernisse mit unkonventionellen Methoden zu überwinden.</text:span></text:p>
          <text:p text:style-name="P21"/>
          <text:h text:style-name="Heading_20_3" text:outline-level="3">Geschick</text:h>
          <text:p text:style-name="P21"><text:span text:style-name="T3">Spezialisierungen</text:span>: <text:span text:style-name="T29">Klettern, </text:span><text:span text:style-name="T21">Laufen, Springen, </text:span><text:span text:style-name="T31">Reiten</text:span></text:p>
          <text:p text:style-name="P21">Beschreibung: Geschick steht für Körperbeherrschung, Koordination und präzise Bewegungen.</text:p>
          <text:p text:style-name="P21"/>
          <text:h text:style-name="P23" text:outline-level="3">Intuition</text:h>
          <text:p text:style-name="P21"><text:span text:style-name="T3">Spezialisierungen</text:span>: <text:span text:style-name="T32">Empathie, Ermitteln, Gefahreninstinkt, Wahrnehmung</text:span></text:p>
          <text:p text:style-name="P21"><text:span text:style-name="T3">Beschreibung</text:span>: Intuition steht für Aufmerksamkeit, Menschenkenntnis und die Fähigkeit, Zusammenhänge und Gefahren zu erkennen.</text:p>
          <text:p text:style-name="P21"/>
          <text:h text:style-name="P24" text:outline-level="3">Kampf</text:h>
          <text:p text:style-name="P19"><text:span text:style-name="T3">Spezialisierungen</text:span>: <text:span text:style-name="T19">Axt</text:span><text:span text:style-name="T29">, </text:span>Armbrust, Bogen, Schwert, Degen, Waffenlos, <text:span text:style-name="T29">Geschütze</text:span></text:p>
          <text:p text:style-name="P19"><text:span text:style-name="T3">Beschreibung</text:span>: Kampf steht für den Umgang mit Waffen und die Fähigkeit, Gegner im Gefecht zu besiegen.</text:p>
          <text:p text:style-name="P19"/>
          <text:h text:style-name="Heading_20_3" text:outline-level="3">Klugheit</text:h>
          <text:p text:style-name="P21"><text:span text:style-name="T3">Spezialisierungen</text:span>: <text:span text:style-name="T33">Heraldik, </text:span><text:span text:style-name="T21">Geschichte, <text:s/>Jura, </text:span>Medizin, <text:span text:style-name="T33">Magiekunde</text:span></text:p>
          <text:p text:style-name="P21"><text:span text:style-name="T3">Beschreibung</text:span>: Klugheit steht für Wissen, Bildung und die Fähigkeit, Probleme durch Nachdenken und Fachkenntnis zu lösen.</text:p>
          <text:p text:style-name="P21"/>
          <text:h text:style-name="P25" text:outline-level="3">Kraft</text:h>
          <text:p text:style-name="P21"><text:span text:style-name="T3">Spezialisierungen</text:span>: <text:span text:style-name="T34">Ausdauer, <text:s/></text:span><text:span text:style-name="T35">Einschüchtern, </text:span><text:span text:style-name="T33">Kraftakte, </text:span><text:span text:style-name="T36">Schwimmen</text:span></text:p>
          <text:p text:style-name="P21"><text:span text:style-name="T3">Beschreibung</text:span>: Kraft steht für körperliche Stärke, Ausdauer und die Fähigkeit, Hindernisse mit Muskelkraft zu überwinden.</text:p>
          <text:p text:style-name="P21"/>
          <text:p text:style-name="P21"/>
          <text:p text:style-name="P21"/>
          <text:p text:style-name="P21"/>
          <text:h text:style-name="P25" text:outline-level="3"><text:soft-page-break/>Tapferkeit</text:h>
          <text:p text:style-name="P26"><text:span text:style-name="T3">Spezialisierungen</text:span>: <text:span text:style-name="T37">Mut, Selbstbeherrschung, Konzentration, Magieresistenz</text:span></text:p>
          <text:p text:style-name="P26"><text:span text:style-name="T3">Beschreibung</text:span>: Willenskraft steht für Mut, Selbstbeherrschung und die Fähigkeit, geistigen oder übernatürlichen Einflüssen zu widerstehen.</text:p>
          <text:p text:style-name="P21"/>
          <text:h text:style-name="Heading_20_3" text:outline-level="3">Zähigkeit</text:h>
          <text:p text:style-name="P21"><text:span text:style-name="T3">Spezialisierungen</text:span>: <text:span text:style-name="T38">Schild, </text:span><text:span text:style-name="T39">Lederrüstung, </text:span><text:span text:style-name="T38">Kettenhemd, </text:span><text:span text:style-name="T39">Plattenrüstung, Ohne Rüstung</text:span></text:p>
          <text:p text:style-name="P21"><text:span text:style-name="T3">Beschreibung</text:span>: Zähigkeit steht für körperliche Widerstandskraft und die Fähigkeit, Verletzungen, Erschöpfung und Strapazen zu überstehen.</text:p>
          <text:p text:style-name="Standard"/>
          <text:h text:style-name="Heading_20_3" text:outline-level="3">Zauberei</text:h>
          <text:p text:style-name="P27"><text:span text:style-name="T3">Spezialisierungen</text:span>: </text:p>
          <text:p text:style-name="Standard"><text:span text:style-name="T40">Beschreibung</text:span><text:span text:style-name="T41">: </text:span>Zauberei steht für die Beherrschung magischer Kräfte und die Fähigkeit, übernatürliche Effekte zu wirken.</text:p>
          <text:p text:style-name="P28"/>
          <text:p text:style-name="P28"/>
          <text:p text:style-name="P28"/>
          <text:p text:style-name="P28"/>
          <text:p text:style-name="P28"/>
          <text:p text:style-name="P28"/>
          <text:p text:style-name="P28"/>
          <text:p text:style-name="P28"/>
          <text:p text:style-name="P28"/>
          <text:p text:style-name="P28"/>
          <text:p text:style-name="P28"/>
        </text:section>
        <text:p text:style-name="P29"/>
        <text:p text:style-name="P30">Kapitel XX: <text:span text:style-name="T42">Klassen</text:span></text:p>
        <text:p text:style-name="P31"/>
        <table:table table:name="Table8" table:style-name="Table8">
          <table:table-column table:style-name="Table8.A"/>
          <table:table-column table:style-name="Table8.B"/>
          <table:table-row>
            <table:table-cell table:style-name="Table8.A1" office:value-type="string">
              <text:p text:style-name="P32">Stufe</text:p>
            </table:table-cell>
            <table:table-cell table:style-name="Table8.B1" office:value-type="string">
              <text:p text:style-name="P33">Verfügbare Talente</text:p>
            </table:table-cell>
          </table:table-row>
          <table:table-row>
            <table:table-cell table:style-name="Table8.A2" office:value-type="string">
              <text:p text:style-name="P34">1-<text:span text:style-name="T43">3</text:span></text:p>
            </table:table-cell>
            <table:table-cell table:style-name="Table8.B2" office:value-type="string">
              <text:p text:style-name="P35">Bronze</text:p>
            </table:table-cell>
          </table:table-row>
          <table:table-row>
            <table:table-cell table:style-name="Table8.A2" office:value-type="string">
              <text:p text:style-name="P36">4-6</text:p>
            </table:table-cell>
            <table:table-cell table:style-name="Table8.B2" office:value-type="string">
              <text:p text:style-name="P35">Bronze oder Silber</text:p>
            </table:table-cell>
          </table:table-row>
          <table:table-row>
            <table:table-cell table:style-name="Table8.A4" office:value-type="string">
              <text:p text:style-name="P36">7-9</text:p>
            </table:table-cell>
            <table:table-cell table:style-name="Table8.B4" office:value-type="string">
              <text:p text:style-name="P35">Bronze, Silber oder Gold</text:p>
            </table:table-cell>
          </table:table-row>
        </table:table>
        <text:p text:style-name="Standard"/>
        <text:h text:style-name="P37" text:outline-level="2">Krieger</text:h>
        <text:p text:style-name="P38">Krieger sind Experten für den Kampf. Ihre Talente erlauben ihnen besondere Manöver, die sie zu gefährlichen Duellanten, zähen Verteidigern oder brutalen Frontkämpfern machen.</text:p>
        <text:p text:style-name="P39"/>
        <text:h text:style-name="TalentHeader" text:outline-level="3">Bronze Talente</text:h>
        <text:p text:style-name="P40"><text:span text:style-name="T44">Blutrausch</text:span><text:span text:style-name="T45">: </text:span><text:span text:style-name="T46">Passiv. </text:span><text:span text:style-name="T45">Nachdem du einen Gegner ausgeschaltet hast, darfst du sofort eine </text:span><text:span text:style-name="T47">weitere</text:span><text:span text:style-name="T45"> Attacke ausführen.</text:span></text:p>
        <text:p text:style-name="P41"><text:span text:style-name="T48">Manöver</text:span><text:span text:style-name="T49">: </text:span><text:span text:style-name="T50">Aktion &amp; 1 AP. </text:span><text:span text:style-name="T51">Erhalte Vorteil auf eine Attacke oder Parade.</text:span></text:p>
        <text:p text:style-name="P41"><text:span text:style-name="T52">Provozieren</text:span><text:span text:style-name="T53">: </text:span><text:span text:style-name="T50">Aktion &amp; 1 AP. </text:span><text:span text:style-name="T51">Zieh</text:span><text:span text:style-name="T53"> </text:span><text:span text:style-name="T51">die </text:span><text:span text:style-name="T53">Aufmerksamkeit von bis zu </text:span><text:span text:style-name="T54">3</text:span><text:span text:style-name="T53"> Gegnern auf dich.</text:span></text:p>
        <text:p text:style-name="P42"><text:span text:style-name="T3">Taktiker</text:span>: 1 AP. Du erhältst einen Vorteil auf eine Probe die mit Strategie oder Taktik zu tun hat.</text:p>
        <text:p text:style-name="P43"><text:span text:style-name="T3">Zäh</text:span>: <text:span text:style-name="T46">Passiv. </text:span>+1 maximale LP. <text:span text:style-name="T55">Kann mehrfach gewählt werden.</text:span></text:p>
        <text:p text:style-name="P44"/>
        <text:h text:style-name="TalentHeader" text:outline-level="3">Silber Talente</text:h>
        <text:p text:style-name="P45"><text:span text:style-name="T3">Entwaffnen</text:span>: <text:span text:style-name="T50">Aktion &amp; 1 AP</text:span> vor deiner Attacke. Bei Erfolg entreißt du dem Gegner die Waffe, anstelle Schaden zu verursachen.</text:p>
        <text:p text:style-name="P43"><text:span text:style-name="T3">Kampfrausch </text:span><text:span text:style-name="T56">I</text:span>: <text:span text:style-name="T50">Aktion &amp; 1 AP.</text:span><text:span text:style-name="T57"> Führ</text:span><text:span text:style-name="T46">e</text:span><text:span text:style-name="T57"> 2 </text:span>Attacken aus.</text:p>
        <text:p text:style-name="P46"><text:span text:style-name="T3">Kampfsinn</text:span>: <text:span text:style-name="T46">Passiv. </text:span>Du erleidest erst ab der 3ten Parade einen Nachteil.</text:p>
        <text:p text:style-name="P45"><text:span text:style-name="T3">Konter</text:span>: <text:span text:style-name="T50">Aktion &amp; 1 AP</text:span> vor deiner Parade. Bei Erfolg wehrst du den Angriff ab und der Gegner erleidet 1 Schaden.</text:p>
        <text:p text:style-name="P47"><text:span text:style-name="T48">Sturmangriff</text:span>: <text:span text:style-name="T50">Aktion &amp; 1 AP. </text:span><text:span text:style-name="T58">Du kannst sprinten UND attackieren.</text:span></text:p>
        <text:p text:style-name="P48"/>
        <text:h text:style-name="TalentHeader" text:outline-level="3">Gold Talente</text:h>
        <text:p text:style-name="P49"><text:span text:style-name="T3">Kampfrausch II</text:span>: <text:span text:style-name="T59">Erfordert </text:span><text:span text:style-name="T60">Kampfrausch</text:span><text:span text:style-name="T51"> I</text:span><text:span text:style-name="T59">. </text:span><text:span text:style-name="T50">Aktion &amp; 1 AP. </text:span><text:span text:style-name="T57">Führ</text:span><text:span text:style-name="T46">e</text:span><text:span text:style-name="T57"> 3 </text:span>Attacken aus.</text:p>
        <text:p text:style-name="P46"><text:span text:style-name="T3">Kampfsinn </text:span><text:span text:style-name="T61">II</text:span>: <text:span text:style-name="T62">Erfordert </text:span><text:span text:style-name="T57">Kampfsinn I</text:span><text:span text:style-name="T62">. </text:span><text:span text:style-name="T46">Passiv. </text:span>Du erleidest erst ab der <text:span text:style-name="T57">4</text:span>ten Parade einen Nachteil.</text:p>
        <text:p text:style-name="P45"><text:span text:style-name="T63">Niederstrecken</text:span>: <text:span text:style-name="T46">2 </text:span><text:span text:style-name="T50">AP</text:span><text:span text:style-name="T57"> nach einer erfolgreichen Attacke. Du verursachst 1 extra Schaden.</text:span></text:p>
        <text:p text:style-name="P50"><text:soft-page-break/></text:p>
        <text:h text:style-name="Heading_20_2" text:outline-level="2">Schurke</text:h>
        <text:p text:style-name="P51">Schurken verlassen sich auf Geschick, List und Vorbereitung statt auf rohe Gewalt. Mit Tricks, Giften und Heimlichkeit überwinden sie Hindernisse, beschaffen Informationen und schlagen zu, wenn ihre Gegner es am wenigsten erwarten.</text:p>
        <text:p text:style-name="P51"/>
        <text:h text:style-name="P52" text:outline-level="3">Bronze Talente</text:h>
        <text:p text:style-name="P53"><text:span text:style-name="T3">Ablenken</text:span>: Aktion &amp; 1 AP. Lenke die Aufmerksamkeit von bis zu 3 Opfern auf ein anderes Ziel.</text:p>
        <text:p text:style-name="P54"><text:span text:style-name="T3">Expertise</text:span>: <text:span text:style-name="T64">1 AP. </text:span>Du erhältst einen Vorteil auf eine Gerissenheit-Probe.</text:p>
        <text:p text:style-name="P55"><text:span text:style-name="T65">Finesse</text:span><text:span text:style-name="T66">: </text:span><text:span text:style-name="T67">Aktion &amp; 1 AP. Du erhältst einen </text:span><text:span text:style-name="T51">Vorteil auf eine Attacke oder Parade.</text:span></text:p>
        <text:p text:style-name="P56"><text:span text:style-name="T3">Hinterhalt</text:span>: Passiv. Du verursachst +1 Schaden gegen überraschte oder abgelenkte Gegner.</text:p>
        <text:p text:style-name="P57"><text:span text:style-name="T3">Parkour</text:span>: <text:span text:style-name="T64">1 AP. </text:span>Du erhältst einen Vorteil auf eine Geschick-Probe.</text:p>
        <text:p text:style-name="P47"><text:span text:style-name="T3">Schnellziehen</text:span>: Passiv. Du kannst eine Waffe als freie Aktion ziehen.</text:p>
        <text:p text:style-name="Standard"/>
        <text:h text:style-name="P52" text:outline-level="3">Silber Talente</text:h>
        <text:p text:style-name="Standard"><text:span text:style-name="T3">Glück </text:span><text:span text:style-name="T68">I</text:span>: Passiv. +1 <text:span text:style-name="T69">maximale </text:span>SP.</text:p>
        <text:p text:style-name="Standard"><text:span text:style-name="T3">Katzenaugen</text:span>: Passiv. Du kannst im Dunkeln sehen.</text:p>
        <text:p text:style-name="Standard"><text:span text:style-name="T3">Krähenfüße</text:span>: Aktion &amp; 1 AP. Ein Bereich von 3 Metern wird zu schwierigem Gelände, bis die Krähenfüße entfernt werden.</text:p>
        <text:p text:style-name="Standard"><text:span text:style-name="T70">Narkotikum:</text:span> Aktion &amp; 1 AP. Nicht im Kampf einsetzbar. Das Opfer wird müde, muss brechen oder wird auf andere Weise außer Gefecht gesetzt. Reichweite 7 m (Dart) oder Berührung (vergiftete Nahrung).</text:p>
        <text:p text:style-name="Standard"><text:span text:style-name="T3">Rauchbombe</text:span>: Aktion &amp; 1 AP. Umstehende Personen sind für eine Runde geblendet und setzen ihren nächsten Zug aus.</text:p>
        <text:p text:style-name="Standard"><text:span text:style-name="T3">Wahrheitsserum</text:span>: Aktion &amp; 1 AP. Das Opfer wird gesprächig und leicht zu beeinflussen. Alle sozialen Proben gegen es erhalten einen Vorteil. Reichweite Berührung (vergiftete Nahrung).</text:p>
        <text:p text:style-name="Standard"/>
        <text:h text:style-name="P52" text:outline-level="3">Gold Talente</text:h>
        <text:p text:style-name="Standard"><text:span text:style-name="T3">Glück </text:span><text:span text:style-name="T68">II</text:span>: Passiv. +1 <text:span text:style-name="T69">maximale </text:span>SP.</text:p>
        <text:p text:style-name="Standard"><text:span text:style-name="T3">Mnemotoxin</text:span>: Aktion &amp; 1 AP. Nicht im Kampf einsetzbar. Das Opfer vergisst, was in den letzten 30 Minuten passiert ist. Reichweite 7m (Dart) oder Berührung (vergiftete Nahrung).</text:p>
        <text:p text:style-name="P58"><text:span text:style-name="T70">Schattentrank:</text:span> Aktion &amp; 1 AP. Du wirst unsichtbar. Der Effekt hält an, solange du dich unauffällig verhältst.</text:p>
        <text:p text:style-name="P59"/>
        <text:p text:style-name="P59"/>
        <text:p text:style-name="P59"/>
        <text:p text:style-name="P59"/>
        <text:p text:style-name="P59"/>
        <text:p text:style-name="P59"><text:soft-page-break/></text:p>
        <text:h text:style-name="Heading_20_2" text:outline-level="2"><text:span text:style-name="T71">Illusionist</text:span></text:h>
        <text:p text:style-name="P60">Illusionisten nutzen <text:span text:style-name="T72">Trugbilder</text:span>, <text:span text:style-name="T72">Mentalmagie</text:span> und Charisma, um andere zu täuschen und zu beeinflussen. Sie lösen Probleme mit List und Magie statt mit Schwert oder Muskelkraft.</text:p>
        <text:p text:style-name="P60"/>
        <text:h text:style-name="P61" text:outline-level="3">Bronze Talente</text:h>
        <text:p text:style-name="P62"><text:span text:style-name="T3">Botschaft*</text:span>: Aktion &amp; 1 AP. <text:span text:style-name="T73">Du sprichst ein paar Wörter (2 bis 3 Sätze), welche die Zielperson als Stimme in ihrem Kopf hört.</text:span></text:p>
        <text:p text:style-name="P63"><text:span text:style-name="T3">Faszinieren</text:span>: Aktion. Nicht im Kampf einsetzbar. Solange du sprichst, singst oder musizierst, richten Zuhörer ihre Aufmerksamkeit auf dich.</text:p>
        <text:p text:style-name="P63"><text:span text:style-name="T3">Gerüchteküche</text:span>: Einige Stunden. Der Erzähler beantwortet dir drei fragen zu lokalen Gerüchten.</text:p>
        <text:p text:style-name="P62"><text:span text:style-name="T3">Halluzination*</text:span>: Aktion &amp; 1 AP. Du erzeugst einen kurzlebigen illusionären Sinneseindruck (z.B. ein Windhauch oder ein paar gerufen Worte).</text:p>
        <text:p text:style-name="P62"><text:span text:style-name="T3">Inspirieren </text:span><text:span text:style-name="T74">I</text:span>: Aktion &amp; 1 AP. Ein Verbündeter erhält einen Vorteil auf seine nächste Probe. Verfällt nach maximal einer Stunde.</text:p>
        <text:p text:style-name="P62"><text:span text:style-name="T3">Silberzunge</text:span>: 1 AP. Du erhältst einen Vorteil auf eine Charisma Probe.</text:p>
        <text:p text:style-name="P64"/>
        <text:h text:style-name="P61" text:outline-level="3">Silber Talente</text:h>
        <text:p text:style-name="P65"><text:span text:style-name="T71">Inspirieren </text:span>II<text:span text:style-name="T59">: </text:span><text:span text:style-name="T75">Erfordert </text:span><text:span text:style-name="T59">Inspirieren I</text:span><text:span text:style-name="T75">. </text:span><text:span text:style-name="T59">Aktion &amp; 1 AP. Alle Verbündete in deiner Nähe erhalten einen Vorteil auf ihre nächste Probe. </text:span><text:span text:style-name="T76">Verfällt nach maximal einer Stunde.</text:span></text:p>
        <text:p text:style-name="P66">Illusion*<text:span text:style-name="T59">: Aktion &amp; 1 AP. Würfel auf Zauberei um eine Illusion zu erzeugen. Der SG hängt von der Komplexität ab. Eine </text:span><text:span text:style-name="T59">Tür tarnen ist normal, Bühnenbild für Theater ist schwer, Trugbild eines Schlosses extrem. Die Wirkung hält bis zu 3 Stunden.</text:span></text:p>
        <text:p text:style-name="P63"><text:span text:style-name="T3">Mimik*</text:span>: Aktion &amp; 1 AP. Du nimmst das aussehen und die Stimme einer anderen Person an. Hält für bis zu 3 Stunden.</text:p>
        <text:p text:style-name="P62"><text:span text:style-name="T74">Schlaf</text:span><text:span text:style-name="T3">*</text:span>: <text:span text:style-name="T59">Aktion &amp; 1 AP. Zauberei vs. Zähigkeit eines Lebewesens. Das Opfer schläft ein.</text:span></text:p>
        <text:p text:style-name="P67"><text:span text:style-name="T3">Telepathie*</text:span>: <text:span text:style-name="T71">Aktion &amp; 1 AP. </text:span>Der Erzähler beantwortet dir 3 Ja/Nein Fragen zu einer Person.</text:p>
        <text:p text:style-name="P63"><text:span text:style-name="T3">Traumbilder*</text:span>: Aktion &amp; 1 AP. Du dringst auf Distanz in den Traum einer Person ein um dich mit ihr zu unterhalten.</text:p>
        <text:p text:style-name="P68"/>
        <text:h text:style-name="P61" text:outline-level="3">Gold Talente</text:h>
        <text:p text:style-name="P65">Aura<text:span text:style-name="T59">: </text:span><text:span text:style-name="T76">Aktion &amp; 1 AP. </text:span><text:span text:style-name="T59">Du stärkst oder schwächst die Emotionen einer Gruppe (du kannst z.B. eine aufgebrachte Menge zur Randale aufstacheln oder beruhigen).</text:span></text:p>
        <text:p text:style-name="P66"><text:span text:style-name="T77">Freundschaft</text:span>*<text:span text:style-name="T59">: Aktion &amp; 1 AP. Zauberei vs. Zähigkeit einer Person. </text:span><text:span text:style-name="T78">Das Opfer möchte dein Freund sein und glaubt dir fast alles.</text:span></text:p>
        <text:p text:style-name="P69"><text:span text:style-name="T74">Unsichtbarkeit</text:span><text:span text:style-name="T79">*</text:span><text:span text:style-name="T71">: </text:span>Aktion &amp; 1 AP. <text:span text:style-name="T71">Selbst oder Berührung. Die Zielperson wird </text:span>unsichtbar. Der Effekt hält an, solange du dich unauffällig verhältst.</text:p>
        <text:p text:style-name="P70"/>
        <text:h text:style-name="P71" text:outline-level="2">Druide</text:h>
        <text:p text:style-name="P72">Druiden sind Hüter der Natur und Meister des Gestaltwandels. Sie sprechen mit Tieren, nutzen die Kräfte der Wildnis und nehmen selbst die Eigenschaften oder Gestalt von Bestien an.</text:p>
        <text:p text:style-name="P72"/>
        <text:h text:style-name="P73" text:outline-level="3">Bronze Talente</text:h>
        <text:p text:style-name="Standard"><text:span text:style-name="T70">Heilkräuter:</text:span> 5 Minuten &amp; Berührung. Die Zielperson erholt sich innerhalb der nächsten Stunden von 1 Schaden und wird von einfachen Krankheiten oder simplen Giften geheilt.</text:p>
        <text:p text:style-name="P74"><text:span text:style-name="T80">Jäger</text:span>: <text:span text:style-name="T64">1 AP. </text:span>Du erhältst einen Vorteil auf eine <text:span text:style-name="T81">Naturbezogene </text:span>Probe <text:span text:style-name="T81">(Jagen, Fallen Stellen, Wetter deuten, </text:span><text:span text:style-name="T82">etc.</text:span><text:span text:style-name="T81">).</text:span></text:p>
        <text:p text:style-name="P75"><text:span text:style-name="T3">Naturgespür</text:span>: Aktion &amp; 1 AP. Der Erzähler beantwortet dir 3 Fragen zur lokalen Umgebung.</text:p>
        <text:p text:style-name="Standard"><text:span text:style-name="T3">Tiersprache*</text:span>: Passiv. Tiere sind dir freundlich gesonnen, sofern sie keinen Grund haben dich anzugreifen, und du kannst dich mit ihnen unterhalten.</text:p>
        <text:p text:style-name="Standard"/>
        <text:h text:style-name="P73" text:outline-level="3">Silber Talente</text:h>
        <text:p text:style-name="P76">Dornenranken<text:span text:style-name="T59">*: Aktion &amp; 1 AP. Ein Bereich von 3 Metern wird zu schwierigem Gelände.</text:span></text:p>
        <text:p text:style-name="P77"><text:span text:style-name="T3">Pflanzenwuchs*</text:span>: Aktion &amp; 1 AP. Solange du dich konzentrierst wachsen, ranken oder formen sich P<text:span text:style-name="T83">f</text:span>lanzen nach deinem Willen (in langsam Schrittgeschwindigkeit).</text:p>
        <text:p text:style-name="P78"><text:span text:style-name="T79">T</text:span><text:span text:style-name="T3">iergestal</text:span><text:span text:style-name="T84">t</text:span><text:span text:style-name="T3"> I*</text:span><text:span text:style-name="T59">: Aktion &amp; 1 AP. Du verwandelst dich in ein Tier (min. Maus / max. Luchs).</text:span></text:p>
        <text:p text:style-name="P79"><text:span text:style-name="T3">Tierkontrolle</text:span>: Erfordert Tiersprache. Aktion &amp; 1 AP. <text:span text:style-name="T85">Du gibst einen Befehl den umstehende Tiere für die nächsten Minuten befolgen müssen.</text:span></text:p>
        <text:p text:style-name="P76">Wilde Gabe*<text:span text:style-name="T59">: Aktion, Berührung &amp; 1 AP. Zielperson erhält für eine Stunde eine Tierfähigkeit (z.B. Fischkiemen, Katzenaugen, oder Adlerklauen).</text:span></text:p>
        <text:p text:style-name="P80"/>
        <text:h text:style-name="P73" text:outline-level="3">Gold Talente</text:h>
        <text:p text:style-name="P42"><text:span text:style-name="T3">Nebelgestalt*</text:span>: Aktion &amp; 1 AP. Du verwandelst dich in Nebel.</text:p>
        <text:p text:style-name="P42"><text:span text:style-name="T79">T</text:span><text:span text:style-name="T3">iergestalt II*</text:span>: Aktion &amp; 1 AP. Du verwandelst dich in ein Tier (min. Fliege / max. Bär).</text:p>
        <text:p text:style-name="P42"><text:span text:style-name="T3">Wettermacht</text:span>: ca. 30 Minuten. Das Wetter verändert sich nach deinen Wünschen, solange die Veränderung in der Region grundsätzlich möglich ist.</text:p>
        <text:p text:style-name="P81"/>
        <text:h text:style-name="Heading_20_2" text:outline-level="2">Magier</text:h>
        <text:p text:style-name="P62"/>
        <text:p text:style-name="P82"/>
        <text:p text:style-name="P82"/>
        <text:p text:style-name="P82"/>
        <text:p text:style-name="P82"/>
        <text:p text:style-name="P83"/>
        <text:h text:style-name="P84" text:outline-level="3"><text:span text:style-name="T86">Taktik</text:span> 1 - 5</text:h>
        <text:p text:style-name="P85"><text:soft-page-break/>Das Ziel der folgenden Manöver muss dich sehen und hören können.</text:p>
        <text:p text:style-name="P86"><text:span text:style-name="T87">Standfest</text:span><text:span text:style-name="T3"> (1)</text:span>: Minions in deiner nähe erhalten +1 auf <text:span text:style-name="T88">Kampfproben und alle Verbündete erhalten einen Vorteil auf Moralproben.</text:span></text:p>
        <text:p text:style-name="P87"><text:span text:style-name="T3">Vorwärts! (2)</text:span>: Investiere 1 AP <text:span text:style-name="T89">und </text:span>deine<text:span text:style-name="T89"> Aktion</text:span>. <text:span text:style-name="T89">Verbündete können </text:span><text:span text:style-name="T90">sich in ihrer nächsten Runde 3 Meter extra bewegen und erhalten einen Vorteil auf Attacken.</text:span></text:p>
        <text:p text:style-name="P88"><text:span text:style-name="T3">Haltet die Linie! (2)</text:span>: Investiere 1 AP und deine Aktion. Verbündete erhalten <text:span text:style-name="T89">für eine Runde einen Vorteil auf Paraden.</text:span></text:p>
        <text:p text:style-name="P89"><text:span text:style-name="T3">Markieren (3)</text:span>: Investiere 1 AP und <text:span text:style-name="T89">d</text:span>eine Aktion, um ein Ziel für eine Runde zu markieren. Attacken gegen das markierte Ziel erhalten <text:span text:style-name="T88">einen </text:span>Vorteil.</text:p>
        <text:p text:style-name="P90"><text:span text:style-name="T3">Attacke! (3)</text:span>: Investiere 1 AP <text:span text:style-name="T86">und eine Aktion</text:span>. Ein Verbündeter darf sofort eine <text:span text:style-name="T86">Attacke ausführen.</text:span></text:p>
        <text:p text:style-name="P91"><text:span text:style-name="T91"/></text:p>
        <text:p text:style-name="P92"/>
        <text:p text:style-name="P92"/>
        <text:p text:style-name="P92"/>
        <text:p text:style-name="P92"/>
        <text:p text:style-name="P92"/>
        <text:p text:style-name="P93"/>
        <text:p text:style-name="P94">Kapitel <text:span text:style-name="T18">x: </text:span><text:span text:style-name="T92">Talente</text:span></text:p>
        <text:h text:style-name="P95" text:outline-level="2"><text:span text:style-name="T93">Allgemeine Talent</text:span><text:span text:style-name="T94">e</text:span></text:h>
        <text:section text:style-name="Sect3" text:name="Section7">
          <text:h text:style-name="P96" text:outline-level="3">Ausdauernd I - <text:span text:style-name="T95">V</text:span></text:h>
          <text:p text:style-name="P97"><text:span text:style-name="T3">Wirkung</text:span>: Du hast <text:span text:style-name="T96">+2</text:span> maximale AP.</text:p>
          <text:p text:style-name="P97"/>
          <text:h text:style-name="P98" text:outline-level="3">Glück I - <text:span text:style-name="T97">V</text:span></text:h>
          <text:p text:style-name="P97"><text:span text:style-name="T3">Wirkung</text:span>: <text:span text:style-name="T96">Du erhältst +1 maximale SP.</text:span></text:p>
          <text:p text:style-name="P97"/>
          <text:h text:style-name="P96" text:outline-level="3">Sprache <text:span text:style-name="T94">I - V</text:span></text:h>
          <text:p text:style-name="P97"><text:span text:style-name="T3">Wirkung</text:span>: <text:span text:style-name="T94">Für jede Stufe erlernst du zwei neue Sprachen.</text:span></text:p>
          <text:p text:style-name="P99"/>
          <text:h text:style-name="P96" text:outline-level="3">Zäh I - <text:span text:style-name="T95">V</text:span></text:h>
          <text:p text:style-name="P97"><text:span text:style-name="T3">Wirkung</text:span>: Du <text:span text:style-name="T96">erhältst +</text:span><text:span text:style-name="T97">1</text:span><text:span text:style-name="T96"> maximale LP.</text:span></text:p>
        </text:section>
        <text:p text:style-name="P100"/>
        <text:h text:style-name="P101" text:outline-level="2">Kampf <text:span text:style-name="T98">Talente</text:span></text:h>
        <text:section text:style-name="Sect2" text:name="Section6">
          <text:h text:style-name="TalentHeader" text:outline-level="3">Ausweichen</text:h>
          <text:p text:style-name="P102"><text:span text:style-name="T99">Einsatz</text:span>: <text:span text:style-name="T100">Verteidigung, 1 AP</text:span></text:p>
          <text:p text:style-name="P103"><text:span text:style-name="T101">Wirkung</text:span><text:span text:style-name="T102">: Du erhältst </text:span><text:span text:style-name="T103">einen Vorteil auf deine Verteidigung.</text:span></text:p>
          <text:p text:style-name="P104"/>
          <text:h text:style-name="TalentHeader" text:outline-level="3">Binden</text:h>
          <text:p text:style-name="P105">Limits<text:span text:style-name="T59">: Nahkampf</text:span></text:p>
          <text:p text:style-name="P102"><text:span text:style-name="T99">Einsatz</text:span>: <text:span text:style-name="T100">Verteidigung, 1 AP</text:span></text:p>
          <text:p text:style-name="P106"><text:span text:style-name="T3">Wirkung</text:span>: <text:span text:style-name="T103">Du </text:span><text:span text:style-name="T104">bringst dich in eine gute Position und erhältst einen Vorteil auf deine nächste Attacke oder Parade.</text:span></text:p>
          <text:p text:style-name="Standard"/>
          <text:h text:style-name="TalentHeader" text:outline-level="3">Blattschuss</text:h>
          <text:p text:style-name="P105">Limits<text:span text:style-name="T59">: Fernkampf</text:span></text:p>
          <text:p text:style-name="P102"><text:span text:style-name="T99">Einsatz</text:span>: <text:span text:style-name="T105">Attacke</text:span><text:span text:style-name="T106">, 1 AP</text:span></text:p>
          <text:p text:style-name="P107"><text:span text:style-name="T3">Wirkung</text:span>: <text:span text:style-name="T104">Deine Attacke verursacht bei Erfolg 2 Schaden.</text:span></text:p>
          <text:p text:style-name="P104"/>
          <text:h text:style-name="TalentHeader" text:outline-level="3">Blutrausch</text:h>
          <text:p text:style-name="P108">Limits<text:span text:style-name="T59">: Nach Töten eines Gegners</text:span></text:p>
          <text:p text:style-name="P109"><text:span text:style-name="T3">Wirkung</text:span>: Führ sofort noch eine Attacke aus.</text:p>
          <text:p text:style-name="P110"/>
          <text:h text:style-name="P111" text:outline-level="3">Entwaffnen</text:h>
          <text:p text:style-name="P112">Limits<text:span text:style-name="T59">: Nahkampf</text:span></text:p>
          <text:p text:style-name="P110"><text:span text:style-name="T99">Einsatz</text:span>: <text:span text:style-name="T105">Verteidigung, 1 AP</text:span></text:p>
          <text:p text:style-name="P110"><text:span text:style-name="T3">Wirkung</text:span>: <text:span text:style-name="T107">Bei Erfolg entreißt du dem Gegner die Waffe, anstelle Schaden zu verursachen.</text:span></text:p>
          <text:p text:style-name="P113"/>
          <text:h text:style-name="TalentHeader" text:outline-level="3">Finte</text:h>
          <text:p text:style-name="P105">Limits<text:span text:style-name="T59">: Nahkampf</text:span></text:p>
          <text:p text:style-name="P102"><text:span text:style-name="T99">Einsatz</text:span>: <text:span text:style-name="T106">Attacke, 1 AP</text:span></text:p>
          <text:p text:style-name="P104"><text:span text:style-name="T3">Wirkung</text:span>: Du erhältst <text:span text:style-name="T103">einen Vorteil auf deine Attacke.</text:span></text:p>
          <text:p text:style-name="P104"/>
          <text:p text:style-name="P104"/>
          <text:p text:style-name="P104"/>
          <text:h text:style-name="TalentHeader" text:outline-level="3">Kampfsinn I - II</text:h>
          <text:p text:style-name="P102"><text:span text:style-name="T99">Einsatz</text:span>: <text:span text:style-name="T108">Verteidigung</text:span></text:p>
          <text:p text:style-name="P114"><text:span text:style-name="T3">Wirkung</text:span>: <text:span text:style-name="T109">Du erleidest erst ab der 3ten/4ten Verteidigung pro Runde einen Nachteil.</text:span></text:p>
          <text:p text:style-name="P115"/>
          <text:h text:style-name="P116" text:outline-level="3">Kampfrausch</text:h>
          <text:p text:style-name="P117"><text:span text:style-name="T99">Einsatz</text:span>: <text:span text:style-name="T105">Attacke, 1 AP</text:span></text:p>
          <text:p text:style-name="P117"><text:span text:style-name="T3">Wirkung</text:span>: <text:span text:style-name="T110">Attackiere bis zu 3 Ziele </text:span><text:span text:style-name="T111">in Reichweite.</text:span></text:p>
          <text:p text:style-name="P115"/>
          <text:h text:style-name="TalentHeader" text:outline-level="3">Kernschuss</text:h>
          <text:p text:style-name="P105">Limits<text:span text:style-name="T59">: Fernkampf</text:span></text:p>
          <text:p text:style-name="P102"><text:span text:style-name="T99">Einsatz</text:span>: <text:span text:style-name="T105">Attacke</text:span></text:p>
          <text:p text:style-name="P115"><text:span text:style-name="T3">Wirkung</text:span>: <text:span text:style-name="T108">Du erleidest keinen </text:span><text:span text:style-name="T112">Nachteil</text:span><text:span text:style-name="T108">, wen du in einen Nahkampf hinein feuerst.</text:span></text:p>
          <text:p text:style-name="P115"/>
          <text:h text:style-name="P118" text:outline-level="3">Kommandos</text:h>
          <text:p text:style-name="P102"><text:span text:style-name="T99">Einsatz</text:span>: <text:span text:style-name="T113">Aktion, 1 AP</text:span></text:p>
          <text:p text:style-name="P119"><text:span text:style-name="T3">Wirkung</text:span>: <text:span text:style-name="T113">Verbündete erhalten </text:span><text:span text:style-name="T112">einen Vorteil auf ihre nächste </text:span><text:span text:style-name="T109">Kampf Probe (</text:span><text:span text:style-name="T112">Attacke oder Verteidigung</text:span><text:span text:style-name="T109">)</text:span><text:span text:style-name="T112">.</text:span></text:p>
          <text:p text:style-name="P115"/>
          <text:h text:style-name="TalentHeader" text:outline-level="3">Konter</text:h>
          <text:p text:style-name="P105">Limits<text:span text:style-name="T59">: Nahkampf</text:span></text:p>
          <text:p text:style-name="P102"><text:span text:style-name="T99">Einsatz</text:span>: <text:span text:style-name="T105">Verteidigung, 1 AP</text:span></text:p>
          <text:p text:style-name="P120"><text:span text:style-name="T3">Wirkung</text:span>: <text:span text:style-name="T109">Gelingt die Verteidigung erleidet der Angreifer 1 Schaden.</text:span></text:p>
          <text:p text:style-name="P104"/>
          <text:h text:style-name="TalentHeader" text:outline-level="3">S<text:span text:style-name="T106">t</text:span>urmangriff</text:h>
          <text:p text:style-name="P102"><text:span text:style-name="T99">Einsatz</text:span>: <text:span text:style-name="T105">Attacke, 1 AP</text:span></text:p>
          <text:p text:style-name="P121"><text:span text:style-name="T3">Wirkung</text:span>: <text:span text:style-name="T114">Führ eine extra Bewegung aus und attackiere danach.</text:span></text:p>
          <text:p text:style-name="P104"/>
          <text:p text:style-name="P104"/>
          <text:p text:style-name="P104"/>
          <text:p text:style-name="P104"/>
          <text:h text:style-name="TalentHeader" text:outline-level="3"><text:soft-page-break/>Wuchtschlag</text:h>
          <text:p text:style-name="P105">Limits<text:span text:style-name="T59">: Nahkampf</text:span></text:p>
          <text:p text:style-name="P102"><text:span text:style-name="T99">Einsatz</text:span>: <text:span text:style-name="T106">Attacke, 1 AP</text:span></text:p>
          <text:p text:style-name="P114"><text:span text:style-name="T3">Wirkung</text:span>: <text:span text:style-name="T104">Deine Attacke verursacht bei Erfolg 2 Schaden.</text:span></text:p>
          <text:p text:style-name="P122"/>
          <text:h text:style-name="TalentHeader" text:outline-level="3">Zielen</text:h>
          <text:p text:style-name="P105">Limits<text:span text:style-name="T59">: </text:span><text:span text:style-name="T115">Fernkampf</text:span></text:p>
          <text:p text:style-name="P102"><text:span text:style-name="T99">Einsatz</text:span>:<text:span text:style-name="T106"> Attacke, 1 AP</text:span></text:p>
          <text:p text:style-name="P121"><text:span text:style-name="T3">Wirkung</text:span>: Du erhältst <text:span text:style-name="T111">einen Vorteil auf deine Attacke</text:span>.</text:p>
          <text:p text:style-name="P121"/>
        </text:section>
        <text:h text:style-name="P123" text:outline-level="2">Zauber</text:h>
        <text:p text:style-name="P124"/>
        <text:h text:style-name="P125" text:outline-level="3">Axxeleratus</text:h>
        <text:p text:style-name="P126"><text:span text:style-name="T3">Einsatz</text:span>: <text:span text:style-name="T116">Aktion, 1 AP</text:span></text:p>
        <text:p text:style-name="P127"><text:span text:style-name="T3">Limits</text:span>: <text:span text:style-name="T116">Berührung, 3 Runde</text:span></text:p>
        <text:p text:style-name="P126"><text:span text:style-name="T3">Wirkung</text:span>: <text:span text:style-name="T116">Deine Bewegung wird verdoppelt und du erhältst </text:span><text:span text:style-name="T109">einen Vorteil auf Zähigkeit</text:span><text:span text:style-name="T116">.</text:span></text:p>
        <text:p text:style-name="P128"><text:span text:style-name="T3">Alternativ, </text:span><text:span text:style-name="T117">Dauerlauf</text:span>: <text:span text:style-name="T116">Du kannst für bis zu 3 Stunden Laufen ohne müde oder schlapp zu werden.</text:span></text:p>
        <text:p text:style-name="P127"><text:span text:style-name="T3">Extra (</text:span><text:span text:style-name="T118">pro AP</text:span><text:span text:style-name="T3">)</text:span>:</text:p>
        <text:list text:style-name="L3">
          <text:list-item>
            <text:p text:style-name="P129">+<text:span text:style-name="T109">1</text:span> Runde <text:span text:style-name="T119">Wirkungsdauer</text:span></text:p>
          </text:list-item>
        </text:list>
        <text:p text:style-name="P130"/>
        <text:h text:style-name="TalentHeader" text:outline-level="3">Armatrutz</text:h>
        <text:p text:style-name="P131"><text:span text:style-name="T3">Einsatz</text:span>: <text:span text:style-name="T119">Aktion, 1 AP</text:span></text:p>
        <text:p text:style-name="P132"><text:span text:style-name="T3">Limits</text:span>: <text:span text:style-name="T119">Selbst, 5 Minuten</text:span></text:p>
        <text:p text:style-name="P131"><text:span text:style-name="T3">Wirkung</text:span>: <text:span text:style-name="T119">Du kannst </text:span><text:span text:style-name="T120">die Fertigkeit </text:span><text:span text:style-name="T119">Zauberei verwenden, um dich gegen physische Angriffe zu Verteidigen.</text:span></text:p>
        <text:p text:style-name="P133"><text:span text:style-name="T3">Extra (</text:span><text:span text:style-name="T118">pro AP</text:span><text:span text:style-name="T3">)</text:span>:</text:p>
        <text:list text:continue-numbering="true" text:style-name="L3">
          <text:list-item>
            <text:p text:style-name="P134">Reichweite Berührung</text:p>
          </text:list-item>
          <text:list-item>
            <text:p text:style-name="P134">+5 Minuten Wirkungsdauer</text:p>
          </text:list-item>
        </text:list>
        <text:p text:style-name="P135"/>
        <text:h text:style-name="P136" text:outline-level="3">Balsam Salabunde</text:h>
        <text:p text:style-name="P137"><text:span text:style-name="T3">Einsatz</text:span>: <text:span text:style-name="T121">1 Minute</text:span>, 1 AP</text:p>
        <text:p text:style-name="P138"><text:span text:style-name="T3">Limits</text:span>: <text:span text:style-name="T122">Berührung,</text:span> <text:span text:style-name="T123">1 Lebewesen</text:span></text:p>
        <text:p text:style-name="P137"><text:span text:style-name="T3">Wirkung</text:span>: <text:span text:style-name="T120">Magische Heilung. </text:span><text:span text:style-name="T122">Ziel erhält </text:span><text:span text:style-name="T124">1</text:span><text:span text:style-name="T125"> LP</text:span><text:span text:style-name="T122"> zurück.</text:span></text:p>
        <text:p text:style-name="P139"><text:span text:style-name="T3">Alternativ, </text:span><text:span text:style-name="T117">Klarum Purum</text:span>: Ziel erholt sich von einer Krankheit oder einem Gift (SG hängt vom Gift / Krankheit ab).</text:p>
        <text:p text:style-name="P133"><text:span text:style-name="T3">Extra (</text:span><text:span text:style-name="T118">pro AP</text:span><text:span text:style-name="T3">)</text:span>:</text:p>
        <text:list text:continue-numbering="true" text:style-name="L3">
          <text:list-item>
            <text:p text:style-name="P140">Mit nur einer Aktion wirken</text:p>
          </text:list-item>
          <text:list-item>
            <text:p text:style-name="P141">+<text:span text:style-name="T124">1</text:span> LP</text:p>
          </text:list-item>
          <text:list-item>
            <text:p text:style-name="P142">+1 Lebewesen</text:p>
          </text:list-item>
          <text:list-item>
            <text:p text:style-name="P141">+9m Reichweite</text:p>
          </text:list-item>
        </text:list>
        <text:p text:style-name="P143"/>
        <text:h text:style-name="P144" text:outline-level="3">Banballadin</text:h>
        <text:p text:style-name="P145"><text:span text:style-name="T3">Einsatz</text:span>: Aktion, 1 AP</text:p>
        <text:p text:style-name="P146"><text:span text:style-name="T3">Limits</text:span>: 15m, 1 Stunde, <text:span text:style-name="T123">1 Person</text:span></text:p>
        <text:p text:style-name="P147"><text:span text:style-name="T3">Probe</text:span>: Zauberei vs. Zähigkeit</text:p>
        <text:p text:style-name="P145"><text:span text:style-name="T3">Wirkung</text:span>: <text:span text:style-name="T126">Das Opfer möchte dein Freund sein und glaubt dir fast alles.</text:span></text:p>
        <text:p text:style-name="P133"><text:span text:style-name="T3">Extra (</text:span><text:span text:style-name="T118">pro AP</text:span><text:span text:style-name="T3">)</text:span>:</text:p>
        <text:list text:continue-numbering="true" text:style-name="L3">
          <text:list-item>
            <text:p text:style-name="P148"><text:soft-page-break/>+1 Person</text:p>
          </text:list-item>
          <text:list-item>
            <text:p text:style-name="P149">+3 Stunden <text:span text:style-name="T119">Wirkungsdauer</text:span></text:p>
          </text:list-item>
        </text:list>
        <text:p text:style-name="Standard"/>
        <text:h text:style-name="TalentHeader" text:outline-level="3">Botschaft</text:h>
        <text:p text:style-name="P150"><text:span text:style-name="T3">Einsatz</text:span>: Aktion, 1 AP</text:p>
        <text:p text:style-name="P146"><text:span text:style-name="T3">Limits</text:span>: Unbegrenzt, <text:span text:style-name="T123">1 Person</text:span></text:p>
        <text:p text:style-name="P150"><text:span text:style-name="T3">Wirkung</text:span>: Du sprichst ein paar Wörter (2 bis 3 Sätze), welche die Zielperson als Stimme in ihrem Kopf hört.</text:p>
        <text:p text:style-name="P151"><text:span text:style-name="T127">Alternativ, </text:span><text:span text:style-name="T128">Audienz</text:span>: Du erscheinst dem Ziel in einem Traum (den du kontrollierst). Dort könnt ihr euch ungestört für mehrere Stunden unterhalten. Beide Teilnehmer können die Kommunikation jederzeit und ohne Probe beenden.</text:p>
        <text:p text:style-name="P133"><text:span text:style-name="T3">Extra (</text:span><text:span text:style-name="T118">pro AP</text:span><text:span text:style-name="T3">)</text:span>:</text:p>
        <text:list text:continue-numbering="true" text:style-name="L3">
          <text:list-item>
            <text:p text:style-name="P148">+1 Person</text:p>
          </text:list-item>
        </text:list>
        <text:p text:style-name="P152"/>
        <text:h text:style-name="P153" text:outline-level="3">Foramen</text:h>
        <text:p text:style-name="P154"><text:span text:style-name="T3">Einsatz</text:span>: <text:span text:style-name="T129">Aktion</text:span>, 1 AP</text:p>
        <text:p text:style-name="P155"><text:span text:style-name="T3">Limits</text:span>: <text:span text:style-name="T130">Berührung, </text:span><text:span text:style-name="T129">1 </text:span><text:span text:style-name="T130">Objekt</text:span></text:p>
        <text:p text:style-name="P156"><text:span text:style-name="T3">Probe</text:span>: Zauberei</text:p>
        <text:p text:style-name="P154"><text:span text:style-name="T3">Wirkung</text:span>: <text:span text:style-name="T129">Du öffnest ein schloss oder einen Riegel mittels Magie. SG hängt von der Qualität des Schlosses ab.</text:span></text:p>
        <text:p text:style-name="P157"/>
        <text:h text:style-name="P158" text:outline-level="3">Fulminictus</text:h>
        <text:p text:style-name="P151"><text:span text:style-name="T3">Einsatz</text:span>: Aktion</text:p>
        <text:p text:style-name="P159"><text:span text:style-name="T3">Limits</text:span>: <text:span text:style-name="T122">15m,</text:span> <text:span text:style-name="T123">1 Lebewesen</text:span></text:p>
        <text:p text:style-name="P160"><text:span text:style-name="T3">Probe</text:span>: Zauberei vs. Zähigkeit</text:p>
        <text:p text:style-name="P151"><text:span text:style-name="T3">Wirkung</text:span>: <text:span text:style-name="T131">Magisches Geschoss. </text:span><text:span text:style-name="T122">Ziel erleidet </text:span><text:span text:style-name="T124">1</text:span><text:span text:style-name="T122"> </text:span><text:span text:style-name="T132">Zauberschaden</text:span><text:span text:style-name="T122">.</text:span></text:p>
        <text:p text:style-name="P161"><text:span text:style-name="T3">Alternativ, </text:span><text:span text:style-name="T133">Reinigung</text:span>: Töte alle Insekten und Kleintiere in 30m Radius.</text:p>
        <text:p text:style-name="P133"><text:span text:style-name="T3">Extra (</text:span><text:span text:style-name="T118">pro AP</text:span><text:span text:style-name="T3">)</text:span>:</text:p>
        <text:list text:continue-numbering="true" text:style-name="L3">
          <text:list-item>
            <text:p text:style-name="P162">+15m Reichweite</text:p>
          </text:list-item>
          <text:list-item>
            <text:p text:style-name="P163">+Vorteil auf Attacke</text:p>
          </text:list-item>
          <text:list-item>
            <text:p text:style-name="P164">+1 Schaden (kann nur einmal gewählt werden)</text:p>
          </text:list-item>
        </text:list>
        <text:p text:style-name="P165"/>
        <text:h text:style-name="P166" text:outline-level="3">Gardianum</text:h>
        <text:p text:style-name="P167"><text:span text:style-name="T3">Einsatz</text:span>: Aktion, <text:span text:style-name="T134">1 AP</text:span></text:p>
        <text:p text:style-name="P168"><text:span text:style-name="T3">Limits</text:span>: <text:span text:style-name="T134">7m,</text:span><text:span text:style-name="T123"> </text:span><text:span text:style-name="T134">5 Minuten</text:span></text:p>
        <text:p text:style-name="P167"><text:span text:style-name="T3">Wirkung</text:span>: <text:span text:style-name="T134">Erzeugt eine 3m durchmessende Kugel, die Zauber von außen blockt.</text:span></text:p>
        <text:p text:style-name="P168"><text:span text:style-name="T3">Extra (</text:span><text:span text:style-name="T118">pro AP</text:span><text:span text:style-name="T3">)</text:span>:</text:p>
        <text:list text:continue-numbering="true" text:style-name="L3">
          <text:list-item>
            <text:p text:style-name="P169">+5 Minuten Wirkungsdauer</text:p>
          </text:list-item>
          <text:list-item>
            <text:p text:style-name="P169"><text:soft-page-break/>+3m Durchmesser</text:p>
          </text:list-item>
        </text:list>
        <text:p text:style-name="P165"/>
        <text:h text:style-name="P170" text:outline-level="3">Horriphobus</text:h>
        <text:p text:style-name="P171"><text:span text:style-name="T3">Einsatz</text:span>: Aktion, <text:span text:style-name="T135">1 AP</text:span></text:p>
        <text:p text:style-name="P172"><text:span text:style-name="T3">Limits</text:span>: <text:span text:style-name="T135">7m, 1 Person, 3 Minuten</text:span></text:p>
        <text:p text:style-name="P173"><text:span text:style-name="T3">Probe</text:span>: Zauberei vs. Zähigkeit</text:p>
        <text:p text:style-name="P171"><text:span text:style-name="T3">Wirkung</text:span>: <text:span text:style-name="T135">Das Opfer fürchtet sich vor dir, ergreift die Flucht wen möglich, oder versucht dich zumindest zu meiden.</text:span></text:p>
        <text:p text:style-name="P172"><text:span text:style-name="T3">Extra (</text:span><text:span text:style-name="T118">pro AP</text:span><text:span text:style-name="T3">)</text:span>:</text:p>
        <text:list text:continue-numbering="true" text:style-name="L3">
          <text:list-item>
            <text:p text:style-name="P174">+7m Reichweite</text:p>
          </text:list-item>
          <text:list-item>
            <text:p text:style-name="P174">+1 Person</text:p>
          </text:list-item>
          <text:list-item>
            <text:p text:style-name="P174">+3 Minuten Wirkungsdauer</text:p>
          </text:list-item>
        </text:list>
        <text:p text:style-name="P165"/>
        <text:h text:style-name="TalentHeader" text:outline-level="3">Ignifaxius</text:h>
        <text:p text:style-name="P175"><text:span text:style-name="T3">Einsatz</text:span>: Aktion</text:p>
        <text:p text:style-name="P176"><text:span text:style-name="T3">Limits</text:span>: <text:span text:style-name="T122">15m,</text:span> <text:span text:style-name="T123">1 Lebewesen</text:span></text:p>
        <text:p text:style-name="P147"><text:span text:style-name="T3">Probe</text:span>: Zauberei vs. Zähigkeit</text:p>
        <text:p text:style-name="P175"><text:span text:style-name="T3">Wirkung</text:span>: <text:span text:style-name="T131">Feuerlanze. </text:span><text:span text:style-name="T122">Ziel erleidet </text:span><text:span text:style-name="T124">1</text:span><text:span text:style-name="T122"> Feuerschaden.</text:span></text:p>
        <text:p text:style-name="P133"><text:span text:style-name="T3">Extra (</text:span><text:span text:style-name="T118">pro AP</text:span><text:span text:style-name="T3">)</text:span>:</text:p>
        <text:list text:continue-numbering="true" text:style-name="L3">
          <text:list-item>
            <text:p text:style-name="P141">+15m Reichweite</text:p>
          </text:list-item>
          <text:list-item>
            <text:p text:style-name="P177">+<text:span text:style-name="T136">Vorteil auf Attacke</text:span></text:p>
          </text:list-item>
          <text:list-item>
            <text:p text:style-name="P164">+1 Schaden (kann nur einmal gewählt werden)</text:p>
          </text:list-item>
        </text:list>
        <text:p text:style-name="P178"/>
        <text:h text:style-name="P179" text:outline-level="3">Motoricus</text:h>
        <text:p text:style-name="P180"><text:span text:style-name="T3">Einsatz</text:span>: Aktion</text:p>
        <text:p text:style-name="P181"><text:span text:style-name="T3">Limits</text:span>: <text:span text:style-name="T137">7m,</text:span> <text:span text:style-name="T123">1 </text:span><text:span text:style-name="T138">Objekt </text:span><text:span text:style-name="T139">(25kg)</text:span><text:span text:style-name="T138">, 5 Minuten</text:span></text:p>
        <text:p text:style-name="P180"><text:span text:style-name="T3">Wirkung</text:span>: <text:span text:style-name="T138">Du kannst </text:span><text:span text:style-name="T140">ein Objekt mit </text:span><text:span text:style-name="T138">Gedankenkraft langsam heben und bewegen. </text:span><text:span text:style-name="T139">Möchtest du mit dem Objekt etwas tun dass eine Probe erfordert, wird diese auf Zauberei gewürfelt.</text:span></text:p>
        <text:p text:style-name="P133"><text:span text:style-name="T3">Extra (</text:span><text:span text:style-name="T118">pro AP</text:span><text:span text:style-name="T3">)</text:span>:</text:p>
        <text:list text:continue-numbering="true" text:style-name="L3">
          <text:list-item>
            <text:p text:style-name="P182">+<text:span text:style-name="T141">25kg</text:span></text:p>
          </text:list-item>
          <text:list-item>
            <text:p text:style-name="P183">+7m Reichweite</text:p>
          </text:list-item>
          <text:list-item>
            <text:p text:style-name="P183">+1 Objekt (Gesamtgewicht zählt)</text:p>
          </text:list-item>
        </text:list>
        <text:p text:style-name="P184"/>
        <text:h text:style-name="P185" text:outline-level="3">Odem Arcanum</text:h>
        <text:p text:style-name="P186"><text:span text:style-name="T3">Einsatz</text:span>: Aktion, <text:span text:style-name="T139">1 AP</text:span></text:p>
        <text:p text:style-name="P187"><text:span text:style-name="T3">Limits</text:span>: <text:span text:style-name="T139">Selbst, </text:span><text:span text:style-name="T142">1 Minute</text:span></text:p>
        <text:p text:style-name="P186"><text:span text:style-name="T3">Wirkung</text:span>: <text:span text:style-name="T142">Du </text:span><text:span text:style-name="T143">Magie sehen (Wesen, Objekte, Phänomen) und Illusionen durchschauen</text:span><text:span text:style-name="T142">. </text:span><text:span text:style-name="T144">Extreme Magie kann den Anwender kurzzeitig Blenden (Teclador Effekt).</text:span></text:p>
        <text:p text:style-name="P188"><text:soft-page-break/><text:span text:style-name="T3">Alternativ, <text:s/>Blick aufs Wesen</text:span>: Der Erzähler beantwortet dir 3 Ja/Nein Fragen zu etwas magischen.</text:p>
        <text:p text:style-name="P189"><text:span text:style-name="T3">Alternativ, Analys Arcanstruktur</text:span>: <text:span text:style-name="T130">Du ergründest die Details zu etwas magischen</text:span>. Je nach Komplexität des Objekt <text:span text:style-name="T145">kann die Analyse Minuten, Stunden, Tage oder sogar Wochen dauern.</text:span></text:p>
        <text:p text:style-name="P133"><text:span text:style-name="T3">Extra (</text:span><text:span text:style-name="T118">pro AP</text:span><text:span text:style-name="T3">)</text:span>:</text:p>
        <text:list text:continue-numbering="true" text:style-name="L3">
          <text:list-item>
            <text:p text:style-name="P190">+1 Minute <text:span text:style-name="T119">Wirkungsdauer</text:span></text:p>
          </text:list-item>
        </text:list>
        <text:p text:style-name="P191"/>
        <text:h text:style-name="P192" text:outline-level="3">Somnigravis</text:h>
        <text:p text:style-name="P193"><text:span text:style-name="T3">Einsatz</text:span>: Aktion, <text:span text:style-name="T139">1 AP</text:span></text:p>
        <text:p text:style-name="P194"><text:span text:style-name="T3">Limits</text:span>: <text:span text:style-name="T146">7m, </text:span><text:span text:style-name="T143">Entspanntes </text:span><text:span text:style-name="T146">Lebewesen</text:span></text:p>
        <text:p text:style-name="P195"><text:span text:style-name="T3">Probe</text:span>: Zaubere<text:span text:style-name="T146">i vs. Zähigkeit</text:span></text:p>
        <text:p text:style-name="P193"><text:span text:style-name="T3">Wirkung</text:span>: <text:span text:style-name="T143">Das Opfer wird innerhalb weniger Momente müde und schläft ein. Schaden oder Lärm beendet den Schlaf.</text:span></text:p>
        <text:p text:style-name="P194"><text:span text:style-name="T3">Extra (</text:span><text:span text:style-name="T118">pro AP</text:span><text:span text:style-name="T3">)</text:span>:</text:p>
        <text:list text:continue-numbering="true" text:style-name="L3">
          <text:list-item>
            <text:p text:style-name="P196">+1 Lebewesen</text:p>
          </text:list-item>
          <text:list-item>
            <text:p text:style-name="P196">+7m Reichweite</text:p>
          </text:list-item>
        </text:list>
        <text:p text:style-name="P197"/>
        <text:h text:style-name="P198" text:outline-level="3">Transversalis</text:h>
        <text:p text:style-name="P199"><text:span text:style-name="T3">Einsatz</text:span>: Aktion, <text:span text:style-name="T147">1 </text:span><text:span text:style-name="T139">AP</text:span></text:p>
        <text:p text:style-name="P200"><text:span text:style-name="T3">Limits</text:span>: <text:span text:style-name="T139">Selbst, </text:span><text:span text:style-name="T144">50</text:span><text:span text:style-name="T147"> Meilen</text:span></text:p>
        <text:p text:style-name="P201"><text:span text:style-name="T3">Probe</text:span>: Zauberei</text:p>
        <text:p text:style-name="P199"><text:span text:style-name="T3">Wirkung</text:span>: <text:span text:style-name="T147">Du teleportierst dich an einen </text:span><text:span text:style-name="T144">anderen Ort. SG hängt davon ab wie gut du das Ziel kennst: 1</text:span><text:span text:style-name="T148">0</text:span><text:span text:style-name="T144"> = Sichtkontakt, </text:span><text:span text:style-name="T148">15</text:span><text:span text:style-name="T144"> = Gut Bekannt, </text:span><text:span text:style-name="T148">20</text:span><text:span text:style-name="T144"> = Schlecht Bekannt, </text:span><text:span text:style-name="T148">25</text:span><text:span text:style-name="T144"> = Beschreibung.</text:span></text:p>
        <text:p text:style-name="P133"><text:span text:style-name="T3">Extra (</text:span><text:span text:style-name="T118">pro AP</text:span><text:span text:style-name="T3">)</text:span>:</text:p>
        <text:list text:continue-numbering="true" text:style-name="L3">
          <text:list-item>
            <text:p text:style-name="P202">+50 Meilen</text:p>
          </text:list-item>
          <text:list-item>
            <text:p text:style-name="P202">+1 Person Mitnehmen (erfordert Berührung)</text:p>
          </text:list-item>
          <text:list-item>
            <text:p text:style-name="P202">+100kg Objekt mitnehmen (erfordert Berührung)</text:p>
          </text:list-item>
        </text:list>
        <text:p text:style-name="P203"/>
        <text:p text:style-name="P203"/>
        <text:p text:style-name="P203"/>
        <text:p text:style-name="P203"/>
        <text:p text:style-name="P203"/>
        <text:p text:style-name="P203"/>
        <text:p text:style-name="P203"/>
        <text:p text:style-name="P203"/>
        <text:p text:style-name="P203"/>
        <text:p text:style-name="Heading_20_1"><text:soft-page-break/>Kapitel <text:span text:style-name="T18">x: </text:span>Merkmale</text:p>
        <text:p text:style-name="P204">Merkmale beschreiben die passiven Eigenschaften deines Helden, <text:span text:style-name="T109">z.B.</text:span> wie viel Schaden er einstecken kann oder wie erschöpft er ist.</text:p>
        <text:p text:style-name="P204"/>
        <text:section text:style-name="Sect2" text:name="Section1">
          <text:h text:style-name="P205" text:outline-level="2">AP</text:h>
          <text:p text:style-name="P206">AP (Ausdauerpunkte) werden benötigt, um viele <text:span text:style-name="T149">der aktiven </text:span>Talente einzusetzen.</text:p>
          <text:p text:style-name="P206">Nach einer Nachtruhe regenerierst du W6 AP.</text:p>
          <text:p text:style-name="P207"/>
          <text:h text:style-name="P208" text:outline-level="2">LP</text:h>
          <text:p text:style-name="P209">LP (Lebenspunkte) geben an, wie viel Schaden dein Held einstecken kann.</text:p>
          <text:p text:style-name="P209">Erleidet dein Held Schaden, verliert er entsprechend viele LP. Sinken seine LP auf 0, wird er kampfunfähig.</text:p>
          <text:p text:style-name="P209">Eine Nachtruhe stellt <text:span text:style-name="T109">1</text:span> LP wieder her.</text:p>
          <text:p text:style-name="P210"/>
          <text:h text:style-name="Heading_20_3" text:outline-level="3">Erste Hilfe</text:h>
          <text:p text:style-name="P210">Hat ein Charakter <text:span text:style-name="T150">gerade erst</text:span> LP verloren, kann mit einer Probe auf Klugheit <text:span text:style-name="T150">einmalig </text:span>Erste Hilfe geleistet werden. Bei Erfolg stellt das Ziel <text:span text:style-name="T109">1</text:span> LP wieder her.</text:p>
          <text:p text:style-name="P207"/>
          <text:h text:style-name="P211" text:outline-level="2">SP</text:h>
          <text:p text:style-name="P212">SP (Schicksalspunkte) erlauben es dir, <text:span text:style-name="T151">eine Probe </text:span><text:span text:style-name="T109">erneut</text:span><text:span text:style-name="T151"> zu würfeln. Das neue Ergebnis ist dann </text:span><text:span text:style-name="T109">jedoch </text:span><text:span text:style-name="T151">bindend.</text:span></text:p>
          <text:p text:style-name="P212">Du beginnst jeden Spielabend mit allen deinen SP. Einmal ausgegebene SP können während des Spielabends nicht zurückgewonnen werden.</text:p>
          <text:h text:style-name="P213" text:outline-level="2">EP</text:h>
          <text:p text:style-name="P214">Du erhältst <text:span text:style-name="T8">10</text:span> EP (Erfahrungspunkt) pro Spielabend <text:span text:style-name="T8">und</text:span> <text:span text:style-name="T8">weitere 5 EP für </text:span>das Besiegen mächtiger Monster und das Abschließen von Quests.</text:p>
          <text:p text:style-name="P214">Nach etwa einer Woche Training können EP ausgegeben werden:</text:p>
          <text:list text:style-name="L4">
            <text:list-item>
              <text:p text:style-name="P215"><text:span text:style-name="T3">Fertigkeit</text:span> +1: Neuer Wert <text:span text:style-name="T6">*</text:span><text:span text:style-name="T8">2</text:span> EP</text:p>
            </text:list-item>
            <text:list-item>
              <text:p text:style-name="P215"><text:span text:style-name="T152">Neue </text:span><text:span text:style-name="T3">Spezialisierung</text:span>: <text:span text:style-name="T6">20</text:span> EP</text:p>
            </text:list-item>
            <text:list-item>
              <text:p text:style-name="P216"><text:span text:style-name="T3">Neues Talent</text:span>: <text:span text:style-name="T6">20</text:span> EP</text:p>
            </text:list-item>
          </text:list>
          <text:p text:style-name="P217"/>
          <text:h text:style-name="P218" text:outline-level="2">ST</text:h>
          <text:p text:style-name="P219"><text:span text:style-name="T153">Silberta</text:span>ler sind die Standardwährung des Spiels. Regeltechnisch werden nur Taler verwaltet, in der Spielwelt existieren jedoch verschiedene Münzen:</text:p>
          <text:list text:style-name="L5">
            <text:list-item>
              <text:p text:style-name="P220">1 Dukat</text:p>
            </text:list-item>
            <text:list-item>
              <text:p text:style-name="P220">10 Taler</text:p>
            </text:list-item>
            <text:list-item>
              <text:p text:style-name="P220">1<text:span text:style-name="T150">0</text:span>0 Heller</text:p>
            </text:list-item>
            <text:list-item>
              <text:p text:style-name="P220">1<text:span text:style-name="T150">00</text:span>0 Kreuzer</text:p>
            </text:list-item>
          </text:list>
          <text:p text:style-name="List_20_Paragraph"/>
          <text:p text:style-name="P219"><text:span text:style-name="T154">Hinweis</text:span><text:span text:style-name="T150">: </text:span>Kleinstausgaben, wie ein Bier in der Taverne oder ein Trinkgeld für einen Botenjungen, müssen nicht verwaltet werden.</text:p>
          <text:p text:style-name="P219"/>
          <text:p text:style-name="P219"/>
          <text:p text:style-name="P219"/>
        </text:section>
        <text:p text:style-name="P204"/>
        <text:p text:style-name="P204"/>
        <text:p text:style-name="P204"/>
        <text:p text:style-name="P221"><text:soft-page-break/>Kapitel <text:span text:style-name="T155">xx: </text:span><text:span text:style-name="T156">Ausrüstung</text:span></text:p>
        <text:section text:style-name="Sect3" text:name="Section4">
          <text:h text:style-name="P222" text:outline-level="2">Grundregeln</text:h>
          <text:p text:style-name="P223">Jeder Held verfügt über 10 Slots für Ausrüstung. Einen Gegenstand anzulegen, wegzustecken oder gegen einen anderen auszutauschen kostet eine Aktion.</text:p>
          <text:p text:style-name="P223"/>
          <text:h text:style-name="P224" text:outline-level="2">Vorräte</text:h>
          <text:p text:style-name="P225">Vorräte stehen für alle möglichen Kleinigkeiten, die ein Abenteurer dabeihaben könnte, etwa Proviant, Fackeln oder Seile.</text:p>
          <text:p text:style-name="P226">Eine Portion Vorräte kostet <text:span text:style-name="T3">1 Silber</text:span><text:span text:style-name="T59"> </text:span><text:span text:style-name="T157">und du kannst </text:span><text:span text:style-name="T158">3 Vorräte pro Slot</text:span><text:span text:style-name="T157"> transportieren.</text:span></text:p>
          <text:p text:style-name="P225">Du kannst jederzeit eine Portion Vorräte verbrauchen, um einen <text:span text:style-name="T159">alltäglichen Gegenstand aus dem Rucksack zu ziehen. </text:span>Dieser Gegenstand wird <text:span text:style-name="T159">aber durch die Nutzung verbraucht oder geht danach verloren.</text:span></text:p>
          <text:p text:style-name="P227"/>
          <text:h text:style-name="Heading_20_3" text:outline-level="3">Haltbare Ausrüstung</text:h>
          <text:p text:style-name="P226">Haltbare Gegenstände wie Dietriche, Zelte oder Brechstangen können gezielt gekauft werden. Ein solcher Gegenstand kostet 5 Silber, belegt einen Slot und wird durch die Benutzung nicht verbraucht.</text:p>
          <text:p text:style-name="P226"/>
          <text:h text:style-name="Heading_20_2" text:outline-level="2">Bewaffnung</text:h>
          <text:p text:style-name="P228">Bewaffnung umfasst die wichtigsten Ausrüstungsgegenstände eines Abenteurers: Waffen, Schilde, Rüstungen und Foki.</text:p>
          <text:p text:style-name="P228">Sie verleihen einen Bonus auf eine Fertigkeit (z. B. Kampf, Zähigkeit oder Zauberei) und besitzen oft einige Besonderheiten, die beim Einsatz beachtet werden müssen.</text:p>
          <text:p text:style-name="P228">Weiter unten findest du einige Beispiele.</text:p>
          <text:h text:style-name="P218" text:outline-level="2">Handwerk</text:h>
          <text:p text:style-name="P229">Einen Gegenstand herstellen erfordert eine Probe auf das passende Handwerk und die dazu Materialien im halben Wert des Gegenstands.</text:p>
          <text:p text:style-name="P229"/>
          <text:h text:style-name="Heading_20_3" text:outline-level="3">Extras</text:h>
          <text:p text:style-name="P229">Erfahrene Handwerker können Gegenstände mit Extras aufrüsten.</text:p>
          <text:p text:style-name="P229">Dies erfordert eine passende Spezialisierung und 200 ST pro Extra (1stes = 200 ST, 2tes = 400 ST, etc.)</text:p>
          <text:p text:style-name="P229">Außerdem wird die Handwerksprobe pro Extra um 3 erschwert (1stes = -3, 2tes Extra = -6, etc.)</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2" text:outline-level="2"><text:span text:style-name="T160">Optional: </text:span>Handwerk</text:h>
          <text:p text:style-name="P230"><text:soft-page-break/>Um einen Gegenstand herzustellen, benötigst du Materialien im halben Wert des Gegenstands und musst eine Probe auf das entsprechende Handwerk ablegen.</text:p>
          <text:p text:style-name="P230"/>
          <text:h text:style-name="Heading_20_3" text:outline-level="3">Extras</text:h>
          <text:p text:style-name="P230">Erfahrene Handwerker können Gegenstände mit Extras aufwerten.</text:p>
          <text:p text:style-name="P230">Dies erfordert eine passende Spezialisierung. Jedes Extra kostet 200 ST und erhöht sowohl die Kosten als auch die Schwierigkeit weiterer Extras.</text:p>
          <text:p text:style-name="P231"/>
          <table:table table:name="Table4" table:style-name="Table4">
            <table:table-column table:style-name="Table4.A" table:number-columns-repeated="3"/>
            <table:table-row>
              <table:table-cell table:style-name="Table4.A1" office:value-type="string">
                <text:p text:style-name="P232">Extra</text:p>
              </table:table-cell>
              <table:table-cell table:style-name="Table4.A1" office:value-type="string">
                <text:p text:style-name="P232">Kosten</text:p>
              </table:table-cell>
              <table:table-cell table:style-name="Table4.A1" office:value-type="string">
                <text:p text:style-name="P232">Schwierigkeit</text:p>
              </table:table-cell>
            </table:table-row>
            <table:table-row>
              <table:table-cell table:style-name="Table4.A2" office:value-type="string">
                <text:p text:style-name="P233">1</text:p>
              </table:table-cell>
              <table:table-cell table:style-name="Table4.B2" office:value-type="string">
                <text:p text:style-name="P233">200 ST</text:p>
              </table:table-cell>
              <table:table-cell table:style-name="Table4.C2" office:value-type="string">
                <text:p text:style-name="P233">-3</text:p>
              </table:table-cell>
            </table:table-row>
            <table:table-row>
              <table:table-cell table:style-name="Table4.A2" office:value-type="string">
                <text:p text:style-name="P233">2</text:p>
              </table:table-cell>
              <table:table-cell table:style-name="Table4.B3" office:value-type="string">
                <text:p text:style-name="P233">400 ST</text:p>
              </table:table-cell>
              <table:table-cell table:style-name="Table4.C3" office:value-type="string">
                <text:p text:style-name="P233">-6</text:p>
              </table:table-cell>
            </table:table-row>
            <table:table-row>
              <table:table-cell table:style-name="Table4.A4" office:value-type="string">
                <text:p text:style-name="P233">3</text:p>
              </table:table-cell>
              <table:table-cell table:style-name="Table4.B4" office:value-type="string">
                <text:p text:style-name="P233">800 ST</text:p>
              </table:table-cell>
              <table:table-cell table:style-name="Table4.C4" office:value-type="string">
                <text:p text:style-name="P233">-9</text:p>
              </table:table-cell>
            </table:table-row>
          </table:table>
          <text:p text:style-name="P234"/>
          <text:h text:style-name="Heading_20_3" text:outline-level="3">Extras Liste</text:h>
          <text:list text:style-name="L6">
            <text:list-item>
              <text:p text:style-name="P235"><text:span text:style-name="T3">Apport</text:span>: Gegenstand belegt keinen Slot und erscheint auf Kommando in der Hand des Besitzers.</text:p>
            </text:list-item>
            <text:list-item>
              <text:p text:style-name="P235"><text:span text:style-name="T3">Bonus (+1 bis +3)</text:span>: Der Gegenstand verleiht einen (zusätzlichen) Bonus von +1 bis +3 auf eine bestimmte Fertigkeit.</text:p>
            </text:list-item>
            <text:list-item>
              <text:p text:style-name="P235"><text:span text:style-name="T3">Glücksbringer</text:span>: Der Träger kann einmalig eine Probe wiederholen <text:span text:style-name="T161">(zerbricht danach).</text:span></text:p>
            </text:list-item>
            <text:list-item>
              <text:p text:style-name="P235"><text:span text:style-name="T3">Heilend</text:span>: Gegenstand kann <text:span text:style-name="T161">3 LP speichern.</text:span></text:p>
            </text:list-item>
            <text:list-item>
              <text:p text:style-name="P236"><text:span text:style-name="T3">Lebensretter</text:span>: Der Gegenstand verhindert einmalig, dass sein Träger auf 0 LP sinkt <text:s/><text:span text:style-name="T161">(zerbricht danach).</text:span></text:p>
            </text:list-item>
            <text:list-item>
              <text:p text:style-name="P235"><text:span text:style-name="T3">Lumen</text:span>: Der Gegenstand leuchtet auf Kommando wie eine Fackel.</text:p>
            </text:list-item>
            <text:list-item>
              <text:p text:style-name="P235"><text:span text:style-name="T3">Luxuriös</text:span>: Der Gegenstand ist reich verziert und sichtbar wertvoll.</text:p>
            </text:list-item>
            <text:list-item>
              <text:p text:style-name="P235"><text:span text:style-name="T3">Magiespeicher</text:span>: Der Gegenstand kann bis zu 3 AP speichern.</text:p>
            </text:list-item>
            <text:list-item>
              <text:p text:style-name="P235"><text:span text:style-name="T3">Selbstreinigend</text:span>: Schmutz, Rost und Blut verschwinden von selbst.</text:p>
            </text:list-item>
            <text:list-item>
              <text:p text:style-name="P235"><text:span text:style-name="T3">Treu</text:span>: Niemand außer dem Besitzer kann den Gegenstand verwenden.</text:p>
            </text:list-item>
            <text:list-item>
              <text:p text:style-name="P235"><text:span text:style-name="T3">Unscheinbar</text:span>: Der Gegenstand ist leicht zu verbergen und schwer wiederzuerkennen.</text:p>
            </text:list-item>
            <text:list-item>
              <text:p text:style-name="P235"><text:span text:style-name="T3">Unzerbrechlich</text:span>: Der Gegenstand kann durch gewöhnliche Mittel nicht beschädigt werden.</text:p>
            </text:list-item>
          </text:list>
          <text:p text:style-name="List_20_Paragraph"/>
          <text:p text:style-name="List_20_Paragraph"/>
          <text:p text:style-name="List_20_Paragraph"/>
          <text:p text:style-name="List_20_Paragraph"/>
          <text:p text:style-name="P228"/>
        </text:section>
        <text:h text:style-name="P237" text:outline-level="3">Rüstung (Bonus <text:span text:style-name="T162">auf </text:span>Zähigkeit)</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8">Name</text:p>
            </table:table-cell>
            <table:table-cell table:style-name="Table7.A1" office:value-type="string">
              <text:p text:style-name="P239">Preis</text:p>
            </table:table-cell>
            <table:table-cell table:style-name="Table7.A1" office:value-type="string">
              <text:p text:style-name="P240">BO</text:p>
            </table:table-cell>
            <table:table-cell table:style-name="Table7.A1" office:value-type="string">
              <text:p text:style-name="P241">Besonderheiten</text:p>
            </table:table-cell>
          </table:table-row>
          <table:table-row>
            <table:table-cell table:style-name="Table7.A2" office:value-type="string">
              <text:p text:style-name="P242">Leichte Rüstung</text:p>
            </table:table-cell>
            <table:table-cell table:style-name="Table7.B2" office:value-type="string">
              <text:p text:style-name="P243">100</text:p>
            </table:table-cell>
            <table:table-cell table:style-name="Table7.C2" office:value-type="string">
              <text:p text:style-name="P243">1</text:p>
            </table:table-cell>
            <table:table-cell table:style-name="Table7.D2" office:value-type="string">
              <text:p text:style-name="P242"><text:span text:style-name="T163">Nachteil auf Schwimmen, </text:span>2 Slots</text:p>
            </table:table-cell>
          </table:table-row>
          <table:table-row>
            <table:table-cell table:style-name="Table7.A2" office:value-type="string">
              <text:p text:style-name="P242">Schwere Rüstung</text:p>
            </table:table-cell>
            <table:table-cell table:style-name="Table7.B3" office:value-type="string">
              <text:p text:style-name="P243">300</text:p>
            </table:table-cell>
            <table:table-cell table:style-name="Table7.C3" office:value-type="string">
              <text:p text:style-name="P243">2</text:p>
            </table:table-cell>
            <table:table-cell table:style-name="Table7.D3" office:value-type="string">
              <text:p text:style-name="P242"><text:span text:style-name="T164">Nachteil auf </text:span>Schleichen, <text:span text:style-name="T164">Schwimmen unmöglich, </text:span>2 Slots</text:p>
            </table:table-cell>
          </table:table-row>
          <table:table-row>
            <table:table-cell table:style-name="Table7.A4" office:value-type="string">
              <text:p text:style-name="P242">Schild</text:p>
            </table:table-cell>
            <table:table-cell table:style-name="Table7.B4" office:value-type="string">
              <text:p text:style-name="P243">50</text:p>
            </table:table-cell>
            <table:table-cell table:style-name="Table7.C4" office:value-type="string">
              <text:p text:style-name="P244">1</text:p>
            </table:table-cell>
            <table:table-cell table:style-name="Table7.D4" office:value-type="string">
              <text:p text:style-name="P245"/>
            </table:table-cell>
          </table:table-row>
        </table:table>
        <text:p text:style-name="P246"/>
        <text:h text:style-name="Heading_20_3" text:outline-level="3">Einfache Waffen <text:span text:style-name="T165">(Bonus </text:span><text:span text:style-name="T162">auf </text:span><text:span text:style-name="T165">Kampf)</text:span></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8">Name</text:p>
            </table:table-cell>
            <table:table-cell table:style-name="Table6.A1" office:value-type="string">
              <text:p text:style-name="P239">Preis</text:p>
            </table:table-cell>
            <table:table-cell table:style-name="Table6.A1" office:value-type="string">
              <text:p text:style-name="P240">BO</text:p>
            </table:table-cell>
            <table:table-cell table:style-name="Table6.A1" office:value-type="string">
              <text:p text:style-name="P241">Besonderheiten</text:p>
            </table:table-cell>
          </table:table-row>
          <table:table-row>
            <table:table-cell table:style-name="Table6.A2" office:value-type="string">
              <text:p text:style-name="P247">Dolch</text:p>
            </table:table-cell>
            <table:table-cell table:style-name="Table6.B2" office:value-type="string">
              <text:p text:style-name="P248">45</text:p>
            </table:table-cell>
            <table:table-cell table:style-name="Table6.C2" office:value-type="string">
              <text:p text:style-name="P244">1</text:p>
            </table:table-cell>
            <table:table-cell table:style-name="Table6.D2" office:value-type="string">
              <text:p text:style-name="P249">Unauffällig, Wurf</text:p>
            </table:table-cell>
          </table:table-row>
          <table:table-row>
            <table:table-cell table:style-name="Table6.A2" office:value-type="string">
              <text:p text:style-name="P250">Schlagring</text:p>
            </table:table-cell>
            <table:table-cell table:style-name="Table6.B3" office:value-type="string">
              <text:p text:style-name="P248">25</text:p>
            </table:table-cell>
            <table:table-cell table:style-name="Table6.C3" office:value-type="string">
              <text:p text:style-name="P244">1</text:p>
            </table:table-cell>
            <table:table-cell table:style-name="Table6.D3" office:value-type="string">
              <text:p text:style-name="P251">Unauffällig</text:p>
            </table:table-cell>
          </table:table-row>
          <table:table-row>
            <table:table-cell table:style-name="Table6.A2" office:value-type="string">
              <text:p text:style-name="P247">Keule</text:p>
            </table:table-cell>
            <table:table-cell table:style-name="Table6.B4" office:value-type="string">
              <text:p text:style-name="P248">3</text:p>
            </table:table-cell>
            <table:table-cell table:style-name="Table6.C4" office:value-type="string">
              <text:p text:style-name="P244">1</text:p>
            </table:table-cell>
            <table:table-cell table:style-name="Table6.D4" office:value-type="string">
              <text:p text:style-name="P252"/>
            </table:table-cell>
          </table:table-row>
          <table:table-row>
            <table:table-cell table:style-name="Table6.A5" office:value-type="string">
              <text:p text:style-name="P247">Schleuder</text:p>
            </table:table-cell>
            <table:table-cell table:style-name="Table6.B5" office:value-type="string">
              <text:p text:style-name="P248">20</text:p>
            </table:table-cell>
            <table:table-cell table:style-name="Table6.C5" office:value-type="string">
              <text:p text:style-name="P244">1</text:p>
            </table:table-cell>
            <table:table-cell table:style-name="Table6.D5" office:value-type="string">
              <text:p text:style-name="P253">Fernkampf</text:p>
            </table:table-cell>
          </table:table-row>
          <table:table-row>
            <table:table-cell table:style-name="Table6.A2" office:value-type="string">
              <text:p text:style-name="P247">Jagdbogen</text:p>
            </table:table-cell>
            <table:table-cell table:style-name="Table6.B6" office:value-type="string">
              <text:p text:style-name="P248">45</text:p>
            </table:table-cell>
            <table:table-cell table:style-name="Table6.C6" office:value-type="string">
              <text:p text:style-name="P244">2</text:p>
            </table:table-cell>
            <table:table-cell table:style-name="Table6.D6" office:value-type="string">
              <text:p text:style-name="P247">Zweihändig, 2 Slots, Fernkampf</text:p>
            </table:table-cell>
          </table:table-row>
          <table:table-row>
            <table:table-cell table:style-name="Table6.A7" office:value-type="string">
              <text:p text:style-name="P247">Speer</text:p>
            </table:table-cell>
            <table:table-cell table:style-name="Table6.B7" office:value-type="string">
              <text:p text:style-name="P248">45</text:p>
            </table:table-cell>
            <table:table-cell table:style-name="Table6.C7" office:value-type="string">
              <text:p text:style-name="P244">2</text:p>
            </table:table-cell>
            <table:table-cell table:style-name="Table6.D7" office:value-type="string">
              <text:p text:style-name="P247">Zweihändig, 2 Slots, Wurf</text:p>
            </table:table-cell>
          </table:table-row>
          <table:table-row>
            <table:table-cell table:style-name="Table6.A8" office:value-type="string">
              <text:p text:style-name="P247">Kampfstab</text:p>
            </table:table-cell>
            <table:table-cell table:style-name="Table6.B8" office:value-type="string">
              <text:p text:style-name="P248">40</text:p>
            </table:table-cell>
            <table:table-cell table:style-name="Table6.C8" office:value-type="string">
              <text:p text:style-name="P244">2</text:p>
            </table:table-cell>
            <table:table-cell table:style-name="Table6.D8" office:value-type="string">
              <text:p text:style-name="P247">Zweihändig, 2 Slots</text:p>
            </table:table-cell>
          </table:table-row>
          <table:table-row>
            <table:table-cell table:style-name="Table6.A9" office:value-type="string">
              <text:p text:style-name="P247">Axt</text:p>
            </table:table-cell>
            <table:table-cell table:style-name="Table6.B9" office:value-type="string">
              <text:p text:style-name="P248">60</text:p>
            </table:table-cell>
            <table:table-cell table:style-name="Table6.C9" office:value-type="string">
              <text:p text:style-name="P244">2</text:p>
            </table:table-cell>
            <table:table-cell table:style-name="Table6.D9" office:value-type="string">
              <text:p text:style-name="P254">Zweihändig, 2 Slots</text:p>
            </table:table-cell>
          </table:table-row>
        </table:table>
        <text:p text:style-name="P246"/>
        <text:h text:style-name="Heading_20_3" text:outline-level="3">Kriegswaffen <text:span text:style-name="T165">(Bonus </text:span><text:span text:style-name="T162">auf </text:span><text:span text:style-name="T165">Kampf)</text:span></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55">Name</text:p>
            </table:table-cell>
            <table:table-cell table:style-name="Table9.A1" office:value-type="string">
              <text:p text:style-name="P256">Preis</text:p>
            </table:table-cell>
            <table:table-cell table:style-name="Table9.A1" office:value-type="string">
              <text:p text:style-name="P240">BO</text:p>
            </table:table-cell>
            <table:table-cell table:style-name="Table9.A1" office:value-type="string">
              <text:p text:style-name="P241">Besonderheiten</text:p>
            </table:table-cell>
          </table:table-row>
          <table:table-row>
            <table:table-cell table:style-name="Table9.A2" office:value-type="string">
              <text:p text:style-name="P250">Kriegshammer</text:p>
            </table:table-cell>
            <table:table-cell table:style-name="Table9.B2" office:value-type="string">
              <text:p text:style-name="P248">105</text:p>
            </table:table-cell>
            <table:table-cell table:style-name="Table9.C2" office:value-type="string">
              <text:p text:style-name="P244">2</text:p>
            </table:table-cell>
            <table:table-cell table:style-name="Table9.D2" office:value-type="string">
              <text:p text:style-name="P257"/>
            </table:table-cell>
          </table:table-row>
          <table:table-row>
            <table:table-cell table:style-name="Table9.A2" office:value-type="string">
              <text:p text:style-name="P247">Schwer<text:span text:style-name="T166">t</text:span></text:p>
            </table:table-cell>
            <table:table-cell table:style-name="Table9.B3" office:value-type="string">
              <text:p text:style-name="P248">200</text:p>
            </table:table-cell>
            <table:table-cell table:style-name="Table9.C3" office:value-type="string">
              <text:p text:style-name="P244">2</text:p>
            </table:table-cell>
            <table:table-cell table:style-name="Table9.D3" office:value-type="string">
              <text:p text:style-name="P257"/>
            </table:table-cell>
          </table:table-row>
          <table:table-row>
            <table:table-cell table:style-name="Table9.A2" office:value-type="string">
              <text:p text:style-name="P250">Hellebarde</text:p>
            </table:table-cell>
            <table:table-cell table:style-name="Table9.B4" office:value-type="string">
              <text:p text:style-name="P248">160</text:p>
            </table:table-cell>
            <table:table-cell table:style-name="Table9.C4" office:value-type="string">
              <text:p text:style-name="P244">3</text:p>
            </table:table-cell>
            <table:table-cell table:style-name="Table9.D4" office:value-type="string">
              <text:p text:style-name="P251">Zweihändig, 2 Slots</text:p>
            </table:table-cell>
          </table:table-row>
          <table:table-row>
            <table:table-cell table:style-name="Table9.A2" office:value-type="string">
              <text:p text:style-name="P250">Kriegsaxt</text:p>
            </table:table-cell>
            <table:table-cell table:style-name="Table9.B5" office:value-type="string">
              <text:p text:style-name="P248">120</text:p>
            </table:table-cell>
            <table:table-cell table:style-name="Table9.C5" office:value-type="string">
              <text:p text:style-name="P244">3</text:p>
            </table:table-cell>
            <table:table-cell table:style-name="Table9.D5" office:value-type="string">
              <text:p text:style-name="P251">Zweihändig, 2 Slots</text:p>
            </table:table-cell>
          </table:table-row>
          <table:table-row>
            <table:table-cell table:style-name="Table9.A2" office:value-type="string">
              <text:p text:style-name="P247">Zweihänder</text:p>
            </table:table-cell>
            <table:table-cell table:style-name="Table9.B6" office:value-type="string">
              <text:p text:style-name="P248">320</text:p>
            </table:table-cell>
            <table:table-cell table:style-name="Table9.C6" office:value-type="string">
              <text:p text:style-name="P244">3</text:p>
            </table:table-cell>
            <table:table-cell table:style-name="Table9.D6" office:value-type="string">
              <text:p text:style-name="P249">Zweihändig, 2 Slots</text:p>
            </table:table-cell>
          </table:table-row>
          <table:table-row>
            <table:table-cell table:style-name="Table9.A7" office:value-type="string">
              <text:p text:style-name="P247">Langbogen</text:p>
            </table:table-cell>
            <table:table-cell table:style-name="Table9.B7" office:value-type="string">
              <text:p text:style-name="P248">80</text:p>
            </table:table-cell>
            <table:table-cell table:style-name="Table9.C7" office:value-type="string">
              <text:p text:style-name="P244">3</text:p>
            </table:table-cell>
            <table:table-cell table:style-name="Table9.D7" office:value-type="string">
              <text:p text:style-name="P249">Zweihändig, 2 Slots, Fernkampf</text:p>
            </table:table-cell>
          </table:table-row>
          <table:table-row>
            <table:table-cell table:style-name="Table9.A8" office:value-type="string">
              <text:p text:style-name="P257">Handarmbrust</text:p>
            </table:table-cell>
            <table:table-cell table:style-name="Table9.B8" office:value-type="string">
              <text:p text:style-name="P248">150</text:p>
            </table:table-cell>
            <table:table-cell table:style-name="Table9.C8" office:value-type="string">
              <text:p text:style-name="P244">2</text:p>
            </table:table-cell>
            <table:table-cell table:style-name="Table9.D8" office:value-type="string">
              <text:p text:style-name="P257">Fernkampf</text:p>
            </table:table-cell>
          </table:table-row>
          <table:table-row>
            <table:table-cell table:style-name="Table9.A9" office:value-type="string">
              <text:p text:style-name="P250">Armbrust</text:p>
            </table:table-cell>
            <table:table-cell table:style-name="Table9.B9" office:value-type="string">
              <text:p text:style-name="P248">210</text:p>
            </table:table-cell>
            <table:table-cell table:style-name="Table9.C9" office:value-type="string">
              <text:p text:style-name="P244">3</text:p>
            </table:table-cell>
            <table:table-cell table:style-name="Table9.D9" office:value-type="string">
              <text:p text:style-name="P251">Zweihändig, 2 Slots, Fernkampf, Aktion zum Nachladen</text:p>
            </table:table-cell>
          </table:table-row>
        </table:table>
        <text:p text:style-name="P258"/>
        <text:h text:style-name="Heading_20_3" text:outline-level="3">Fokus (Bonus <text:span text:style-name="T162">auf </text:span>Zauberei)</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9">Name</text:p>
            </table:table-cell>
            <table:table-cell table:style-name="Table1.A1" office:value-type="string">
              <text:p text:style-name="P260">Preis</text:p>
            </table:table-cell>
            <table:table-cell table:style-name="Table1.A1" office:value-type="string">
              <text:p text:style-name="P240">BO</text:p>
            </table:table-cell>
            <table:table-cell table:style-name="Table1.A1" office:value-type="string">
              <text:p text:style-name="P241">Besonderheiten</text:p>
            </table:table-cell>
          </table:table-row>
          <table:table-row>
            <table:table-cell table:style-name="Table1.A2" office:value-type="string">
              <text:p text:style-name="P261">Ritualdolch</text:p>
            </table:table-cell>
            <table:table-cell table:style-name="Table1.B2" office:value-type="string">
              <text:p text:style-name="P262">80</text:p>
            </table:table-cell>
            <table:table-cell table:style-name="Table1.C2" office:value-type="string">
              <text:p text:style-name="P244">1</text:p>
            </table:table-cell>
            <table:table-cell table:style-name="Table1.D2" office:value-type="string">
              <text:p text:style-name="P263"/>
            </table:table-cell>
          </table:table-row>
          <table:table-row>
            <table:table-cell table:style-name="Table1.A2" office:value-type="string">
              <text:p text:style-name="P261">Zepter</text:p>
            </table:table-cell>
            <table:table-cell table:style-name="Table1.B2" office:value-type="string">
              <text:p text:style-name="P262">120</text:p>
            </table:table-cell>
            <table:table-cell table:style-name="Table1.C2" office:value-type="string">
              <text:p text:style-name="P244">2</text:p>
            </table:table-cell>
            <table:table-cell table:style-name="Table1.D2" office:value-type="string">
              <text:p text:style-name="P263"/>
            </table:table-cell>
          </table:table-row>
          <table:table-row>
            <table:table-cell table:style-name="Table1.A4" office:value-type="string">
              <text:p text:style-name="P261">Zauberstab</text:p>
            </table:table-cell>
            <table:table-cell table:style-name="Table1.B4" office:value-type="string">
              <text:p text:style-name="P262">250</text:p>
            </table:table-cell>
            <table:table-cell table:style-name="Table1.C4" office:value-type="string">
              <text:p text:style-name="P244">3</text:p>
            </table:table-cell>
            <table:table-cell table:style-name="Table1.D4" office:value-type="string">
              <text:p text:style-name="P264">Zweihändig, 2 Slots</text:p>
            </table:table-cell>
          </table:table-row>
        </table:table>
        <text:p text:style-name="P265"/>
        <text:p text:style-name="P266">Kapitel <text:span text:style-name="T18">x</text:span><text:span text:style-name="T167">x: </text:span><text:span text:style-name="T168">Vorteile</text:span></text:p>
        <text:p text:style-name="P267">Vorteile verkörpern besondere Personen, Beziehungen <text:span text:style-name="T169">oder </text:span>Ressourcen, auf die dein Charakter zurückgreifen kann.</text:p>
        <text:p text:style-name="P268"/>
        <text:section text:style-name="Sect2" text:name="Section3">
          <text:h text:style-name="P269" text:outline-level="2">Flexibilität</text:h>
          <text:p text:style-name="P268">Vorteile sind dynamisch und können sich im Laufe des Spiels verändern, verloren gehen oder neu gewonnen werden.</text:p>
          <text:p text:style-name="P268">So kann dein Held beispielsweise den Vorteil Reich erhalten, wenn er einen Schatz hebt.</text:p>
          <text:p text:style-name="P268">Besitzt er bereits fünf Vorteile, muss er dafür einen bestehenden Vorteil aufgeben, <text:span text:style-name="T169">z.B. </text:span>indem er seine Kontakte bei der Polizei vernachlässigt, um sein neues Luxusleben zu genießen.</text:p>
          <text:p text:style-name="P268"/>
          <text:h text:style-name="P269" text:outline-level="2"><text:span text:style-name="T170">Optional: </text:span><text:span text:style-name="T171">Erweiterter</text:span> Vorteil</text:h>
          <text:p text:style-name="P270">Bei Bedarf kannst du einen bestehenden Vorteil um eine besondere Eigenschaft erweitern.</text:p>
          <text:p text:style-name="P270">So könnte dein loyaler Jagdhund (Gefährte) beispielsweise telepathisch mit dir kommunizieren, oder dein Familienschwert teleportiert sich auf Kommando in deine Hand.</text:p>
          <text:p text:style-name="P270">Eine solche Erweiterung belegt allerdings einen eigenen Vorteilsslot.</text:p>
          <text:h text:style-name="P269" text:outline-level="2">Minions</text:h>
          <text:p text:style-name="P270">Minions sind NSCs, die deinem Helden loyal zur Seite stehen. Sie werden vom Erzähler kontrolliert, aber du legst die Proben für sie ab.</text:p>
          <text:p text:style-name="P270">Anstelle von Fertigkeiten besitzen sie ein Level, das deiner höchsten Fertigkeit entspricht.</text:p>
          <text:p text:style-name="P270">Proben, die der Minion besonders gut beherrscht, legt er mit seinem vollen Level ab. Für alle anderen Proben verwendet er sein halbes Level (aufrunden).</text:p>
          <text:p text:style-name="P270">Minions können Werkzeuge benutzen, um den üblichen Bonus von +2 zu erhalten, besitzen jedoch keine Spezialisierungen.</text:p>
          <text:p text:style-name="P270">Schwache Minions sind nicht besonders robust und gehen bereits nach einem Punkt Schaden zu Boden.</text:p>
          <text:p text:style-name="P270"/>
          <text:p text:style-name="P270"/>
          <text:p text:style-name="P270"/>
          <text:p text:style-name="P270"/>
        </text:section>
        <text:p text:style-name="P267"/>
        <text:h text:style-name="P271" text:outline-level="2">Beispiel <text:span text:style-name="T172">Vorteile</text:span></text:h>
        <table:table table:name="Table3" table:style-name="Table3">
          <table:table-column table:style-name="Table3.A"/>
          <table:table-column table:style-name="Table3.B"/>
          <table:table-row>
            <table:table-cell table:style-name="Table3.A1" office:value-type="string">
              <text:p text:style-name="Table_20_Header">Name</text:p>
            </table:table-cell>
            <table:table-cell table:style-name="Table3.A1" office:value-type="string">
              <text:p text:style-name="Table_20_Header">Beschreibung</text:p>
            </table:table-cell>
          </table:table-row>
          <table:table-row>
            <table:table-cell table:style-name="Table3.A2" office:value-type="string">
              <text:p text:style-name="Table_20_Contents">Gefährte</text:p>
            </table:table-cell>
            <table:table-cell table:style-name="Table3.B2" office:value-type="string">
              <text:p text:style-name="Table_20_Contents">Du hast einen kompetenten Minion der dir loyal zur Seite steht (z.B. Jagdhund oder Bodyguard).</text:p>
            </table:table-cell>
          </table:table-row>
          <table:table-row>
            <table:table-cell table:style-name="Table3.A2" office:value-type="string">
              <text:p text:style-name="Table_20_Contents">Fahrzeug</text:p>
            </table:table-cell>
            <table:table-cell table:style-name="Table3.B2" office:value-type="string">
              <text:p text:style-name="Table_20_Contents">Du besitzt ein <text:span text:style-name="T173">eigenes </text:span>Fahrzeug (z.B. <text:span text:style-name="T174">Kutsche, Pferd oder Schiff</text:span>).</text:p>
            </table:table-cell>
          </table:table-row>
          <table:table-row>
            <table:table-cell table:style-name="Table3.A4" office:value-type="string">
              <text:p text:style-name="Table_20_Contents">Kontakte</text:p>
            </table:table-cell>
            <table:table-cell table:style-name="Table3.B4" office:value-type="string">
              <text:p text:style-name="Table_20_Contents">Du hast Kontakte in einer Organisation (z.B. <text:span text:style-name="T174">Adel oder </text:span>Kirche), die dich mit Informationen und kleineren Gefallen unterstützen.</text:p>
            </table:table-cell>
          </table:table-row>
          <table:table-row>
            <table:table-cell table:style-name="Table3.A4" office:value-type="string">
              <text:p text:style-name="Table_20_Contents">Mentor</text:p>
            </table:table-cell>
            <table:table-cell table:style-name="Table3.B4" office:value-type="string">
              <text:p text:style-name="Table_20_Contents">Eine mächtige Person <text:span text:style-name="T173">(z.B. Adliger </text:span><text:span text:style-name="T174">oder Magier</text:span><text:span text:style-name="T173">) </text:span><text:span text:style-name="T175">steht mit Rat und Tat zur Seite.</text:span></text:p>
            </table:table-cell>
          </table:table-row>
          <table:table-row>
            <table:table-cell table:style-name="Table3.A6" office:value-type="string">
              <text:p text:style-name="Table_20_Contents">Personal</text:p>
            </table:table-cell>
            <table:table-cell table:style-name="Table3.B6" office:value-type="string">
              <text:p text:style-name="Table_20_Contents">Du befehligst eine Gruppe <text:span text:style-name="T169">schwacher</text:span> Minions (z.B. <text:span text:style-name="T174">Schläger</text:span>).</text:p>
            </table:table-cell>
          </table:table-row>
          <table:table-row>
            <table:table-cell table:style-name="Table3.A7" office:value-type="string">
              <text:p text:style-name="Table_20_Contents">Ruhm</text:p>
            </table:table-cell>
            <table:table-cell table:style-name="Table3.B7" office:value-type="string">
              <text:p text:style-name="Table_20_Contents">Du bist <text:span text:style-name="T174">berühmt als Abenteurer, Künstler oder dergleichen.</text:span></text:p>
            </table:table-cell>
          </table:table-row>
          <table:table-row>
            <table:table-cell table:style-name="Table3.A8" office:value-type="string">
              <text:p text:style-name="Table_20_Contents">Status</text:p>
            </table:table-cell>
            <table:table-cell table:style-name="Table3.B8" office:value-type="string">
              <text:p text:style-name="Table_20_Contents">Du bist ein angesehenes Mitglied einer wichtigen Organisation (z.B. Adel <text:span text:style-name="T174">oder Kirche</text:span>).</text:p>
            </table:table-cell>
          </table:table-row>
          <table:table-row>
            <table:table-cell table:style-name="Table3.A9" office:value-type="string">
              <text:p text:style-name="Table_20_Contents">Verbündeter</text:p>
            </table:table-cell>
            <table:table-cell table:style-name="Table3.B9" office:value-type="string">
              <text:p text:style-name="Table_20_Contents">Eine mächtige Person oder Organisation steht dir zur Seite.</text:p>
            </table:table-cell>
          </table:table-row>
          <table:table-row>
            <table:table-cell table:style-name="Table3.A10" office:value-type="string">
              <text:p text:style-name="Table_20_Contents">Zuflucht</text:p>
            </table:table-cell>
            <table:table-cell table:style-name="Table3.B10" office:value-type="string">
              <text:p text:style-name="Table_20_Contents">Du hast einen sicheren oder geheimen Rückzugsort <text:s/>(z.B. gesicherte Villa oder geheime Basis).</text:p>
            </table:table-cell>
          </table:table-row>
        </table:table>
        <text:p text:style-name="P30">Kapitel <text:span text:style-name="T176">XX: Regeln</text:span></text:p>
        <text:p text:style-name="P272"><text:span text:style-name="T177">Für den</text:span> Großteil des Spiels <text:span text:style-name="T177">erzählt ihr eine Geschichte. Die</text:span> Spieler übernehmen die Rolle <text:span text:style-name="T177">der</text:span> Helden <text:span text:style-name="T177">und</text:span> der Erzähler <text:span text:style-name="T178">übernimmt den Rest der Welt. </text:span>Für bestimmte Situationen gibt es jedoch Regeln, die den Ausgang der Geschichte bestimmen.</text:p>
        <text:p text:style-name="P272"/>
        <text:p text:style-name="P272"><text:span text:style-name="T3">Hinweis</text:span>: <text:span text:style-name="T179">Anderswelt ist ein spielerorientiertes System. </text:span><text:span text:style-name="T180">Das bedeutet, d</text:span><text:span text:style-name="T179">er Erzähler würfelt niemals. </text:span><text:span text:style-name="T180">A</text:span><text:span text:style-name="T179">lle Proben werden von den Spielern abgelegt.</text:span></text:p>
        <text:p text:style-name="P272"/>
        <text:section text:style-name="Sect3" text:name="Section9">
          <text:h text:style-name="P273" text:outline-level="2">Einfache Probe</text:h>
          <text:p text:style-name="P274">Der Spielleiter bestimmt die passende Fertigkeit und die Schwierigkeit der Probe. Würfle anschließend 1W20.</text:p>
          <text:p text:style-name="P274">Ist das Ergebnis kleiner oder gleich deiner Fertigkeit abzüglich der Schwierigkeit, gelingt die Probe.</text:p>
          <text:p text:style-name="P274">Eine natürliche 1 ist ein meisterlicher Erfolg, eine natürliche 20 immer ein Fehlschlag.</text:p>
          <text:p text:style-name="P275"/>
          <table:table table:name="Table5" table:style-name="Table5">
            <table:table-column table:style-name="Table5.A"/>
            <table:table-column table:style-name="Table5.B"/>
            <table:table-row>
              <table:table-cell table:style-name="Table5.A1" office:value-type="string">
                <text:p text:style-name="P276">Malus</text:p>
              </table:table-cell>
              <table:table-cell table:style-name="Table5.A1" office:value-type="string">
                <text:p text:style-name="Table_20_Header">Schwierigkeit</text:p>
              </table:table-cell>
            </table:table-row>
            <table:table-row>
              <table:table-cell table:style-name="Table5.A2" office:value-type="string">
                <text:p text:style-name="P277">-0</text:p>
              </table:table-cell>
              <table:table-cell table:style-name="Table5.B2" office:value-type="string">
                <text:p text:style-name="Table_20_Contents">Simpel</text:p>
              </table:table-cell>
            </table:table-row>
            <table:table-row>
              <table:table-cell table:style-name="Table5.A2" office:value-type="string">
                <text:p text:style-name="P278">-<text:span text:style-name="T181">3</text:span></text:p>
              </table:table-cell>
              <table:table-cell table:style-name="Table5.B3" office:value-type="string">
                <text:p text:style-name="Table_20_Contents">Normal</text:p>
              </table:table-cell>
            </table:table-row>
            <table:table-row>
              <table:table-cell table:style-name="Table5.A4" office:value-type="string">
                <text:p text:style-name="Table_20_Contents">-<text:span text:style-name="T181">6</text:span></text:p>
              </table:table-cell>
              <table:table-cell table:style-name="Table5.B4" office:value-type="string">
                <text:p text:style-name="Table_20_Contents">Schwer</text:p>
              </table:table-cell>
            </table:table-row>
            <table:table-row>
              <table:table-cell table:style-name="Table5.A4" office:value-type="string">
                <text:p text:style-name="P277">-9</text:p>
              </table:table-cell>
              <table:table-cell table:style-name="Table5.B5" office:value-type="string">
                <text:p text:style-name="Table_20_Contents">Sehr Schwer</text:p>
              </table:table-cell>
            </table:table-row>
            <table:table-row>
              <table:table-cell table:style-name="Table5.A6" office:value-type="string">
                <text:p text:style-name="Table_20_Contents">-<text:span text:style-name="T181">12</text:span></text:p>
              </table:table-cell>
              <table:table-cell table:style-name="Table5.B6" office:value-type="string">
                <text:p text:style-name="Table_20_Contents">Extrem</text:p>
              </table:table-cell>
            </table:table-row>
          </table:table>
          <text:p text:style-name="P279"/>
          <text:h text:style-name="Heading_20_3" text:outline-level="3">Vor- und Nachteile</text:h>
          <text:p text:style-name="P280">Talente und Umstände können Vor- und Nachteile verleihen.</text:p>
          <text:list text:style-name="L7">
            <text:list-item>
              <text:p text:style-name="P281">Überwiegen die Vorteile, würfel 2W20 und verwendest das bessere Ergebnis.</text:p>
            </text:list-item>
            <text:list-item>
              <text:p text:style-name="P281">Überwiegen die Nachteile, würfel 2W20 und verwende das schlechtere Ergebnis.</text:p>
            </text:list-item>
            <text:list-item>
              <text:p text:style-name="P281">Gleichen sich Vor- und Nachteile aus, würfle normal.</text:p>
            </text:list-item>
          </text:list>
          <text:h text:style-name="Heading_20_2" text:outline-level="2">Vergleich</text:h>
          <text:p text:style-name="P280">Wenn Spielercharaktere miteinander konkurrieren, wird ein Vergleich durchgeführt.</text:p>
          <text:p text:style-name="P280">Alle Beteiligten legen eine passende Probe ab.</text:p>
          <text:p text:style-name="P280">Besteht nur ein Charakter die Probe, gewinnt er den Vergleich.</text:p>
          <text:p text:style-name="P280">Bestehen mehrere Charaktere die Probe, gewinnt derjenige mit dem höchsten <text:span text:style-name="T3">erfolgreichen</text:span> Würfelergebnis.</text:p>
          <text:p text:style-name="P280">Bei Gleichstand endet der Vergleich unentschieden.</text:p>
          <text:p text:style-name="P280"/>
          <text:h text:style-name="P282" text:outline-level="2">Minions</text:h>
          <text:p text:style-name="P283">Verbündete, beschworene Kreaturen und ähnliche Begleiter werden als Minions bezeichnet.</text:p>
          <text:p text:style-name="P283">Minions werden vom zugehörigen Spieler gesteuert. Für Aufgaben, die sie gut beherrschen, verwenden sie den höchsten Fertigkeitswert ihres Spielers. Für alle anderen Proben besitzen sie einen Fertigkeitswert von 10.</text:p>
          <text:p text:style-name="P283">Minions verfügen über keine Talente oder Spezialisierungen und gehen mit 2 Schaden zu Boden.</text:p>
        </text:section>
      </text:section>
      <text:section text:style-name="Sect1" text:name="Section8">
        <text:p text:style-name="Standard"/>
        <text:p text:style-name="P30">Kapitel <text:span text:style-name="T176">X</text:span><text:span text:style-name="T182">X: Action</text:span></text:p>
        <text:p text:style-name="Standard">Action-Szenen wie Kämpfe, Verfolgungsjagden oder ähnliche Konflikte werden in Runden von jeweils 6 Sekunden abgehandelt. Bei Bedarf kann die <text:span text:style-name="T183">Umgebung die Position der Figuren auch</text:span> mit einer Skizze <text:span text:style-name="T183">verdeutlicht</text:span>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P284">In deinem Zug kannst du dich bewegen und eine Aktion ausführen.</text:p>
          <text:p text:style-name="P284">Menschen bewegen sich bis zu 9 Meter, sofern sie nicht durch schwieriges Gelände gebremst werden.</text:p>
          <text:p text:style-name="P284">Typische Aktionen sind:</text:p>
          <text:list text:style-name="L8">
            <text:list-item>
              <text:p text:style-name="P285">Attackieren</text:p>
            </text:list-item>
            <text:list-item>
              <text:p text:style-name="P285">Eine Waffe ziehen oder wechseln</text:p>
            </text:list-item>
            <text:list-item>
              <text:p text:style-name="P286">Gegenstand benutzen</text:p>
            </text:list-item>
            <text:list-item>
              <text:p text:style-name="P285">Sprinten (erneut bewegen)</text:p>
            </text:list-item>
          </text:list>
          <text:p text:style-name="P287">Kleine Handlungen, wie ein paar Worte zu sagen, <text:span text:style-name="T184">gelten als Nebensache und </text:span>erfordern keine Aktion.</text:p>
          <text:p text:style-name="P287"/>
          <text:p text:style-name="P288"><text:span text:style-name="T185">Hinweis, Minions</text:span><text:span text:style-name="T183">: </text:span><text:span text:style-name="T186">Minions</text:span><text:span text:style-name="T183"> handeln direkt nach ih</text:span><text:span text:style-name="T186">rem Spieler</text:span><text:span text:style-name="T183"> und benutzen die selben Regeln um sich zu Bewegen, Attackieren oder zu Verteidigen.</text:span></text:p>
          <text:p text:style-name="P289"/>
          <text:p text:style-name="P289"/>
          <text:p text:style-name="P289"/>
          <text:p text:style-name="P289"/>
          <text:h text:style-name="Heading_20_3" text:outline-level="3">Attacken</text:h>
          <text:p text:style-name="Standard">Um ein Ziel zu attackieren, legst du eine Probe auf Kämpfen ab.</text:p>
          <text:p text:style-name="Standard">Bei Erfolg erleidet das Ziel 1 Schaden (+1 Schaden bei einem meisterlichen Erfolg).</text:p>
          <text:p text:style-name="Standard"/>
          <text:p text:style-name="P290"><text:span text:style-name="T185">Hinweis, Fernkampf</text:span><text:span text:style-name="T183">: </text:span>Im Fernkampf erleidest du Nachteil, wenn das Ziel weit entfernt oder in Deckung ist.</text:p>
          <text:p text:style-name="Standard"/>
          <text:p text:style-name="P290"><text:span text:style-name="T185">Hinweis, Waffenlos</text:span><text:span text:style-name="T183">: </text:span>Im unbewaffneten Nahkampf kannst du statt Schaden anzurichten das Ziel festhalten oder ihm einen Gegenstand entreißen, sofern dies plausibel ist.</text:p>
          <text:p text:style-name="Standard"/>
          <text:h text:style-name="Heading_20_2" text:outline-level="2">Erzählerzug</text:h>
          <text:p text:style-name="Standard">Der Erzähler kontrolliert alle Figuren, die nicht von Spielern gesteuert werden.</text:p>
          <text:p text:style-name="Standard">Greift eine solche Figur einen Helden an, darf dieser eine Probe auf Zähigkeit (Parade) ablegen, um den Angriff abzuwehren.</text:p>
          <text:p text:style-name="Standard">Misslingt die Probe, erleidet das Ziel 1 Schaden.</text:p>
          <text:p text:style-name="Standard"/>
          <text:p text:style-name="P290"><text:span text:style-name="T3">Hinweis, </text:span><text:span text:style-name="T185">Multiparade</text:span>: Die meisten Figuren können <text:span text:style-name="T186">sich nur auf eine Parade pro Runde konzentrieren. </text:span>Jede weitere erleidet <text:span text:style-name="T183">einen</text:span> Nachteil.</text:p>
          <text:p text:style-name="P291"><text:span text:style-name="T187"/></text:p>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lef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 style:list-style-name="" style:class="chapter" style:master-page-name="">
      <loext:graphic-properties draw:fill="solid" draw:fill-color="#10141f"/>
      <style:paragraph-properties fo:margin-left="0pt" fo:margin-top="0pt" fo:margin-bottom="20.01pt" style:contextual-spacing="false" fo:line-height="100%" fo:text-align="center" style:justify-single-word="false" fo:orphans="2" fo:widows="2" style:register-true="false" fo:text-indent="0pt" style:auto-text-indent="false" style:page-number="auto" fo:background-color="#10141f" fo:padding-left="0pt" fo:padding-right="0pt" fo:padding-top="15pt" fo:padding-bottom="15pt" fo:border="none" text:number-lines="true" text:line-number="0" style:snap-to-layout-grid="false" style:writing-mode="lr-tb" style:join-border="false">
        <style:tab-stops/>
        <style:drop-cap/>
      </style:paragraph-properties>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pt" style:contextual-spacing="false" fo:line-height="100%" fo:text-align="lef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fo:color="#10141f" loext:opacity="10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center"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lef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right"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footer-left>
        <text:p text:style-name="MP1"><text:page-number text:select-page="current">22</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724</meta:editing-cycles>
    <meta:creation-date>2020-04-16T07:43:00</meta:creation-date>
    <dc:date>2026-06-16T21:44:18.893871290</dc:date>
    <meta:generator>LibreOffice/26.2.3.2$Linux_X86_64 LibreOffice_project/70e089b17412e4cb7773e41413306b17a2328c34</meta:generator>
    <meta:editing-duration>P1DT13H15M3S</meta:editing-duration>
    <meta:print-date>2026-04-02T15:54:51.081337174</meta:print-date>
    <meta:document-statistic meta:table-count="9" meta:image-count="0" meta:object-count="0" meta:page-count="23" meta:paragraph-count="594" meta:word-count="4209" meta:character-count="27873" meta:non-whitespace-character-count="24320"/>
    <meta:template xlink:type="simple" xlink:actuate="onRequest" xlink:title="Normal" xlink:href=""/>
  </office:meta>
</office:document-meta>
</file>