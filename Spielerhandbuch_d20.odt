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Bold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adornments="Regular" style:font-family-generic="roman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505.3pt" fo:margin-top="0pt" fo:margin-bottom="0pt" table:align="margins" style:writing-mode="lr-tb"/>
    </style:style>
    <style:style style:name="Table2.A" style:family="table-column">
      <style:table-column-properties style:column-width="505.3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8" style:family="table">
      <style:table-properties style:width="505.3pt" table:align="margins" style:writing-mode="lr-tb"/>
    </style:style>
    <style:style style:name="Table8.A" style:family="table-column">
      <style:table-column-properties style:column-width="62.5pt" style:rel-column-width="8105*"/>
    </style:style>
    <style:style style:name="Table8.B" style:family="table-column">
      <style:table-column-properties style:column-width="442.8pt" style:rel-column-width="57430*"/>
    </style:style>
    <style:style style:name="Table8.A1" style:family="table-cell">
      <style:table-cell-properties fo:background-color="#10141f" fo:padding="2.75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10141f" fo:padding="2.75pt" fo:border="0.5pt solid #000000">
        <style:background-image/>
      </style:table-cell-properties>
    </style:style>
    <style:style style:name="Table8.A2" style:family="table-cell">
      <style:table-cell-properties fo:padding="2.75pt" fo:border-left="0.5pt solid #000000" fo:border-right="none" fo:border-top="none" fo:border-bottom="0.5pt solid #000000"/>
    </style:style>
    <style:style style:name="Table8.B2" style:family="table-cell">
      <style:table-cell-properties fo:padding="2.75pt" fo:border-left="0.5pt solid #000000" fo:border-right="0.5pt solid #000000" fo:border-top="none" fo:border-bottom="0.5pt solid #000000"/>
    </style:style>
    <style:style style:name="Table8.A3" style:family="table-cell">
      <style:table-cell-properties fo:padding="2.75pt" fo:border-left="0.5pt solid #000000" fo:border-right="none" fo:border-top="none" fo:border-bottom="0.5pt solid #000000"/>
    </style:style>
    <style:style style:name="Table8.B3" style:family="table-cell">
      <style:table-cell-properties fo:padding="2.75pt" fo:border-left="0.5pt solid #000000" fo:border-right="0.5pt solid #000000" fo:border-top="none" fo:border-bottom="0.5pt solid #000000"/>
    </style:style>
    <style:style style:name="Table8.A4" style:family="table-cell">
      <style:table-cell-properties fo:padding="2.75pt" fo:border-left="0.5pt solid #000000" fo:border-right="none" fo:border-top="none" fo:border-bottom="0.5pt solid #000000"/>
    </style:style>
    <style:style style:name="Table8.B4" style:family="table-cell">
      <style:table-cell-properties fo:padding="2.75pt" fo:border-left="0.5pt solid #000000" fo:border-right="0.5pt solid #000000" fo:border-top="none" fo:border-bottom="0.5pt solid #000000"/>
    </style:style>
    <style:style style:name="Table4" style:family="table">
      <style:table-properties style:width="240.15pt" table:align="margins" style:writing-mode="lr-tb"/>
    </style:style>
    <style:style style:name="Table4.A" style:family="table-column">
      <style:table-column-properties style:column-width="80.05pt" style:rel-column-width="21845*"/>
    </style:style>
    <style:style style:name="Table4.A1" style:family="table-cell">
      <style:table-cell-properties style:vertical-align=""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" fo:padding="2.75pt" fo:border-left="none" fo:border-right="none" fo:border-top="none" fo:border-bottom="0.5pt solid #000000"/>
    </style:style>
    <style:style style:name="Table4.B2" style:family="table-cell">
      <style:table-cell-properties style:vertical-align="" fo:padding="2.75pt" fo:border-left="none" fo:border-right="none" fo:border-top="none" fo:border-bottom="0.5pt solid #000000"/>
    </style:style>
    <style:style style:name="Table4.C2" style:family="table-cell">
      <style:table-cell-properties style:vertical-align="" fo:padding="2.75pt" fo:border-left="none" fo:border-right="none" fo:border-top="none" fo:border-bottom="0.5pt solid #000000"/>
    </style:style>
    <style:style style:name="Table4.A3" style:family="table-cell">
      <style:table-cell-properties style:vertical-align="" fo:padding="2.75pt" fo:border-left="none" fo:border-right="none" fo:border-top="none" fo:border-bottom="0.5pt solid #000000"/>
    </style:style>
    <style:style style:name="Table4.B3" style:family="table-cell">
      <style:table-cell-properties style:vertical-align="" fo:padding="2.75pt" fo:border-left="none" fo:border-right="none" fo:border-top="none" fo:border-bottom="0.5pt solid #000000"/>
    </style:style>
    <style:style style:name="Table4.C3" style:family="table-cell">
      <style:table-cell-properties style:vertical-align="" fo:padding="2.75pt" fo:border-left="none" fo:border-right="none" fo:border-top="none" fo:border-bottom="0.5pt solid #000000"/>
    </style:style>
    <style:style style:name="Table4.A4" style:family="table-cell">
      <style:table-cell-properties style:vertical-align="" fo:padding="2.75pt" fo:border-left="none" fo:border-right="none" fo:border-top="none" fo:border-bottom="0.5pt solid #000000"/>
    </style:style>
    <style:style style:name="Table4.B4" style:family="table-cell">
      <style:table-cell-properties style:vertical-align="" fo:padding="2.75pt" fo:border-left="none" fo:border-right="none" fo:border-top="none" fo:border-bottom="0.5pt solid #000000"/>
    </style:style>
    <style:style style:name="Table4.C4" style:family="table-cell">
      <style:table-cell-properties style:vertical-align="" fo:padding="2.75pt" fo:border-left="none" fo:border-right="none" fo:border-top="none" fo:border-bottom="0.5pt solid #000000"/>
    </style:style>
    <style:style style:name="Table7" style:family="table">
      <style:table-properties style:width="505.3pt" table:align="margins" style:writing-mode="lr-tb"/>
    </style:style>
    <style:style style:name="Table7.A" style:family="table-column">
      <style:table-column-properties style:column-width="98.8pt" style:rel-column-width="12813*"/>
    </style:style>
    <style:style style:name="Table7.B" style:family="table-column">
      <style:table-column-properties style:column-width="35.6pt" style:rel-column-width="4617*"/>
    </style:style>
    <style:style style:name="Table7.C" style:family="table-column">
      <style:table-column-properties style:column-width="36.25pt" style:rel-column-width="4701*"/>
    </style:style>
    <style:style style:name="Table7.D" style:family="table-column">
      <style:table-column-properties style:column-width="334.65pt" style:rel-column-width="43404*"/>
    </style:style>
    <style:style style:name="Table7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7.A2" style:family="table-cell">
      <style:table-cell-properties fo:padding="2.75pt" fo:border-left="none" fo:border-right="none" fo:border-top="none" fo:border-bottom="0.5pt solid #000000"/>
    </style:style>
    <style:style style:name="Table7.B2" style:family="table-cell">
      <style:table-cell-properties fo:padding="2.75pt" fo:border-left="none" fo:border-right="none" fo:border-top="none" fo:border-bottom="0.5pt solid #000000"/>
    </style:style>
    <style:style style:name="Table7.C2" style:family="table-cell">
      <style:table-cell-properties fo:padding="2.75pt" fo:border-left="none" fo:border-right="none" fo:border-top="none" fo:border-bottom="0.5pt solid #000000"/>
    </style:style>
    <style:style style:name="Table7.D2" style:family="table-cell">
      <style:table-cell-properties fo:padding="2.75pt" fo:border-left="none" fo:border-right="none" fo:border-top="none" fo:border-bottom="0.5pt solid #000000"/>
    </style:style>
    <style:style style:name="Table7.A3" style:family="table-cell">
      <style:table-cell-properties fo:padding="2.75pt" fo:border-left="none" fo:border-right="none" fo:border-top="none" fo:border-bottom="0.5pt solid #000000"/>
    </style:style>
    <style:style style:name="Table7.B3" style:family="table-cell">
      <style:table-cell-properties fo:padding="2.75pt" fo:border-left="none" fo:border-right="none" fo:border-top="none" fo:border-bottom="0.5pt solid #000000"/>
    </style:style>
    <style:style style:name="Table7.C3" style:family="table-cell">
      <style:table-cell-properties fo:padding="2.75pt" fo:border-left="none" fo:border-right="none" fo:border-top="none" fo:border-bottom="0.5pt solid #000000"/>
    </style:style>
    <style:style style:name="Table7.D3" style:family="table-cell">
      <style:table-cell-properties fo:padding="2.75pt" fo:border-left="none" fo:border-right="none" fo:border-top="none" fo:border-bottom="0.5pt solid #000000"/>
    </style:style>
    <style:style style:name="Table7.A4" style:family="table-cell">
      <style:table-cell-properties fo:padding="2.75pt" fo:border-left="none" fo:border-right="none" fo:border-top="none" fo:border-bottom="0.5pt solid #000000"/>
    </style:style>
    <style:style style:name="Table7.B4" style:family="table-cell">
      <style:table-cell-properties fo:padding="2.75pt" fo:border-left="none" fo:border-right="none" fo:border-top="none" fo:border-bottom="0.5pt solid #000000"/>
    </style:style>
    <style:style style:name="Table7.C4" style:family="table-cell">
      <style:table-cell-properties fo:padding="2.75pt" fo:border-left="none" fo:border-right="none" fo:border-top="none" fo:border-bottom="0.5pt solid #000000"/>
    </style:style>
    <style:style style:name="Table7.D4" style:family="table-cell">
      <style:table-cell-properties fo:padding="2.75pt" fo:border-left="none" fo:border-right="none" fo:border-top="none" fo:border-bottom="0.5pt solid #000000"/>
    </style:style>
    <style:style style:name="Table7.A5" style:family="table-cell">
      <style:table-cell-properties fo:padding="2.75pt" fo:border-left="none" fo:border-right="none" fo:border-top="none" fo:border-bottom="0.5pt solid #000000"/>
    </style:style>
    <style:style style:name="Table7.B5" style:family="table-cell">
      <style:table-cell-properties fo:padding="2.75pt" fo:border-left="none" fo:border-right="none" fo:border-top="none" fo:border-bottom="0.5pt solid #000000"/>
    </style:style>
    <style:style style:name="Table7.C5" style:family="table-cell">
      <style:table-cell-properties fo:padding="2.75pt" fo:border-left="none" fo:border-right="none" fo:border-top="none" fo:border-bottom="0.5pt solid #000000"/>
    </style:style>
    <style:style style:name="Table7.D5" style:family="table-cell">
      <style:table-cell-properties fo:padding="2.75pt" fo:border-left="none" fo:border-right="none" fo:border-top="none" fo:border-bottom="0.5pt solid #000000"/>
    </style:style>
    <style:style style:name="Table6" style:family="table">
      <style:table-properties style:width="505.3pt" table:align="margins" style:writing-mode="lr-tb"/>
    </style:style>
    <style:style style:name="Table6.A" style:family="table-column">
      <style:table-column-properties style:column-width="170.75pt" style:rel-column-width="3415*"/>
    </style:style>
    <style:style style:name="Table6.B" style:family="table-column">
      <style:table-column-properties style:column-width="36.35pt" style:rel-column-width="727*"/>
    </style:style>
    <style:style style:name="Table6.C" style:family="table-column">
      <style:table-column-properties style:column-width="35.8pt" style:rel-column-width="716*"/>
    </style:style>
    <style:style style:name="Table6.D" style:family="table-column">
      <style:table-column-properties style:column-width="262.4pt" style:rel-column-width="5248*"/>
    </style:style>
    <style:style style:name="Table6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6.A2" style:family="table-cell">
      <style:table-cell-properties fo:padding="2.75pt" fo:border-left="none" fo:border-right="none" fo:border-top="none" fo:border-bottom="0.5pt solid #000000"/>
    </style:style>
    <style:style style:name="Table6.B2" style:family="table-cell">
      <style:table-cell-properties fo:padding="2.75pt" fo:border-left="none" fo:border-right="none" fo:border-top="none" fo:border-bottom="0.5pt solid #000000"/>
    </style:style>
    <style:style style:name="Table6.C2" style:family="table-cell">
      <style:table-cell-properties fo:padding="2.75pt" fo:border-left="none" fo:border-right="none" fo:border-top="none" fo:border-bottom="0.5pt solid #000000"/>
    </style:style>
    <style:style style:name="Table6.D2" style:family="table-cell">
      <style:table-cell-properties fo:padding="2.75pt" fo:border-left="none" fo:border-right="none" fo:border-top="none" fo:border-bottom="0.5pt solid #000000"/>
    </style:style>
    <style:style style:name="Table6.A3" style:family="table-cell">
      <style:table-cell-properties fo:padding="2.75pt" fo:border-left="none" fo:border-right="none" fo:border-top="none" fo:border-bottom="0.5pt solid #000000"/>
    </style:style>
    <style:style style:name="Table6.B3" style:family="table-cell">
      <style:table-cell-properties fo:padding="2.75pt" fo:border-left="none" fo:border-right="none" fo:border-top="none" fo:border-bottom="0.5pt solid #000000"/>
    </style:style>
    <style:style style:name="Table6.C3" style:family="table-cell">
      <style:table-cell-properties fo:padding="2.75pt" fo:border-left="none" fo:border-right="none" fo:border-top="none" fo:border-bottom="0.5pt solid #000000"/>
    </style:style>
    <style:style style:name="Table6.D3" style:family="table-cell">
      <style:table-cell-properties fo:padding="2.75pt" fo:border-left="none" fo:border-right="none" fo:border-top="none" fo:border-bottom="0.5pt solid #000000"/>
    </style:style>
    <style:style style:name="Table6.A4" style:family="table-cell">
      <style:table-cell-properties fo:padding="2.75pt" fo:border-left="none" fo:border-right="none" fo:border-top="none" fo:border-bottom="0.5pt solid #000000"/>
    </style:style>
    <style:style style:name="Table6.B4" style:family="table-cell">
      <style:table-cell-properties fo:padding="2.75pt" fo:border-left="none" fo:border-right="none" fo:border-top="none" fo:border-bottom="0.5pt solid #000000"/>
    </style:style>
    <style:style style:name="Table6.C4" style:family="table-cell">
      <style:table-cell-properties fo:padding="2.75pt" fo:border-left="none" fo:border-right="none" fo:border-top="none" fo:border-bottom="0.5pt solid #000000"/>
    </style:style>
    <style:style style:name="Table6.D4" style:family="table-cell">
      <style:table-cell-properties fo:padding="2.75pt" fo:border-left="none" fo:border-right="none" fo:border-top="none" fo:border-bottom="0.5pt solid #000000"/>
    </style:style>
    <style:style style:name="Table6.A5" style:family="table-cell">
      <style:table-cell-properties fo:padding="2.75pt" fo:border-left="none" fo:border-right="none" fo:border-top="none" fo:border-bottom="0.5pt solid #000000"/>
    </style:style>
    <style:style style:name="Table6.B5" style:family="table-cell">
      <style:table-cell-properties fo:padding="2.75pt" fo:border-left="none" fo:border-right="none" fo:border-top="none" fo:border-bottom="0.5pt solid #000000"/>
    </style:style>
    <style:style style:name="Table6.C5" style:family="table-cell">
      <style:table-cell-properties fo:padding="2.75pt" fo:border-left="none" fo:border-right="none" fo:border-top="none" fo:border-bottom="0.5pt solid #000000"/>
    </style:style>
    <style:style style:name="Table6.D5" style:family="table-cell">
      <style:table-cell-properties fo:padding="2.75pt" fo:border-left="none" fo:border-right="none" fo:border-top="none" fo:border-bottom="0.5pt solid #000000"/>
    </style:style>
    <style:style style:name="Table1" style:family="table">
      <style:table-properties style:width="505.3pt" table:align="margins" style:writing-mode="lr-tb"/>
    </style:style>
    <style:style style:name="Table1.A" style:family="table-column">
      <style:table-column-properties style:column-width="98.75pt" style:rel-column-width="12807*"/>
    </style:style>
    <style:style style:name="Table1.B" style:family="table-column">
      <style:table-column-properties style:column-width="35.65pt" style:rel-column-width="4623*"/>
    </style:style>
    <style:style style:name="Table1.C" style:family="table-column">
      <style:table-column-properties style:column-width="36.25pt" style:rel-column-width="4701*"/>
    </style:style>
    <style:style style:name="Table1.D" style:family="table-column">
      <style:table-column-properties style:column-width="334.65pt" style:rel-column-width="43404*"/>
    </style:style>
    <style:style style:name="Table1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fo:padding="2.75pt" fo:border-left="none" fo:border-right="none" fo:border-top="none" fo:border-bottom="0.5pt solid #000000"/>
    </style:style>
    <style:style style:name="Table1.B2" style:family="table-cell">
      <style:table-cell-properties fo:padding="2.75pt" fo:border-left="none" fo:border-right="none" fo:border-top="none" fo:border-bottom="0.5pt solid #000000"/>
    </style:style>
    <style:style style:name="Table1.C2" style:family="table-cell">
      <style:table-cell-properties fo:padding="2.75pt" fo:border-left="none" fo:border-right="none" fo:border-top="none" fo:border-bottom="0.5pt solid #000000"/>
    </style:style>
    <style:style style:name="Table1.D2" style:family="table-cell">
      <style:table-cell-properties fo:padding="2.75pt" fo:border-left="none" fo:border-right="none" fo:border-top="none" fo:border-bottom="0.5pt solid #000000"/>
    </style:style>
    <style:style style:name="Table1.A3" style:family="table-cell">
      <style:table-cell-properties fo:padding="2.75pt" fo:border-left="none" fo:border-right="none" fo:border-top="none" fo:border-bottom="0.5pt solid #000000"/>
    </style:style>
    <style:style style:name="Table1.B3" style:family="table-cell">
      <style:table-cell-properties fo:padding="2.75pt" fo:border-left="none" fo:border-right="none" fo:border-top="none" fo:border-bottom="0.5pt solid #000000"/>
    </style:style>
    <style:style style:name="Table1.C3" style:family="table-cell">
      <style:table-cell-properties fo:padding="2.75pt" fo:border-left="none" fo:border-right="none" fo:border-top="none" fo:border-bottom="0.5pt solid #000000"/>
    </style:style>
    <style:style style:name="Table1.D3" style:family="table-cell">
      <style:table-cell-properties fo:padding="2.75pt" fo:border-left="none" fo:border-right="none" fo:border-top="none" fo:border-bottom="0.5pt solid #000000"/>
    </style:style>
    <style:style style:name="Table1.A4" style:family="table-cell">
      <style:table-cell-properties fo:padding="2.75pt" fo:border-left="none" fo:border-right="none" fo:border-top="none" fo:border-bottom="0.5pt solid #000000"/>
    </style:style>
    <style:style style:name="Table1.B4" style:family="table-cell">
      <style:table-cell-properties fo:padding="2.75pt" fo:border-left="none" fo:border-right="none" fo:border-top="none" fo:border-bottom="0.5pt solid #000000"/>
    </style:style>
    <style:style style:name="Table1.C4" style:family="table-cell">
      <style:table-cell-properties fo:padding="2.75pt" fo:border-left="none" fo:border-right="none" fo:border-top="none" fo:border-bottom="0.5pt solid #000000"/>
    </style:style>
    <style:style style:name="Table1.D4" style:family="table-cell">
      <style:table-cell-properties fo:padding="2.75pt" fo:border-left="none" fo:border-right="none" fo:border-top="none" fo:border-bottom="0.5pt solid #000000"/>
    </style:style>
    <style:style style:name="Table3" style:family="table">
      <style:table-properties style:width="505.3pt" table:align="margins" style:writing-mode="lr-tb"/>
    </style:style>
    <style:style style:name="Table3.A" style:family="table-column">
      <style:table-column-properties style:column-width="109.05pt" style:rel-column-width="14144*"/>
    </style:style>
    <style:style style:name="Table3.B" style:family="table-column">
      <style:table-column-properties style:column-width="396.25pt" style:rel-column-width="51391*"/>
    </style:style>
    <style:style style:name="Table3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3.A2" style:family="table-cell">
      <style:table-cell-properties fo:padding="2.75pt" fo:border-left="none" fo:border-right="none" fo:border-top="none" fo:border-bottom="0.5pt solid #000000"/>
    </style:style>
    <style:style style:name="Table3.B2" style:family="table-cell">
      <style:table-cell-properties fo:padding="2.75pt" fo:border-left="none" fo:border-right="none" fo:border-top="none" fo:border-bottom="0.5pt solid #000000"/>
    </style:style>
    <style:style style:name="Table3.A3" style:family="table-cell">
      <style:table-cell-properties fo:padding="2.75pt" fo:border-left="none" fo:border-right="none" fo:border-top="none" fo:border-bottom="0.5pt solid #000000"/>
    </style:style>
    <style:style style:name="Table3.B3" style:family="table-cell">
      <style:table-cell-properties fo:padding="2.75pt" fo:border-left="none" fo:border-right="none" fo:border-top="none" fo:border-bottom="0.5pt solid #000000"/>
    </style:style>
    <style:style style:name="Table3.A4" style:family="table-cell">
      <style:table-cell-properties fo:padding="2.75pt" fo:border-left="none" fo:border-right="none" fo:border-top="none" fo:border-bottom="0.5pt solid #000000"/>
    </style:style>
    <style:style style:name="Table3.B4" style:family="table-cell">
      <style:table-cell-properties fo:padding="2.75pt" fo:border-left="none" fo:border-right="none" fo:border-top="none" fo:border-bottom="0.5pt solid #000000"/>
    </style:style>
    <style:style style:name="Table3.A5" style:family="table-cell">
      <style:table-cell-properties fo:padding="2.75pt" fo:border-left="none" fo:border-right="none" fo:border-top="none" fo:border-bottom="0.5pt solid #000000"/>
    </style:style>
    <style:style style:name="Table3.B5" style:family="table-cell">
      <style:table-cell-properties fo:padding="2.75pt" fo:border-left="none" fo:border-right="none" fo:border-top="none" fo:border-bottom="0.5pt solid #000000"/>
    </style:style>
    <style:style style:name="Table3.A6" style:family="table-cell">
      <style:table-cell-properties fo:padding="2.75pt" fo:border-left="none" fo:border-right="none" fo:border-top="none" fo:border-bottom="0.5pt solid #000000"/>
    </style:style>
    <style:style style:name="Table3.B6" style:family="table-cell">
      <style:table-cell-properties fo:padding="2.75pt" fo:border-left="none" fo:border-right="none" fo:border-top="none" fo:border-bottom="0.5pt solid #000000"/>
    </style:style>
    <style:style style:name="Table3.A7" style:family="table-cell">
      <style:table-cell-properties fo:padding="2.75pt" fo:border-left="none" fo:border-right="none" fo:border-top="none" fo:border-bottom="0.5pt solid #000000"/>
    </style:style>
    <style:style style:name="Table3.B7" style:family="table-cell">
      <style:table-cell-properties fo:padding="2.75pt" fo:border-left="none" fo:border-right="none" fo:border-top="none" fo:border-bottom="0.5pt solid #000000"/>
    </style:style>
    <style:style style:name="Table3.A8" style:family="table-cell">
      <style:table-cell-properties fo:padding="2.75pt" fo:border-left="none" fo:border-right="none" fo:border-top="none" fo:border-bottom="0.5pt solid #000000"/>
    </style:style>
    <style:style style:name="Table3.B8" style:family="table-cell">
      <style:table-cell-properties fo:padding="2.75pt" fo:border-left="none" fo:border-right="none" fo:border-top="none" fo:border-bottom="0.5pt solid #000000"/>
    </style:style>
    <style:style style:name="Table3.A9" style:family="table-cell">
      <style:table-cell-properties fo:padding="2.75pt" fo:border-left="none" fo:border-right="none" fo:border-top="none" fo:border-bottom="0.5pt solid #000000"/>
    </style:style>
    <style:style style:name="Table3.B9" style:family="table-cell">
      <style:table-cell-properties fo:padding="2.75pt" fo:border-left="none" fo:border-right="none" fo:border-top="none" fo:border-bottom="0.5pt solid #000000"/>
    </style:style>
    <style:style style:name="Table3.A10" style:family="table-cell">
      <style:table-cell-properties fo:padding="2.75pt" fo:border-left="none" fo:border-right="none" fo:border-top="none" fo:border-bottom="0.5pt solid #000000"/>
    </style:style>
    <style:style style:name="Table3.B10" style:family="table-cell">
      <style:table-cell-properties fo:padding="2.75pt" fo:border-left="none" fo:border-right="none" fo:border-top="none" fo:border-bottom="0.5pt solid #000000"/>
    </style:style>
    <style:style style:name="Table5" style:family="table">
      <style:table-properties style:width="240.15pt" table:align="margins" style:writing-mode="lr-tb"/>
    </style:style>
    <style:style style:name="Table5.A" style:family="table-column">
      <style:table-column-properties style:column-width="48.75pt" style:rel-column-width="13303*"/>
    </style:style>
    <style:style style:name="Table5.B" style:family="table-column">
      <style:table-column-properties style:column-width="191.4pt" style:rel-column-width="52232*"/>
    </style:style>
    <style:style style:name="Table5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5.A2" style:family="table-cell">
      <style:table-cell-properties fo:padding="2.75pt" fo:border-left="none" fo:border-right="none" fo:border-top="none" fo:border-bottom="0.5pt solid #000000"/>
    </style:style>
    <style:style style:name="Table5.B2" style:family="table-cell">
      <style:table-cell-properties fo:padding="2.75pt" fo:border-left="none" fo:border-right="none" fo:border-top="none" fo:border-bottom="0.5pt solid #000000"/>
    </style:style>
    <style:style style:name="Table5.A3" style:family="table-cell">
      <style:table-cell-properties fo:padding="2.75pt" fo:border-left="none" fo:border-right="none" fo:border-top="none" fo:border-bottom="0.5pt solid #000000"/>
    </style:style>
    <style:style style:name="Table5.B3" style:family="table-cell">
      <style:table-cell-properties fo:padding="2.75pt" fo:border-left="none" fo:border-right="none" fo:border-top="none" fo:border-bottom="0.5pt solid #000000"/>
    </style:style>
    <style:style style:name="Table5.A4" style:family="table-cell">
      <style:table-cell-properties fo:padding="2.75pt" fo:border-left="none" fo:border-right="none" fo:border-top="none" fo:border-bottom="0.5pt solid #000000"/>
    </style:style>
    <style:style style:name="Table5.B4" style:family="table-cell">
      <style:table-cell-properties fo:padding="2.75pt" fo:border-left="none" fo:border-right="none" fo:border-top="none" fo:border-bottom="0.5pt solid #000000"/>
    </style:style>
    <style:style style:name="Table5.A5" style:family="table-cell">
      <style:table-cell-properties fo:padding="2.75pt" fo:border-left="none" fo:border-right="none" fo:border-top="none" fo:border-bottom="0.5pt solid #000000"/>
    </style:style>
    <style:style style:name="Table5.B5" style:family="table-cell">
      <style:table-cell-properties fo:padding="2.75pt" fo:border-left="none" fo:border-right="none" fo:border-top="none" fo:border-bottom="0.5pt solid #000000"/>
    </style:style>
    <style:style style:name="Table5.A6" style:family="table-cell">
      <style:table-cell-properties fo:padding="2.75pt" fo:border-left="none" fo:border-right="none" fo:border-top="none" fo:border-bottom="0.5pt solid #000000"/>
    </style:style>
    <style:style style:name="Table5.B6" style:family="table-cell">
      <style:table-cell-properties fo:padding="2.75pt" fo:border-left="none" fo:border-right="none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Standard">
      <style:text-properties officeooo:paragraph-rsid="0105c84a"/>
    </style:style>
    <style:style style:name="P3" style:family="paragraph" style:parent-style-name="Standard" style:list-style-name="L1">
      <style:text-properties officeooo:paragraph-rsid="01def656"/>
    </style:style>
    <style:style style:name="P4" style:family="paragraph" style:parent-style-name="Standard" style:list-style-name="L1">
      <style:text-properties officeooo:rsid="0105c84a" officeooo:paragraph-rsid="01fc890f"/>
    </style:style>
    <style:style style:name="P5" style:family="paragraph" style:parent-style-name="Standard" style:list-style-name="L1">
      <style:text-properties officeooo:paragraph-rsid="0139dde3"/>
    </style:style>
    <style:style style:name="P6" style:family="paragraph" style:parent-style-name="List_20_Paragraph" style:list-style-name="L2">
      <style:text-properties officeooo:rsid="011b3104" officeooo:paragraph-rsid="0139dde3"/>
    </style:style>
    <style:style style:name="P7" style:family="paragraph" style:parent-style-name="List_20_Paragraph" style:list-style-name="L2">
      <style:text-properties officeooo:rsid="01537011" officeooo:paragraph-rsid="01537011"/>
    </style:style>
    <style:style style:name="P8" style:family="paragraph" style:parent-style-name="Standard" style:list-style-name="L1">
      <style:text-properties fo:font-weight="normal" officeooo:rsid="0218354f" officeooo:paragraph-rsid="0283f71c" style:font-weight-asian="normal" style:font-weight-complex="normal"/>
    </style:style>
    <style:style style:name="P9" style:family="paragraph" style:parent-style-name="Standard" style:list-style-name="L1">
      <style:text-properties officeooo:rsid="00fbd6a4" officeooo:paragraph-rsid="00fbd6a4"/>
    </style:style>
    <style:style style:name="P10" style:family="paragraph" style:parent-style-name="Standard" style:list-style-name="L1">
      <style:text-properties officeooo:paragraph-rsid="01f4d272"/>
    </style:style>
    <style:style style:name="P11" style:family="paragraph" style:parent-style-name="Standard" style:list-style-name="L1">
      <style:text-properties officeooo:paragraph-rsid="006cb291"/>
    </style:style>
    <style:style style:name="P12" style:family="paragraph" style:parent-style-name="Heading_20_1">
      <style:paragraph-properties fo:break-before="page"/>
      <style:text-properties officeooo:paragraph-rsid="003f62b7"/>
    </style:style>
    <style:style style:name="P13" style:family="paragraph" style:parent-style-name="Standard">
      <style:text-properties officeooo:paragraph-rsid="00d323f9"/>
    </style:style>
    <style:style style:name="P14" style:family="paragraph" style:parent-style-name="Heading_20_2">
      <style:text-properties officeooo:rsid="00ca99e7" officeooo:paragraph-rsid="00d323f9"/>
    </style:style>
    <style:style style:name="P15" style:family="paragraph" style:parent-style-name="Standard">
      <style:text-properties officeooo:rsid="00ca99e7" officeooo:paragraph-rsid="00d323f9"/>
    </style:style>
    <style:style style:name="P16" style:family="paragraph" style:parent-style-name="Standard">
      <style:text-properties officeooo:rsid="00c95a39" officeooo:paragraph-rsid="00d323f9"/>
    </style:style>
    <style:style style:name="P17" style:family="paragraph" style:parent-style-name="Heading_20_2">
      <style:text-properties officeooo:paragraph-rsid="0127a33f"/>
    </style:style>
    <style:style style:name="P18" style:family="paragraph" style:parent-style-name="Heading_20_3">
      <style:text-properties officeooo:paragraph-rsid="0127a33f"/>
    </style:style>
    <style:style style:name="P19" style:family="paragraph" style:parent-style-name="Standard">
      <style:text-properties officeooo:rsid="0127a33f" officeooo:paragraph-rsid="0127a33f"/>
    </style:style>
    <style:style style:name="P20" style:family="paragraph" style:parent-style-name="Standard">
      <style:text-properties officeooo:paragraph-rsid="0127a33f"/>
    </style:style>
    <style:style style:name="P21" style:family="paragraph" style:parent-style-name="Standard">
      <style:text-properties officeooo:rsid="0127a33f" officeooo:paragraph-rsid="01297e03"/>
    </style:style>
    <style:style style:name="P22" style:family="paragraph" style:parent-style-name="Standard">
      <style:text-properties officeooo:paragraph-rsid="01297e03"/>
    </style:style>
    <style:style style:name="P23" style:family="paragraph" style:parent-style-name="Heading_20_3">
      <style:text-properties officeooo:rsid="012b3e17" officeooo:paragraph-rsid="012b3e17"/>
    </style:style>
    <style:style style:name="P24" style:family="paragraph" style:parent-style-name="Heading_20_3">
      <style:text-properties officeooo:rsid="01297e03" officeooo:paragraph-rsid="01297e03"/>
    </style:style>
    <style:style style:name="P25" style:family="paragraph" style:parent-style-name="Heading_20_3">
      <style:text-properties officeooo:rsid="023a7ab8" officeooo:paragraph-rsid="023a7ab8"/>
    </style:style>
    <style:style style:name="P26" style:family="paragraph" style:parent-style-name="Heading_20_3">
      <style:text-properties officeooo:rsid="02587caa" officeooo:paragraph-rsid="02587caa"/>
    </style:style>
    <style:style style:name="P27" style:family="paragraph" style:parent-style-name="Standard">
      <style:text-properties officeooo:rsid="0127a33f" officeooo:paragraph-rsid="01e5b977"/>
    </style:style>
    <style:style style:name="P28" style:family="paragraph" style:parent-style-name="Standard">
      <style:text-properties officeooo:rsid="01af756d" officeooo:paragraph-rsid="01af756d"/>
    </style:style>
    <style:style style:name="P29" style:family="paragraph" style:parent-style-name="Table_20_Contents">
      <style:paragraph-properties fo:text-align="left" style:justify-single-word="false"/>
      <style:text-properties officeooo:rsid="00f7eed7" officeooo:paragraph-rsid="012e8789"/>
    </style:style>
    <style:style style:name="P30" style:family="paragraph" style:parent-style-name="Standard">
      <style:text-properties officeooo:rsid="00ccde7a"/>
    </style:style>
    <style:style style:name="P31" style:family="paragraph" style:parent-style-name="Heading_20_1">
      <style:paragraph-properties fo:break-before="page"/>
      <style:text-properties officeooo:paragraph-rsid="02879403"/>
    </style:style>
    <style:style style:name="P32" style:family="paragraph" style:parent-style-name="Standard">
      <style:text-properties officeooo:paragraph-rsid="02879403"/>
    </style:style>
    <style:style style:name="P33" style:family="paragraph" style:parent-style-name="Heading_20_2">
      <style:text-properties officeooo:rsid="01127a28" officeooo:paragraph-rsid="02879403"/>
    </style:style>
    <style:style style:name="P34" style:family="paragraph" style:parent-style-name="Standard">
      <style:text-properties officeooo:rsid="01192e68" officeooo:paragraph-rsid="02879403"/>
    </style:style>
    <style:style style:name="P35" style:family="paragraph" style:parent-style-name="Standard">
      <style:text-properties officeooo:rsid="0114a605" officeooo:paragraph-rsid="02879403"/>
    </style:style>
    <style:style style:name="P36" style:family="paragraph" style:parent-style-name="Heading_20_2">
      <style:text-properties officeooo:paragraph-rsid="02879403"/>
    </style:style>
    <style:style style:name="P37" style:family="paragraph" style:parent-style-name="Standard">
      <style:text-properties officeooo:rsid="017cc684" officeooo:paragraph-rsid="02879403"/>
    </style:style>
    <style:style style:name="P38" style:family="paragraph" style:parent-style-name="Heading_20_2">
      <style:text-properties officeooo:rsid="00c34092" officeooo:paragraph-rsid="02879403"/>
    </style:style>
    <style:style style:name="P39" style:family="paragraph" style:parent-style-name="List_20_Paragraph" style:list-style-name="L3">
      <style:text-properties fo:font-weight="normal" officeooo:paragraph-rsid="02879403" style:font-weight-asian="normal" style:font-weight-complex="normal"/>
    </style:style>
    <style:style style:name="P40" style:family="paragraph" style:parent-style-name="List_20_Paragraph" style:list-style-name="L3">
      <style:text-properties fo:font-weight="normal" officeooo:rsid="01c118ce" officeooo:paragraph-rsid="02879403" style:font-weight-asian="normal" style:font-weight-complex="normal"/>
    </style:style>
    <style:style style:name="P41" style:family="paragraph" style:parent-style-name="Heading_20_2">
      <style:text-properties officeooo:rsid="01fb52c4" officeooo:paragraph-rsid="02879403"/>
    </style:style>
    <style:style style:name="P42" style:family="paragraph" style:parent-style-name="Standard">
      <style:text-properties officeooo:rsid="011a8ea4" officeooo:paragraph-rsid="02879403"/>
    </style:style>
    <style:style style:name="P43" style:family="paragraph" style:parent-style-name="List_20_Paragraph" style:list-style-name="L4">
      <style:text-properties officeooo:paragraph-rsid="02879403"/>
    </style:style>
    <style:style style:name="P44" style:family="paragraph" style:parent-style-name="List_20_Paragraph">
      <style:text-properties officeooo:paragraph-rsid="02879403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Standard">
      <style:text-properties officeooo:rsid="02879403" officeooo:paragraph-rsid="02879403"/>
    </style:style>
    <style:style style:name="P47" style:family="paragraph" style:parent-style-name="Standard">
      <style:text-properties officeooo:rsid="02116a0a" officeooo:paragraph-rsid="02156d29"/>
    </style:style>
    <style:style style:name="P48" style:family="paragraph" style:parent-style-name="Table_20_Header">
      <style:text-properties officeooo:paragraph-rsid="02156d29"/>
    </style:style>
    <style:style style:name="P49" style:family="paragraph" style:parent-style-name="Table_20_Header">
      <style:paragraph-properties fo:text-align="left" style:justify-single-word="false"/>
      <style:text-properties officeooo:rsid="02156d29" officeooo:paragraph-rsid="02156d29"/>
    </style:style>
    <style:style style:name="P50" style:family="paragraph" style:parent-style-name="Table_20_Contents">
      <style:text-properties officeooo:rsid="02138e0f" officeooo:paragraph-rsid="02156d29"/>
    </style:style>
    <style:style style:name="P51" style:family="paragraph" style:parent-style-name="Table_20_Contents">
      <style:paragraph-properties fo:text-align="left" style:justify-single-word="false"/>
      <style:text-properties officeooo:rsid="02156d29" officeooo:paragraph-rsid="02156d29"/>
    </style:style>
    <style:style style:name="P52" style:family="paragraph" style:parent-style-name="Table_20_Contents">
      <style:text-properties officeooo:rsid="02156d29" officeooo:paragraph-rsid="02156d29"/>
    </style:style>
    <style:style style:name="P53" style:family="paragraph" style:parent-style-name="Standard">
      <style:text-properties officeooo:rsid="0211e772" officeooo:paragraph-rsid="02431f76"/>
    </style:style>
    <style:style style:name="P54" style:family="paragraph" style:parent-style-name="Standard">
      <style:text-properties officeooo:rsid="0211e772" officeooo:paragraph-rsid="0277ad74"/>
    </style:style>
    <style:style style:name="P55" style:family="paragraph" style:parent-style-name="Standard">
      <style:text-properties officeooo:rsid="026c7585" officeooo:paragraph-rsid="026c7585"/>
    </style:style>
    <style:style style:name="P56" style:family="paragraph" style:parent-style-name="Standard">
      <style:text-properties officeooo:rsid="0251a371" officeooo:paragraph-rsid="0251a371"/>
    </style:style>
    <style:style style:name="P57" style:family="paragraph" style:parent-style-name="Heading_20_2">
      <style:paragraph-properties fo:break-before="page"/>
      <style:text-properties officeooo:rsid="0285b683" officeooo:paragraph-rsid="0285b683"/>
    </style:style>
    <style:style style:name="P58" style:family="paragraph" style:parent-style-name="Standard">
      <style:text-properties officeooo:rsid="025fb798" officeooo:paragraph-rsid="0277ad74"/>
    </style:style>
    <style:style style:name="P59" style:family="paragraph" style:parent-style-name="Standard">
      <style:text-properties officeooo:paragraph-rsid="0277ad74"/>
    </style:style>
    <style:style style:name="P60" style:family="paragraph" style:parent-style-name="TalentHeader">
      <style:text-properties officeooo:paragraph-rsid="0277ad74"/>
    </style:style>
    <style:style style:name="P61" style:family="paragraph" style:parent-style-name="Standard">
      <style:text-properties officeooo:rsid="02761c2a" officeooo:paragraph-rsid="02835bb7"/>
    </style:style>
    <style:style style:name="P62" style:family="paragraph" style:parent-style-name="Standard">
      <style:text-properties officeooo:paragraph-rsid="02887235"/>
    </style:style>
    <style:style style:name="P63" style:family="paragraph" style:parent-style-name="Standard">
      <style:text-properties fo:font-weight="bold" officeooo:rsid="0277ad74" officeooo:paragraph-rsid="0277ad74" style:font-weight-asian="bold" style:font-weight-complex="bold"/>
    </style:style>
    <style:style style:name="P64" style:family="paragraph" style:parent-style-name="Standard">
      <style:text-properties officeooo:paragraph-rsid="0285b683"/>
    </style:style>
    <style:style style:name="P65" style:family="paragraph" style:parent-style-name="Standard">
      <style:text-properties officeooo:rsid="0285b683" officeooo:paragraph-rsid="0285b683"/>
    </style:style>
    <style:style style:name="P66" style:family="paragraph" style:parent-style-name="Standard">
      <style:text-properties officeooo:rsid="0211e772" officeooo:paragraph-rsid="0285b683"/>
    </style:style>
    <style:style style:name="P67" style:family="paragraph" style:parent-style-name="Standard">
      <style:text-properties officeooo:rsid="0211e772" officeooo:paragraph-rsid="02835bb7"/>
    </style:style>
    <style:style style:name="P68" style:family="paragraph" style:parent-style-name="Standard">
      <style:text-properties officeooo:rsid="02037b48" officeooo:paragraph-rsid="0277ad7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Standard">
      <style:text-properties officeooo:rsid="025fb798" officeooo:paragraph-rsid="026c7585"/>
    </style:style>
    <style:style style:name="P71" style:family="paragraph" style:parent-style-name="TalentHeader">
      <style:text-properties officeooo:paragraph-rsid="025f075a"/>
    </style:style>
    <style:style style:name="P72" style:family="paragraph" style:parent-style-name="Standard">
      <style:text-properties officeooo:rsid="02761c2a" officeooo:paragraph-rsid="02761c2a"/>
    </style:style>
    <style:style style:name="P73" style:family="paragraph" style:parent-style-name="Standard">
      <style:text-properties officeooo:paragraph-rsid="025f075a"/>
    </style:style>
    <style:style style:name="P74" style:family="paragraph" style:parent-style-name="Standard">
      <style:text-properties officeooo:paragraph-rsid="02725407"/>
    </style:style>
    <style:style style:name="P75" style:family="paragraph" style:parent-style-name="Standard">
      <style:text-properties officeooo:rsid="02037b48" officeooo:paragraph-rsid="025f075a"/>
    </style:style>
    <style:style style:name="P76" style:family="paragraph" style:parent-style-name="Standard">
      <style:text-properties officeooo:rsid="024e0052" officeooo:paragraph-rsid="0261f5e2"/>
    </style:style>
    <style:style style:name="P77" style:family="paragraph" style:parent-style-name="Standard">
      <style:text-properties officeooo:rsid="02116a0a" officeooo:paragraph-rsid="025f075a"/>
    </style:style>
    <style:style style:name="P78" style:family="paragraph" style:parent-style-name="Standard">
      <style:text-properties officeooo:rsid="02765ba2" officeooo:paragraph-rsid="02883ddc"/>
    </style:style>
    <style:style style:name="P79" style:family="paragraph" style:parent-style-name="Standard">
      <style:text-properties officeooo:rsid="0201cdb5" officeooo:paragraph-rsid="025f075a"/>
    </style:style>
    <style:style style:name="P80" style:family="paragraph" style:parent-style-name="Standard">
      <style:text-properties officeooo:paragraph-rsid="02883ddc"/>
    </style:style>
    <style:style style:name="P81" style:family="paragraph" style:parent-style-name="Standard">
      <style:text-properties officeooo:paragraph-rsid="02765ba2"/>
    </style:style>
    <style:style style:name="P82" style:family="paragraph" style:parent-style-name="Standard">
      <style:text-properties officeooo:rsid="02116a0a" officeooo:paragraph-rsid="02765ba2"/>
    </style:style>
    <style:style style:name="P83" style:family="paragraph" style:parent-style-name="Standard">
      <style:text-properties officeooo:rsid="0211e772" officeooo:paragraph-rsid="025f075a"/>
    </style:style>
    <style:style style:name="P84" style:family="paragraph" style:parent-style-name="Standard">
      <style:text-properties fo:font-weight="normal" officeooo:rsid="0207719f" officeooo:paragraph-rsid="025f075a" style:font-weight-asian="normal" style:font-weight-complex="normal"/>
    </style:style>
    <style:style style:name="P85" style:family="paragraph" style:parent-style-name="Standard">
      <style:text-properties officeooo:rsid="025f075a" officeooo:paragraph-rsid="025f075a"/>
    </style:style>
    <style:style style:name="P86" style:family="paragraph" style:parent-style-name="Heading_20_2">
      <style:paragraph-properties fo:break-before="page"/>
      <style:text-properties officeooo:rsid="025fb798" officeooo:paragraph-rsid="025fb798"/>
    </style:style>
    <style:style style:name="P87" style:family="paragraph" style:parent-style-name="Standard">
      <style:text-properties officeooo:rsid="025fb798" officeooo:paragraph-rsid="025ffb69"/>
    </style:style>
    <style:style style:name="P88" style:family="paragraph" style:parent-style-name="Standard">
      <style:text-properties officeooo:rsid="02688db5" officeooo:paragraph-rsid="027915be"/>
    </style:style>
    <style:style style:name="P89" style:family="paragraph" style:parent-style-name="Standard">
      <style:text-properties officeooo:paragraph-rsid="027915be"/>
    </style:style>
    <style:style style:name="P90" style:family="paragraph" style:parent-style-name="Standard">
      <style:text-properties officeooo:paragraph-rsid="02684f40"/>
    </style:style>
    <style:style style:name="P91" style:family="paragraph" style:parent-style-name="TalentHeader">
      <style:text-properties officeooo:paragraph-rsid="0261f5e2"/>
    </style:style>
    <style:style style:name="P92" style:family="paragraph" style:parent-style-name="Standard">
      <style:text-properties officeooo:paragraph-rsid="0266fddc"/>
    </style:style>
    <style:style style:name="P93" style:family="paragraph" style:parent-style-name="Standard">
      <style:text-properties officeooo:paragraph-rsid="026ad8b3"/>
    </style:style>
    <style:style style:name="P94" style:family="paragraph" style:parent-style-name="Standard">
      <style:text-properties officeooo:paragraph-rsid="02688db5"/>
    </style:style>
    <style:style style:name="P95" style:family="paragraph" style:parent-style-name="Standard">
      <style:text-properties officeooo:rsid="02684f40" officeooo:paragraph-rsid="02688db5"/>
    </style:style>
    <style:style style:name="P96" style:family="paragraph" style:parent-style-name="Standard">
      <style:text-properties officeooo:paragraph-rsid="0261f5e2"/>
    </style:style>
    <style:style style:name="P97" style:family="paragraph" style:parent-style-name="Standard">
      <style:text-properties officeooo:rsid="026a2069" officeooo:paragraph-rsid="026a2069"/>
    </style:style>
    <style:style style:name="P98" style:family="paragraph" style:parent-style-name="Standard">
      <style:text-properties officeooo:rsid="0259fbde" officeooo:paragraph-rsid="0261f5e2"/>
    </style:style>
    <style:style style:name="P99" style:family="paragraph" style:parent-style-name="Standard">
      <style:text-properties fo:font-weight="normal" officeooo:rsid="022757a5" officeooo:paragraph-rsid="0261f5e2" style:font-weight-asian="normal" style:font-weight-complex="normal"/>
    </style:style>
    <style:style style:name="P100" style:family="paragraph" style:parent-style-name="Heading_20_2">
      <style:paragraph-properties fo:break-before="page"/>
      <style:text-properties officeooo:rsid="027cefab" officeooo:paragraph-rsid="027cefab"/>
    </style:style>
    <style:style style:name="P101" style:family="paragraph" style:parent-style-name="Standard">
      <style:text-properties officeooo:rsid="025f075a" officeooo:paragraph-rsid="02761c2a"/>
    </style:style>
    <style:style style:name="P102" style:family="paragraph" style:parent-style-name="Standard">
      <style:text-properties officeooo:paragraph-rsid="027a0ed5"/>
    </style:style>
    <style:style style:name="P103" style:family="paragraph" style:parent-style-name="Standard">
      <style:text-properties officeooo:paragraph-rsid="02761c2a"/>
    </style:style>
    <style:style style:name="P104" style:family="paragraph" style:parent-style-name="TalentHeader">
      <style:text-properties officeooo:paragraph-rsid="02761c2a"/>
    </style:style>
    <style:style style:name="P105" style:family="paragraph" style:parent-style-name="Standard">
      <style:text-properties officeooo:rsid="022bfd4f" officeooo:paragraph-rsid="02761c2a"/>
    </style:style>
    <style:style style:name="P106" style:family="paragraph" style:parent-style-name="Standard">
      <style:text-properties officeooo:rsid="0266fddc" officeooo:paragraph-rsid="02761c2a"/>
    </style:style>
    <style:style style:name="P107" style:family="paragraph" style:parent-style-name="Standard">
      <style:text-properties officeooo:rsid="022a3392" officeooo:paragraph-rsid="02761c2a"/>
    </style:style>
    <style:style style:name="P108" style:family="paragraph" style:parent-style-name="Standard">
      <style:text-properties officeooo:rsid="025f075a" officeooo:paragraph-rsid="025ffb69"/>
    </style:style>
    <style:style style:name="P109" style:family="paragraph" style:parent-style-name="Standard">
      <style:text-properties officeooo:paragraph-rsid="026d3ca9"/>
    </style:style>
    <style:style style:name="P110" style:family="paragraph" style:parent-style-name="TalentHeader">
      <style:text-properties officeooo:paragraph-rsid="025ffb69"/>
    </style:style>
    <style:style style:name="P111" style:family="paragraph" style:parent-style-name="Standard">
      <style:text-properties officeooo:paragraph-rsid="025ffb69"/>
    </style:style>
    <style:style style:name="P112" style:family="paragraph" style:parent-style-name="Standard">
      <style:text-properties officeooo:rsid="022189ea" officeooo:paragraph-rsid="025ffb69"/>
    </style:style>
    <style:style style:name="P113" style:family="paragraph" style:parent-style-name="Standard">
      <style:text-properties officeooo:rsid="0224779b" officeooo:paragraph-rsid="0266fddc"/>
    </style:style>
    <style:style style:name="P114" style:family="paragraph" style:parent-style-name="Standard">
      <style:text-properties officeooo:rsid="025ca8d6" officeooo:paragraph-rsid="025ffb69"/>
    </style:style>
    <style:style style:name="P115" style:family="paragraph" style:parent-style-name="Standard">
      <style:text-properties officeooo:rsid="02037b48" officeooo:paragraph-rsid="025ffb69"/>
    </style:style>
    <style:style style:name="P116" style:family="paragraph" style:parent-style-name="Standard">
      <style:text-properties fo:font-weight="bold" officeooo:rsid="0262a9ec" officeooo:paragraph-rsid="0262a9ec" style:font-weight-asian="bold" style:font-weight-complex="bold"/>
    </style:style>
    <style:style style:name="P117" style:family="paragraph" style:parent-style-name="Standard">
      <style:text-properties fo:font-weight="bold" officeooo:rsid="022189ea" officeooo:paragraph-rsid="0266fddc" style:font-weight-asian="bold" style:font-weight-complex="bold"/>
    </style:style>
    <style:style style:name="P118" style:family="paragraph" style:parent-style-name="Standard">
      <style:text-properties officeooo:rsid="02235fcd" officeooo:paragraph-rsid="026d3ca9"/>
    </style:style>
    <style:style style:name="P119" style:family="paragraph" style:parent-style-name="Standard">
      <style:text-properties fo:font-weight="normal" officeooo:rsid="025ca8d6" officeooo:paragraph-rsid="0266fddc" style:font-weight-asian="normal" style:font-weight-complex="normal"/>
    </style:style>
    <style:style style:name="P120" style:family="paragraph" style:parent-style-name="Standard">
      <style:text-properties officeooo:rsid="02116a0a" officeooo:paragraph-rsid="025ffb69"/>
    </style:style>
    <style:style style:name="P121" style:family="paragraph" style:parent-style-name="Standard">
      <style:text-properties fo:font-weight="bold" officeooo:rsid="02235fcd" officeooo:paragraph-rsid="025ffb69" style:font-weight-asian="bold" style:font-weight-complex="bold"/>
    </style:style>
    <style:style style:name="P122" style:family="paragraph" style:parent-style-name="Standard">
      <style:text-properties officeooo:rsid="0224779b" officeooo:paragraph-rsid="025ffb69"/>
    </style:style>
    <style:style style:name="P123" style:family="paragraph" style:parent-style-name="Standard">
      <style:text-properties fo:font-weight="normal" officeooo:rsid="024e0052" officeooo:paragraph-rsid="025ffb69" style:font-weight-asian="normal" style:font-weight-complex="normal"/>
    </style:style>
    <style:style style:name="P124" style:family="paragraph" style:parent-style-name="Standard">
      <style:text-properties officeooo:rsid="025f075a"/>
    </style:style>
    <style:style style:name="P125" style:family="paragraph" style:parent-style-name="Standard">
      <style:text-properties officeooo:paragraph-rsid="026e0a33"/>
    </style:style>
    <style:style style:name="P126" style:family="paragraph" style:parent-style-name="Standard">
      <style:text-properties officeooo:rsid="026e0a33" officeooo:paragraph-rsid="026e0a33"/>
    </style:style>
    <style:style style:name="P127" style:family="paragraph" style:parent-style-name="Standard">
      <style:text-properties officeooo:rsid="022bfd4f" officeooo:paragraph-rsid="025ffb69"/>
    </style:style>
    <style:style style:name="P128" style:family="paragraph" style:parent-style-name="Standard">
      <style:text-properties officeooo:rsid="022a3392" officeooo:paragraph-rsid="0271afa9"/>
    </style:style>
    <style:style style:name="P129" style:family="paragraph" style:parent-style-name="Standard">
      <style:text-properties officeooo:rsid="025ffb69" officeooo:paragraph-rsid="0261f5e2"/>
    </style:style>
    <style:style style:name="P130" style:family="paragraph" style:parent-style-name="TalentHeader">
      <style:text-properties officeooo:paragraph-rsid="027081d7"/>
    </style:style>
    <style:style style:name="P131" style:family="paragraph" style:parent-style-name="Standard">
      <style:text-properties officeooo:rsid="022c0a35" officeooo:paragraph-rsid="025ffb69"/>
    </style:style>
    <style:style style:name="P132" style:family="paragraph" style:parent-style-name="Standard">
      <style:text-properties officeooo:rsid="022e451f" officeooo:paragraph-rsid="025ffb69"/>
    </style:style>
    <style:style style:name="P133" style:family="paragraph" style:parent-style-name="Standard">
      <style:text-properties fo:font-weight="normal" officeooo:rsid="022c0a35" officeooo:paragraph-rsid="025ffb69" style:font-weight-asian="normal" style:font-weight-complex="normal"/>
    </style:style>
    <style:style style:name="P134" style:family="paragraph" style:parent-style-name="Standard">
      <style:text-properties fo:font-weight="bold" officeooo:rsid="026e0a33" officeooo:paragraph-rsid="026e0a33" style:font-weight-asian="bold" style:font-weight-complex="bold"/>
    </style:style>
    <style:style style:name="P135" style:family="paragraph" style:parent-style-name="Standard">
      <style:text-properties fo:font-weight="normal" officeooo:rsid="022bfd4f" officeooo:paragraph-rsid="025ffb69" style:font-weight-asian="normal" style:font-weight-complex="normal"/>
    </style:style>
    <style:style style:name="P136" style:family="paragraph" style:parent-style-name="Heading_20_2">
      <style:paragraph-properties fo:break-before="page"/>
      <style:text-properties officeooo:rsid="0262a9ec" officeooo:paragraph-rsid="02761c2a"/>
    </style:style>
    <style:style style:name="P137" style:family="paragraph" style:parent-style-name="Standard">
      <style:text-properties fo:font-weight="bold" officeooo:rsid="022757a5" officeooo:paragraph-rsid="02761c2a" style:font-weight-asian="bold" style:font-weight-complex="bold"/>
    </style:style>
    <style:style style:name="P138" style:family="paragraph" style:parent-style-name="Standard">
      <style:text-properties officeooo:rsid="0226b499" officeooo:paragraph-rsid="02761c2a"/>
    </style:style>
    <style:style style:name="P139" style:family="paragraph" style:parent-style-name="Standard">
      <style:text-properties fo:font-weight="normal" officeooo:rsid="0226b499" officeooo:paragraph-rsid="02761c2a" style:font-weight-asian="normal" style:font-weight-complex="normal"/>
    </style:style>
    <style:style style:name="P140" style:family="paragraph" style:parent-style-name="Standard">
      <style:text-properties fo:font-weight="normal" officeooo:rsid="022757a5" officeooo:paragraph-rsid="02761c2a" style:font-weight-asian="normal" style:font-weight-complex="normal"/>
    </style:style>
    <style:style style:name="P141" style:family="paragraph" style:parent-style-name="Standard">
      <style:text-properties fo:font-weight="normal" officeooo:rsid="0262a9ec" officeooo:paragraph-rsid="02761c2a" style:font-weight-asian="normal" style:font-weight-complex="normal"/>
    </style:style>
    <style:style style:name="P142" style:family="paragraph" style:parent-style-name="Heading_20_2">
      <style:paragraph-properties fo:break-before="page"/>
      <style:text-properties officeooo:rsid="025f075a" officeooo:paragraph-rsid="025f075a"/>
    </style:style>
    <style:style style:name="P143" style:family="paragraph" style:parent-style-name="Standard">
      <style:text-properties officeooo:rsid="025f075a" officeooo:paragraph-rsid="0261f5e2"/>
    </style:style>
    <style:style style:name="P144" style:family="paragraph" style:parent-style-name="Standard">
      <style:text-properties officeooo:rsid="024f3b22" officeooo:paragraph-rsid="0261f5e2"/>
    </style:style>
    <style:style style:name="P145" style:family="paragraph" style:parent-style-name="Standard">
      <style:text-properties officeooo:rsid="022c0a35" officeooo:paragraph-rsid="026e4f81"/>
    </style:style>
    <style:style style:name="P146" style:family="paragraph" style:parent-style-name="Standard">
      <style:text-properties officeooo:rsid="022c0a35" officeooo:paragraph-rsid="02655487"/>
    </style:style>
    <style:style style:name="P147" style:family="paragraph" style:parent-style-name="Standard">
      <style:text-properties fo:font-weight="normal" officeooo:rsid="024f3b22" officeooo:paragraph-rsid="02655487" style:font-weight-asian="normal" style:font-weight-complex="normal"/>
    </style:style>
    <style:style style:name="P148" style:family="paragraph" style:parent-style-name="Standard">
      <style:text-properties officeooo:rsid="022189ea" officeooo:paragraph-rsid="02704852"/>
    </style:style>
    <style:style style:name="P149" style:family="paragraph" style:parent-style-name="Standard">
      <style:text-properties officeooo:rsid="022a3392" officeooo:paragraph-rsid="02655487"/>
    </style:style>
    <style:style style:name="P150" style:family="paragraph" style:parent-style-name="Standard">
      <style:text-properties officeooo:rsid="022c0a35" officeooo:paragraph-rsid="0261f5e2"/>
    </style:style>
    <style:style style:name="P151" style:family="paragraph" style:parent-style-name="Standard">
      <style:text-properties officeooo:rsid="02235fcd" officeooo:paragraph-rsid="02704852"/>
    </style:style>
    <style:style style:name="P152" style:family="paragraph" style:parent-style-name="Standard">
      <style:text-properties officeooo:rsid="02704f80" officeooo:paragraph-rsid="02704f80"/>
    </style:style>
    <style:style style:name="P153" style:family="paragraph" style:parent-style-name="Standard">
      <style:text-properties officeooo:rsid="024ffd84" officeooo:paragraph-rsid="0261f5e2"/>
    </style:style>
    <style:style style:name="P154" style:family="paragraph" style:parent-style-name="Standard">
      <style:text-properties fo:font-weight="normal" officeooo:rsid="023d2250" officeooo:paragraph-rsid="02655487" style:font-weight-asian="normal" style:font-weight-complex="normal"/>
    </style:style>
    <style:style style:name="P155" style:family="paragraph" style:parent-style-name="Heading_20_1">
      <style:paragraph-properties fo:break-before="page"/>
      <style:text-properties officeooo:paragraph-rsid="0091342b"/>
    </style:style>
    <style:style style:name="P156" style:family="paragraph" style:parent-style-name="Heading_20_2">
      <style:text-properties officeooo:rsid="011b3104" officeooo:paragraph-rsid="011b3104"/>
    </style:style>
    <style:style style:name="P157" style:family="paragraph" style:parent-style-name="Standard">
      <style:text-properties officeooo:rsid="011b3104" officeooo:paragraph-rsid="011b3104"/>
    </style:style>
    <style:style style:name="P158" style:family="paragraph" style:parent-style-name="Heading_20_2">
      <style:text-properties officeooo:paragraph-rsid="01212211"/>
    </style:style>
    <style:style style:name="P159" style:family="paragraph" style:parent-style-name="Standard">
      <style:text-properties officeooo:rsid="011e0b29" officeooo:paragraph-rsid="01212211"/>
    </style:style>
    <style:style style:name="P160" style:family="paragraph" style:parent-style-name="Standard">
      <style:text-properties officeooo:rsid="011e0b29" officeooo:paragraph-rsid="01ebd1bb"/>
    </style:style>
    <style:style style:name="P161" style:family="paragraph" style:parent-style-name="Standard">
      <style:text-properties officeooo:rsid="011b3104" officeooo:paragraph-rsid="01e9faac"/>
    </style:style>
    <style:style style:name="P162" style:family="paragraph" style:parent-style-name="Standard">
      <style:text-properties officeooo:rsid="01ebd1bb" officeooo:paragraph-rsid="01ebd1bb"/>
    </style:style>
    <style:style style:name="P163" style:family="paragraph" style:parent-style-name="Heading_20_2">
      <style:text-properties officeooo:rsid="01fb52c4" officeooo:paragraph-rsid="01fb52c4"/>
    </style:style>
    <style:style style:name="P164" style:family="paragraph" style:parent-style-name="Standard">
      <style:text-properties fo:font-weight="normal" officeooo:rsid="01fb52c4" officeooo:paragraph-rsid="01fb52c4" style:font-weight-asian="normal" style:font-weight-complex="normal"/>
    </style:style>
    <style:style style:name="P165" style:family="paragraph" style:parent-style-name="Standard">
      <style:text-properties fo:font-weight="normal" officeooo:rsid="01ebd1bb" officeooo:paragraph-rsid="01ee5f14" style:font-weight-asian="normal" style:font-weight-complex="normal"/>
    </style:style>
    <style:style style:name="P166" style:family="paragraph" style:parent-style-name="Standard">
      <style:text-properties officeooo:paragraph-rsid="01ee5f14"/>
    </style:style>
    <style:style style:name="P167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Noto Serif" fo:font-size="11pt" fo:font-weight="normal" officeooo:paragraph-rsid="01fc8117" style:font-size-asian="12pt" style:font-name-complex="Arial1" style:font-size-complex="12pt"/>
    </style:style>
    <style:style style:name="P168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Noto Serif" fo:font-size="11pt" fo:font-weight="normal" officeooo:paragraph-rsid="01fc8117" style:font-size-asian="12pt" style:font-name-complex="Arial1" style:font-size-complex="12pt"/>
    </style:style>
    <style:style style:name="P169" style:family="paragraph" style:parent-style-name="Standard">
      <style:text-properties officeooo:paragraph-rsid="01fc8117"/>
    </style:style>
    <style:style style:name="P170" style:family="paragraph" style:parent-style-name="List_20_Paragraph" style:list-style-name="L5"/>
    <style:style style:name="P171" style:family="paragraph" style:parent-style-name="List_20_Paragraph" style:list-style-name="L5">
      <style:text-properties officeooo:paragraph-rsid="01f04e4a"/>
    </style:style>
    <style:style style:name="P172" style:family="paragraph" style:parent-style-name="Heading_20_3">
      <style:paragraph-properties fo:break-before="page"/>
    </style:style>
    <style:style style:name="P173" style:family="paragraph" style:parent-style-name="Table_20_Header">
      <style:paragraph-properties fo:text-align="left" style:justify-single-word="false"/>
      <style:text-properties officeooo:paragraph-rsid="01c35ba4"/>
    </style:style>
    <style:style style:name="P174" style:family="paragraph" style:parent-style-name="Table_20_Header">
      <style:paragraph-properties fo:text-align="center" style:justify-single-word="false"/>
      <style:text-properties officeooo:rsid="01c35ba4" officeooo:paragraph-rsid="01c35ba4"/>
    </style:style>
    <style:style style:name="P175" style:family="paragraph" style:parent-style-name="Table_20_Header">
      <style:paragraph-properties fo:text-align="center" style:justify-single-word="false"/>
      <style:text-properties officeooo:rsid="02879403" officeooo:paragraph-rsid="02879403"/>
    </style:style>
    <style:style style:name="P176" style:family="paragraph" style:parent-style-name="Table_20_Header">
      <style:paragraph-properties fo:text-align="left" style:justify-single-word="false"/>
      <style:text-properties officeooo:rsid="01ebd1bb" officeooo:paragraph-rsid="01ebd1bb"/>
    </style:style>
    <style:style style:name="P177" style:family="paragraph" style:parent-style-name="Table_20_Contents">
      <style:paragraph-properties fo:text-align="left" style:justify-single-word="false"/>
      <style:text-properties officeooo:rsid="01c35ba4" officeooo:paragraph-rsid="01c35ba4"/>
    </style:style>
    <style:style style:name="P178" style:family="paragraph" style:parent-style-name="Table_20_Contents">
      <style:paragraph-properties fo:text-align="left" style:justify-single-word="false"/>
      <style:text-properties officeooo:rsid="0287a28a" officeooo:paragraph-rsid="0287a28a"/>
    </style:style>
    <style:style style:name="P179" style:family="paragraph" style:parent-style-name="Table_20_Contents">
      <style:paragraph-properties fo:text-align="center" style:justify-single-word="false"/>
      <style:text-properties officeooo:rsid="0287a28a" officeooo:paragraph-rsid="0287a28a"/>
    </style:style>
    <style:style style:name="P180" style:family="paragraph" style:parent-style-name="Table_20_Contents">
      <style:paragraph-properties fo:text-align="center" style:justify-single-word="false"/>
      <style:text-properties officeooo:rsid="01c35ba4" officeooo:paragraph-rsid="01c35ba4"/>
    </style:style>
    <style:style style:name="P181" style:family="paragraph" style:parent-style-name="Table_20_Contents">
      <style:paragraph-properties fo:text-align="left" style:justify-single-word="false"/>
      <style:text-properties officeooo:rsid="01c35ba4" officeooo:paragraph-rsid="02879403"/>
    </style:style>
    <style:style style:name="P182" style:family="paragraph" style:parent-style-name="Table_20_Contents">
      <style:paragraph-properties fo:text-align="left" style:justify-single-word="false"/>
      <style:text-properties officeooo:rsid="02879403" officeooo:paragraph-rsid="02879403"/>
    </style:style>
    <style:style style:name="P183" style:family="paragraph" style:parent-style-name="Table_20_Contents">
      <style:paragraph-properties fo:text-align="center" style:justify-single-word="false"/>
      <style:text-properties officeooo:rsid="02879403" officeooo:paragraph-rsid="02879403"/>
    </style:style>
    <style:style style:name="P184" style:family="paragraph" style:parent-style-name="Table_20_Contents">
      <style:paragraph-properties fo:text-align="center" style:justify-single-word="false"/>
      <style:text-properties officeooo:rsid="01ca7f6e" officeooo:paragraph-rsid="01ca7f6e"/>
    </style:style>
    <style:style style:name="P185" style:family="paragraph" style:parent-style-name="Table_20_Contents">
      <style:paragraph-properties fo:text-align="left" style:justify-single-word="false"/>
      <style:text-properties officeooo:rsid="01c87c41" officeooo:paragraph-rsid="01c87c41"/>
    </style:style>
    <style:style style:name="P186" style:family="paragraph" style:parent-style-name="Standard">
      <style:text-properties officeooo:rsid="011e0b29" officeooo:paragraph-rsid="01c35ba4"/>
    </style:style>
    <style:style style:name="P187" style:family="paragraph" style:parent-style-name="Table_20_Header">
      <style:paragraph-properties fo:text-align="center" style:justify-single-word="false"/>
      <style:text-properties officeooo:rsid="0287a28a" officeooo:paragraph-rsid="0287a28a"/>
    </style:style>
    <style:style style:name="P188" style:family="paragraph" style:parent-style-name="Table_20_Contents">
      <style:paragraph-properties fo:text-align="left" style:justify-single-word="false"/>
      <style:text-properties officeooo:rsid="01c6abcc" officeooo:paragraph-rsid="02879403"/>
    </style:style>
    <style:style style:name="P189" style:family="paragraph" style:parent-style-name="Table_20_Contents">
      <style:paragraph-properties fo:text-align="left" style:justify-single-word="false"/>
      <style:text-properties officeooo:rsid="01c78c2d" officeooo:paragraph-rsid="01c7a599"/>
    </style:style>
    <style:style style:name="P190" style:family="paragraph" style:parent-style-name="Table_20_Header">
      <style:paragraph-properties fo:text-align="left" style:justify-single-word="false"/>
      <style:text-properties officeooo:paragraph-rsid="01ca7f6e"/>
    </style:style>
    <style:style style:name="P191" style:family="paragraph" style:parent-style-name="Table_20_Header">
      <style:paragraph-properties fo:text-align="center" style:justify-single-word="false"/>
      <style:text-properties officeooo:rsid="01c35ba4" officeooo:paragraph-rsid="01ca7f6e"/>
    </style:style>
    <style:style style:name="P192" style:family="paragraph" style:parent-style-name="Table_20_Header">
      <style:paragraph-properties fo:text-align="center" style:justify-single-word="false"/>
      <style:text-properties officeooo:rsid="01ca7f6e" officeooo:paragraph-rsid="01ca7f6e"/>
    </style:style>
    <style:style style:name="P193" style:family="paragraph" style:parent-style-name="Table_20_Contents">
      <style:paragraph-properties fo:text-align="left" style:justify-single-word="false"/>
      <style:text-properties officeooo:rsid="01ca7f6e" officeooo:paragraph-rsid="01ca7f6e"/>
    </style:style>
    <style:style style:name="P194" style:family="paragraph" style:parent-style-name="Table_20_Contents">
      <style:paragraph-properties fo:text-align="center" style:justify-single-word="false"/>
      <style:text-properties officeooo:rsid="01e9faac" officeooo:paragraph-rsid="01e9faac"/>
    </style:style>
    <style:style style:name="P195" style:family="paragraph" style:parent-style-name="Table_20_Contents">
      <style:paragraph-properties fo:text-align="left" style:justify-single-word="false"/>
      <style:text-properties officeooo:rsid="01c7a599" officeooo:paragraph-rsid="01ca7f6e"/>
    </style:style>
    <style:style style:name="P196" style:family="paragraph" style:parent-style-name="Table_20_Contents">
      <style:paragraph-properties fo:text-align="left" style:justify-single-word="false"/>
      <style:text-properties officeooo:rsid="01c6abcc" officeooo:paragraph-rsid="01e9faac"/>
    </style:style>
    <style:style style:name="P197" style:family="paragraph" style:parent-style-name="Standard">
      <style:text-properties officeooo:rsid="01ca7f6e" officeooo:paragraph-rsid="01ca7f6e"/>
    </style:style>
    <style:style style:name="P198" style:family="paragraph" style:parent-style-name="Heading_20_1">
      <style:paragraph-properties fo:break-before="page"/>
      <style:text-properties officeooo:paragraph-rsid="012789ed"/>
    </style:style>
    <style:style style:name="P199" style:family="paragraph" style:parent-style-name="Standard">
      <style:text-properties officeooo:rsid="00e9bb14" officeooo:paragraph-rsid="012789ed"/>
    </style:style>
    <style:style style:name="P200" style:family="paragraph" style:parent-style-name="Standard">
      <style:text-properties officeooo:rsid="00f22a02" officeooo:paragraph-rsid="012789ed"/>
    </style:style>
    <style:style style:name="P201" style:family="paragraph" style:parent-style-name="Heading_20_2">
      <style:text-properties officeooo:paragraph-rsid="012789ed"/>
    </style:style>
    <style:style style:name="P202" style:family="paragraph" style:parent-style-name="Standard">
      <style:text-properties officeooo:rsid="00f2865b" officeooo:paragraph-rsid="012789ed"/>
    </style:style>
    <style:style style:name="P203" style:family="paragraph" style:parent-style-name="Heading_20_2">
      <style:paragraph-properties fo:break-before="page"/>
      <style:text-properties officeooo:paragraph-rsid="012789ed"/>
    </style:style>
    <style:style style:name="P204" style:family="paragraph" style:parent-style-name="Standard">
      <style:text-properties officeooo:paragraph-rsid="019c473e"/>
    </style:style>
    <style:style style:name="P205" style:family="paragraph" style:parent-style-name="Heading_20_2">
      <style:text-properties officeooo:paragraph-rsid="019c473e"/>
    </style:style>
    <style:style style:name="P206" style:family="paragraph" style:parent-style-name="Standard">
      <style:text-properties officeooo:rsid="01daf459" officeooo:paragraph-rsid="01daf459"/>
    </style:style>
    <style:style style:name="P207" style:family="paragraph" style:parent-style-name="Standard">
      <style:text-properties officeooo:paragraph-rsid="01daf459"/>
    </style:style>
    <style:style style:name="P208" style:family="paragraph" style:parent-style-name="Table_20_Header">
      <style:text-properties officeooo:rsid="01e3c922" officeooo:paragraph-rsid="01e3c922"/>
    </style:style>
    <style:style style:name="P209" style:family="paragraph" style:parent-style-name="Table_20_Contents">
      <style:text-properties officeooo:rsid="01daf459" officeooo:paragraph-rsid="01daf459"/>
    </style:style>
    <style:style style:name="P210" style:family="paragraph" style:parent-style-name="Table_20_Contents">
      <style:text-properties officeooo:rsid="01daabce" officeooo:paragraph-rsid="01daabce"/>
    </style:style>
    <style:style style:name="P211" style:family="paragraph" style:parent-style-name="Standard">
      <style:text-properties officeooo:paragraph-rsid="019f63fe"/>
    </style:style>
    <style:style style:name="P212" style:family="paragraph" style:parent-style-name="Standard">
      <style:text-properties officeooo:rsid="019c473e" officeooo:paragraph-rsid="019c473e"/>
    </style:style>
    <style:style style:name="P213" style:family="paragraph" style:parent-style-name="List_20_Paragraph" style:list-style-name="L6"/>
    <style:style style:name="P214" style:family="paragraph" style:parent-style-name="Heading_20_2">
      <style:text-properties officeooo:paragraph-rsid="01f7ba86"/>
    </style:style>
    <style:style style:name="P215" style:family="paragraph" style:parent-style-name="Standard">
      <style:text-properties officeooo:rsid="01f7ba86" officeooo:paragraph-rsid="01f7ba86"/>
    </style:style>
    <style:style style:name="P216" style:family="paragraph" style:parent-style-name="Standard">
      <style:paragraph-properties fo:text-align="left" style:justify-single-word="false"/>
    </style:style>
    <style:style style:name="P217" style:family="paragraph" style:parent-style-name="List_20_Paragraph" style:list-style-name="L7"/>
    <style:style style:name="P218" style:family="paragraph" style:parent-style-name="List_20_Paragraph" style:list-style-name="L7">
      <style:text-properties officeooo:rsid="018c19fc" officeooo:paragraph-rsid="018c19fc"/>
    </style:style>
    <style:style style:name="P219" style:family="paragraph" style:parent-style-name="Standard">
      <style:text-properties officeooo:paragraph-rsid="01f76d36"/>
    </style:style>
    <style:style style:name="P220" style:family="paragraph" style:parent-style-name="Standard">
      <style:text-properties fo:font-style="italic" officeooo:paragraph-rsid="01f76d36" style:font-style-asian="italic" style:font-style-complex="italic"/>
    </style:style>
    <style:style style:name="P221" style:family="paragraph" style:parent-style-name="Standard">
      <style:text-properties officeooo:paragraph-rsid="0123ce0b"/>
    </style:style>
    <style:style style:name="P222" style:family="paragraph" style:parent-style-name="Standard">
      <style:text-properties fo:font-style="italic" style:font-style-asian="italic" style:font-style-complex="italic"/>
    </style:style>
    <style:style style:name="P223" style:family="paragraph" style:parent-style-name="Standard">
      <style:text-properties officeooo:rsid="01902a68"/>
    </style:style>
    <style:style style:name="T1" style:family="text">
      <style:text-properties officeooo:rsid="017c4ffd"/>
    </style:style>
    <style:style style:name="T2" style:family="text">
      <style:text-properties officeooo:rsid="0071b42a"/>
    </style:style>
    <style:style style:name="T3" style:family="text">
      <style:text-properties fo:font-weight="bold" officeooo:rsid="0104135c" style:font-weight-asian="bold" style:font-weight-complex="bold"/>
    </style:style>
    <style:style style:name="T4" style:family="text">
      <style:text-properties officeooo:rsid="01def656"/>
    </style:style>
    <style:style style:name="T5" style:family="text">
      <style:text-properties officeooo:rsid="0283f7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f4d272"/>
    </style:style>
    <style:style style:name="T8" style:family="text">
      <style:text-properties fo:font-weight="bold" officeooo:rsid="00a87f7e" style:font-weight-asian="bold" style:font-weight-complex="bold"/>
    </style:style>
    <style:style style:name="T9" style:family="text">
      <style:text-properties officeooo:rsid="0287a28a"/>
    </style:style>
    <style:style style:name="T10" style:family="text">
      <style:text-properties fo:font-weight="bold" officeooo:rsid="0283f71c" style:font-weight-asian="bold" style:font-weight-complex="bold"/>
    </style:style>
    <style:style style:name="T11" style:family="text">
      <style:text-properties officeooo:rsid="01fc890f"/>
    </style:style>
    <style:style style:name="T12" style:family="text">
      <style:text-properties officeooo:rsid="006d553f"/>
    </style:style>
    <style:style style:name="T13" style:family="text">
      <style:text-properties officeooo:rsid="00921ee3"/>
    </style:style>
    <style:style style:name="T14" style:family="text">
      <style:text-properties officeooo:rsid="011b3104"/>
    </style:style>
    <style:style style:name="T15" style:family="text">
      <style:text-properties officeooo:rsid="02554156"/>
    </style:style>
    <style:style style:name="T16" style:family="text">
      <style:text-properties officeooo:rsid="0104135c"/>
    </style:style>
    <style:style style:name="T17" style:family="text">
      <style:text-properties officeooo:rsid="004170e7"/>
    </style:style>
    <style:style style:name="T18" style:family="text">
      <style:text-properties officeooo:rsid="00c6b19a"/>
    </style:style>
    <style:style style:name="T19" style:family="text">
      <style:text-properties officeooo:rsid="00b8c62e"/>
    </style:style>
    <style:style style:name="T20" style:family="text">
      <style:text-properties officeooo:rsid="00d00e52"/>
    </style:style>
    <style:style style:name="T21" style:family="text">
      <style:text-properties officeooo:rsid="00d1899e"/>
    </style:style>
    <style:style style:name="T22" style:family="text">
      <style:text-properties officeooo:rsid="0110a74e"/>
    </style:style>
    <style:style style:name="T23" style:family="text">
      <style:text-properties officeooo:rsid="00ca99e7"/>
    </style:style>
    <style:style style:name="T24" style:family="text">
      <style:text-properties fo:font-weight="bold" officeooo:rsid="0127a33f" style:font-weight-asian="bold" style:font-weight-complex="bold"/>
    </style:style>
    <style:style style:name="T25" style:family="text">
      <style:text-properties officeooo:rsid="0127a33f"/>
    </style:style>
    <style:style style:name="T26" style:family="text">
      <style:text-properties officeooo:rsid="00b3bc3d"/>
    </style:style>
    <style:style style:name="T27" style:family="text">
      <style:text-properties officeooo:rsid="01072a7f"/>
    </style:style>
    <style:style style:name="T28" style:family="text">
      <style:text-properties officeooo:rsid="00ce2b17"/>
    </style:style>
    <style:style style:name="T29" style:family="text">
      <style:text-properties officeooo:rsid="00ccc4aa"/>
    </style:style>
    <style:style style:name="T30" style:family="text">
      <style:text-properties officeooo:rsid="012b3e17"/>
    </style:style>
    <style:style style:name="T31" style:family="text">
      <style:text-properties officeooo:rsid="00b565f7"/>
    </style:style>
    <style:style style:name="T32" style:family="text">
      <style:text-properties officeooo:rsid="006bacdb"/>
    </style:style>
    <style:style style:name="T33" style:family="text">
      <style:text-properties officeooo:rsid="00e9bb14"/>
    </style:style>
    <style:style style:name="T34" style:family="text">
      <style:text-properties officeooo:rsid="01e78e96"/>
    </style:style>
    <style:style style:name="T35" style:family="text">
      <style:text-properties officeooo:rsid="02587caa"/>
    </style:style>
    <style:style style:name="T36" style:family="text">
      <style:text-properties officeooo:rsid="01297e03"/>
    </style:style>
    <style:style style:name="T37" style:family="text">
      <style:text-properties officeooo:rsid="01e5b977"/>
    </style:style>
    <style:style style:name="T38" style:family="text">
      <style:text-properties fo:font-weight="bold" officeooo:rsid="01af756d" style:font-weight-asian="bold" style:font-weight-complex="bold"/>
    </style:style>
    <style:style style:name="T39" style:family="text">
      <style:text-properties officeooo:rsid="01af756d"/>
    </style:style>
    <style:style style:name="T40" style:family="text">
      <style:text-properties officeooo:rsid="01d52328"/>
    </style:style>
    <style:style style:name="T41" style:family="text">
      <style:text-properties officeooo:rsid="017cc684"/>
    </style:style>
    <style:style style:name="T42" style:family="text">
      <style:text-properties officeooo:rsid="01bf34c2"/>
    </style:style>
    <style:style style:name="T43" style:family="text">
      <style:text-properties officeooo:rsid="01e0a987"/>
    </style:style>
    <style:style style:name="T44" style:family="text">
      <style:text-properties fo:font-weight="bold" officeooo:rsid="01173f79" style:font-weight-asian="bold" style:font-weight-complex="bold"/>
    </style:style>
    <style:style style:name="T45" style:family="text">
      <style:text-properties officeooo:rsid="01fb52c4"/>
    </style:style>
    <style:style style:name="T46" style:family="text">
      <style:text-properties officeooo:rsid="0124f932"/>
    </style:style>
    <style:style style:name="T47" style:family="text">
      <style:text-properties fo:font-weight="bold" officeooo:rsid="0124f932" style:font-weight-asian="bold" style:font-weight-complex="bold"/>
    </style:style>
    <style:style style:name="T48" style:family="text">
      <style:text-properties officeooo:rsid="0256ad3a"/>
    </style:style>
    <style:style style:name="T49" style:family="text">
      <style:text-properties officeooo:rsid="02156d29"/>
    </style:style>
    <style:style style:name="T50" style:family="text">
      <style:text-properties officeooo:rsid="0285b683"/>
    </style:style>
    <style:style style:name="T51" style:family="text">
      <style:text-properties officeooo:rsid="0277ad74"/>
    </style:style>
    <style:style style:name="T52" style:family="text">
      <style:text-properties officeooo:rsid="02128068"/>
    </style:style>
    <style:style style:name="T53" style:family="text">
      <style:text-properties fo:font-weight="bold" officeooo:rsid="02887235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22bfd4f"/>
    </style:style>
    <style:style style:name="T56" style:family="text">
      <style:text-properties fo:font-weight="bold" officeooo:rsid="0285b683" style:font-weight-asian="bold" style:font-weight-complex="bold"/>
    </style:style>
    <style:style style:name="T57" style:family="text">
      <style:text-properties fo:font-weight="normal" officeooo:rsid="0285b683" style:font-weight-asian="normal" style:font-weight-complex="normal"/>
    </style:style>
    <style:style style:name="T58" style:family="text">
      <style:text-properties fo:font-weight="bold" officeooo:rsid="02037b48" style:font-weight-asian="bold" style:font-weight-complex="bold"/>
    </style:style>
    <style:style style:name="T59" style:family="text">
      <style:text-properties officeooo:rsid="02037b48"/>
    </style:style>
    <style:style style:name="T60" style:family="text">
      <style:text-properties officeooo:rsid="021ad817"/>
    </style:style>
    <style:style style:name="T61" style:family="text">
      <style:text-properties officeooo:rsid="02761c2a"/>
    </style:style>
    <style:style style:name="T62" style:family="text">
      <style:text-properties fo:font-weight="bold" officeooo:rsid="0201cdb5" style:font-weight-asian="bold" style:font-weight-complex="bold"/>
    </style:style>
    <style:style style:name="T63" style:family="text">
      <style:text-properties officeooo:rsid="0201cdb5"/>
    </style:style>
    <style:style style:name="T64" style:family="text">
      <style:text-properties officeooo:rsid="0242a15d"/>
    </style:style>
    <style:style style:name="T65" style:family="text">
      <style:text-properties fo:font-weight="bold" officeooo:rsid="02593e10" style:font-weight-asian="bold" style:font-weight-complex="bold"/>
    </style:style>
    <style:style style:name="T66" style:family="text">
      <style:text-properties officeooo:rsid="02593e10"/>
    </style:style>
    <style:style style:name="T67" style:family="text">
      <style:text-properties officeooo:rsid="0259881c"/>
    </style:style>
    <style:style style:name="T68" style:family="text">
      <style:text-properties fo:font-weight="bold" officeooo:rsid="025075b9" style:font-weight-asian="bold" style:font-weight-complex="bold"/>
    </style:style>
    <style:style style:name="T69" style:family="text">
      <style:text-properties officeooo:rsid="025075b9"/>
    </style:style>
    <style:style style:name="T70" style:family="text">
      <style:text-properties officeooo:rsid="021997ef"/>
    </style:style>
    <style:style style:name="T71" style:family="text">
      <style:text-properties officeooo:rsid="02417e1b"/>
    </style:style>
    <style:style style:name="T72" style:family="text">
      <style:text-properties officeooo:rsid="026c7585"/>
    </style:style>
    <style:style style:name="T73" style:family="text">
      <style:text-properties officeooo:rsid="02765ba2"/>
    </style:style>
    <style:style style:name="T74" style:family="text">
      <style:text-properties fo:font-weight="normal" officeooo:rsid="02138e0f" style:font-weight-asian="normal" style:font-weight-complex="normal"/>
    </style:style>
    <style:style style:name="T75" style:family="text">
      <style:text-properties fo:font-weight="normal" officeooo:rsid="0266fddc" style:font-weight-asian="normal" style:font-weight-complex="normal"/>
    </style:style>
    <style:style style:name="T76" style:family="text">
      <style:text-properties officeooo:rsid="02039a7f"/>
    </style:style>
    <style:style style:name="T77" style:family="text">
      <style:text-properties fo:font-weight="bold" officeooo:rsid="02761c2a" style:font-weight-asian="bold" style:font-weight-complex="bold"/>
    </style:style>
    <style:style style:name="T78" style:family="text">
      <style:text-properties fo:font-weight="normal" officeooo:rsid="0201cdb5" style:font-weight-asian="normal" style:font-weight-complex="normal"/>
    </style:style>
    <style:style style:name="T79" style:family="text">
      <style:text-properties fo:font-weight="normal" officeooo:rsid="02883ddc" style:font-weight-asian="normal" style:font-weight-complex="normal"/>
    </style:style>
    <style:style style:name="T80" style:family="text">
      <style:text-properties fo:font-weight="bold" officeooo:rsid="0207f7f5" style:font-weight-asian="bold" style:font-weight-complex="bold"/>
    </style:style>
    <style:style style:name="T81" style:family="text">
      <style:text-properties fo:font-weight="normal" officeooo:rsid="0207f7f5" style:font-weight-asian="normal" style:font-weight-complex="normal"/>
    </style:style>
    <style:style style:name="T82" style:family="text">
      <style:text-properties fo:font-weight="normal" officeooo:rsid="02197ae6" style:font-weight-asian="normal" style:font-weight-complex="normal"/>
    </style:style>
    <style:style style:name="T83" style:family="text">
      <style:text-properties fo:font-weight="bold" officeooo:rsid="02883ddc" style:font-weight-asian="bold" style:font-weight-complex="bold"/>
    </style:style>
    <style:style style:name="T84" style:family="text">
      <style:text-properties officeooo:rsid="02235fcd"/>
    </style:style>
    <style:style style:name="T85" style:family="text">
      <style:text-properties officeooo:rsid="02314042"/>
    </style:style>
    <style:style style:name="T86" style:family="text">
      <style:text-properties fo:font-weight="bold" officeooo:rsid="0211e772" style:font-weight-asian="bold" style:font-weight-complex="bold"/>
    </style:style>
    <style:style style:name="T87" style:family="text">
      <style:text-properties fo:font-weight="bold" officeooo:rsid="021997ef" style:font-weight-asian="bold" style:font-weight-complex="bold"/>
    </style:style>
    <style:style style:name="T88" style:family="text">
      <style:text-properties officeooo:rsid="0211e772"/>
    </style:style>
    <style:style style:name="T89" style:family="text">
      <style:text-properties officeooo:rsid="02138e0f"/>
    </style:style>
    <style:style style:name="T90" style:family="text">
      <style:text-properties fo:font-weight="bold" officeooo:rsid="0207719f" style:font-weight-asian="bold" style:font-weight-complex="bold"/>
    </style:style>
    <style:style style:name="T91" style:family="text">
      <style:text-properties fo:font-weight="normal" officeooo:rsid="0207719f" style:font-weight-asian="normal" style:font-weight-complex="normal"/>
    </style:style>
    <style:style style:name="T92" style:family="text">
      <style:text-properties fo:font-weight="normal" officeooo:rsid="021997ef" style:font-weight-asian="normal" style:font-weight-complex="normal"/>
    </style:style>
    <style:style style:name="T93" style:family="text">
      <style:text-properties fo:font-weight="normal" officeooo:rsid="02235fcd" style:font-weight-asian="normal" style:font-weight-complex="normal"/>
    </style:style>
    <style:style style:name="T94" style:family="text">
      <style:text-properties fo:font-weight="bold" officeooo:rsid="02138e0f" style:font-weight-asian="bold" style:font-weight-complex="bold"/>
    </style:style>
    <style:style style:name="T95" style:family="text">
      <style:text-properties fo:font-weight="bold" officeooo:rsid="02128068" style:font-weight-asian="bold" style:font-weight-complex="bold"/>
    </style:style>
    <style:style style:name="T96" style:family="text">
      <style:text-properties fo:font-weight="normal" officeooo:rsid="02765ba2" style:font-weight-asian="normal" style:font-weight-complex="normal"/>
    </style:style>
    <style:style style:name="T97" style:family="text">
      <style:text-properties officeooo:rsid="02684f40"/>
    </style:style>
    <style:style style:name="T98" style:family="text">
      <style:text-properties fo:font-weight="bold" officeooo:rsid="026a2069" style:font-weight-asian="bold" style:font-weight-complex="bold"/>
    </style:style>
    <style:style style:name="T99" style:family="text">
      <style:text-properties fo:font-weight="bold" officeooo:rsid="0251a371" style:font-weight-asian="bold" style:font-weight-complex="bold"/>
    </style:style>
    <style:style style:name="T100" style:family="text">
      <style:text-properties fo:font-weight="bold" officeooo:rsid="0262c860" style:font-weight-asian="bold" style:font-weight-complex="bold"/>
    </style:style>
    <style:style style:name="T101" style:family="text">
      <style:text-properties fo:font-weight="bold" officeooo:rsid="02684f40" style:font-weight-asian="bold" style:font-weight-complex="bold"/>
    </style:style>
    <style:style style:name="T102" style:family="text">
      <style:text-properties fo:font-weight="normal" officeooo:rsid="0251a371" style:font-weight-asian="normal" style:font-weight-complex="normal"/>
    </style:style>
    <style:style style:name="T103" style:family="text">
      <style:text-properties fo:font-weight="normal" officeooo:rsid="027915be" style:font-weight-asian="normal" style:font-weight-complex="normal"/>
    </style:style>
    <style:style style:name="T104" style:family="text">
      <style:text-properties fo:font-weight="bold" officeooo:rsid="0266fddc" style:font-weight-asian="bold" style:font-weight-complex="bold"/>
    </style:style>
    <style:style style:name="T105" style:family="text">
      <style:text-properties officeooo:rsid="0266fddc"/>
    </style:style>
    <style:style style:name="T106" style:family="text">
      <style:text-properties fo:font-weight="bold" officeooo:rsid="02682cdc" style:font-weight-asian="bold" style:font-weight-complex="bold"/>
    </style:style>
    <style:style style:name="T107" style:family="text">
      <style:text-properties fo:font-weight="bold" officeooo:rsid="02688db5" style:font-weight-asian="bold" style:font-weight-complex="bold"/>
    </style:style>
    <style:style style:name="T108" style:family="text">
      <style:text-properties officeooo:rsid="02682cdc"/>
    </style:style>
    <style:style style:name="T109" style:family="text">
      <style:text-properties officeooo:rsid="02688db5"/>
    </style:style>
    <style:style style:name="T110" style:family="text">
      <style:text-properties fo:font-weight="bold" officeooo:rsid="0261f5e2" style:font-weight-asian="bold" style:font-weight-complex="bold"/>
    </style:style>
    <style:style style:name="T111" style:family="text">
      <style:text-properties fo:font-weight="normal" officeooo:rsid="024abd79" style:font-weight-asian="normal" style:font-weight-complex="normal"/>
    </style:style>
    <style:style style:name="T112" style:family="text">
      <style:text-properties fo:font-weight="bold"/>
    </style:style>
    <style:style style:name="T113" style:family="text">
      <style:text-properties fo:font-weight="bold" officeooo:rsid="0232e3a8"/>
    </style:style>
    <style:style style:name="T114" style:family="text">
      <style:text-properties fo:font-weight="bold" officeooo:rsid="024e0052"/>
    </style:style>
    <style:style style:name="T115" style:family="text">
      <style:text-properties officeooo:rsid="02431f76"/>
    </style:style>
    <style:style style:name="T116" style:family="text">
      <style:text-properties fo:font-weight="bold" officeooo:rsid="0259881c" style:font-weight-asian="bold" style:font-weight-complex="bold"/>
    </style:style>
    <style:style style:name="T117" style:family="text">
      <style:text-properties fo:font-weight="bold" officeooo:rsid="024e0052" style:font-weight-asian="bold" style:font-weight-complex="bold"/>
    </style:style>
    <style:style style:name="T118" style:family="text">
      <style:text-properties officeooo:rsid="024e0052"/>
    </style:style>
    <style:style style:name="T119" style:family="text">
      <style:text-properties officeooo:rsid="0259fbde"/>
    </style:style>
    <style:style style:name="T120" style:family="text">
      <style:text-properties officeooo:rsid="026a2069"/>
    </style:style>
    <style:style style:name="T121" style:family="text">
      <style:text-properties fo:font-weight="bold" officeooo:rsid="025fb798" style:font-weight-asian="bold" style:font-weight-complex="bold"/>
    </style:style>
    <style:style style:name="T122" style:family="text">
      <style:text-properties officeooo:rsid="025fb798"/>
    </style:style>
    <style:style style:name="T123" style:family="text">
      <style:text-properties officeooo:rsid="0271afa9"/>
    </style:style>
    <style:style style:name="T124" style:family="text">
      <style:text-properties officeooo:rsid="02725407"/>
    </style:style>
    <style:style style:name="T125" style:family="text">
      <style:text-properties fo:font-weight="bold" officeooo:rsid="0271afa9" style:font-weight-asian="bold" style:font-weight-complex="bold"/>
    </style:style>
    <style:style style:name="T126" style:family="text">
      <style:text-properties officeooo:rsid="027915be"/>
    </style:style>
    <style:style style:name="T127" style:family="text">
      <style:text-properties fo:font-weight="bold" officeooo:rsid="02655487" style:font-weight-asian="bold" style:font-weight-complex="bold"/>
    </style:style>
    <style:style style:name="T128" style:family="text">
      <style:text-properties officeooo:rsid="02382a4a"/>
    </style:style>
    <style:style style:name="T129" style:family="text">
      <style:text-properties officeooo:rsid="02746be9"/>
    </style:style>
    <style:style style:name="T130" style:family="text">
      <style:text-properties fo:font-weight="bold" officeooo:rsid="02725407" style:font-weight-asian="bold" style:font-weight-complex="bold"/>
    </style:style>
    <style:style style:name="T131" style:family="text">
      <style:text-properties fo:font-weight="normal" officeooo:rsid="0271afa9" style:font-weight-asian="normal" style:font-weight-complex="normal"/>
    </style:style>
    <style:style style:name="T132" style:family="text">
      <style:text-properties fo:font-weight="bold" officeooo:rsid="024abd79" style:font-weight-asian="bold" style:font-weight-complex="bold"/>
    </style:style>
    <style:style style:name="T133" style:family="text">
      <style:text-properties officeooo:rsid="023d2250"/>
    </style:style>
    <style:style style:name="T134" style:family="text">
      <style:text-properties officeooo:rsid="02741bee"/>
    </style:style>
    <style:style style:name="T135" style:family="text">
      <style:text-properties officeooo:rsid="027081d7"/>
    </style:style>
    <style:style style:name="T136" style:family="text">
      <style:text-properties fo:font-weight="bold" officeooo:rsid="02741bee" style:font-weight-asian="bold" style:font-weight-complex="bold"/>
    </style:style>
    <style:style style:name="T137" style:family="text">
      <style:text-properties fo:font-weight="normal" officeooo:rsid="02746be9" style:font-weight-asian="normal" style:font-weight-complex="normal"/>
    </style:style>
    <style:style style:name="T138" style:family="text">
      <style:text-properties fo:font-weight="bold" officeooo:rsid="027d5869" style:font-weight-asian="bold" style:font-weight-complex="bold"/>
    </style:style>
    <style:style style:name="T139" style:family="text">
      <style:text-properties officeooo:rsid="027d5869"/>
    </style:style>
    <style:style style:name="T140" style:family="text">
      <style:text-properties fo:font-weight="bold" officeooo:rsid="022189ea" style:font-weight-asian="bold" style:font-weight-complex="bold"/>
    </style:style>
    <style:style style:name="T141" style:family="text">
      <style:text-properties officeooo:rsid="022189ea"/>
    </style:style>
    <style:style style:name="T142" style:family="text">
      <style:text-properties officeooo:rsid="0234bcc3"/>
    </style:style>
    <style:style style:name="T143" style:family="text">
      <style:text-properties officeooo:rsid="025ffb69"/>
    </style:style>
    <style:style style:name="T144" style:family="text">
      <style:text-properties fo:font-weight="bold" officeooo:rsid="02235fcd" style:font-weight-asian="bold" style:font-weight-complex="bold"/>
    </style:style>
    <style:style style:name="T145" style:family="text">
      <style:text-properties fo:font-weight="normal" officeooo:rsid="0242a15d" style:font-weight-asian="normal" style:font-weight-complex="normal"/>
    </style:style>
    <style:style style:name="T146" style:family="text">
      <style:text-properties fo:font-weight="normal" officeooo:rsid="02382a4a" style:font-weight-asian="normal" style:font-weight-complex="normal"/>
    </style:style>
    <style:style style:name="T147" style:family="text">
      <style:text-properties officeooo:rsid="024c5159"/>
    </style:style>
    <style:style style:name="T148" style:family="text">
      <style:text-properties officeooo:rsid="025ca8d6"/>
    </style:style>
    <style:style style:name="T149" style:family="text">
      <style:text-properties fo:font-weight="normal" officeooo:rsid="025dad1e" style:font-weight-asian="normal" style:font-weight-complex="normal"/>
    </style:style>
    <style:style style:name="T150" style:family="text">
      <style:text-properties fo:font-weight="bold" officeooo:rsid="026d3ca9" style:font-weight-asian="bold" style:font-weight-complex="bold"/>
    </style:style>
    <style:style style:name="T151" style:family="text">
      <style:text-properties fo:font-weight="normal" officeooo:rsid="025ca8d6" style:font-weight-asian="normal" style:font-weight-complex="normal"/>
    </style:style>
    <style:style style:name="T152" style:family="text">
      <style:text-properties fo:font-weight="normal" officeooo:rsid="02314042" style:font-weight-asian="normal" style:font-weight-complex="normal"/>
    </style:style>
    <style:style style:name="T153" style:family="text">
      <style:text-properties fo:font-weight="normal" officeooo:rsid="0224779b" style:font-weight-asian="normal" style:font-weight-complex="normal"/>
    </style:style>
    <style:style style:name="T154" style:family="text">
      <style:text-properties officeooo:rsid="022a3392"/>
    </style:style>
    <style:style style:name="T155" style:family="text">
      <style:text-properties fo:font-weight="normal" officeooo:rsid="022189ea" style:font-weight-asian="normal" style:font-weight-complex="normal"/>
    </style:style>
    <style:style style:name="T156" style:family="text">
      <style:text-properties fo:font-weight="normal" officeooo:rsid="026e0a33" style:font-weight-asian="normal" style:font-weight-complex="normal"/>
    </style:style>
    <style:style style:name="T157" style:family="text">
      <style:text-properties fo:font-weight="normal" officeooo:rsid="027e5563" style:font-weight-asian="normal" style:font-weight-complex="normal"/>
    </style:style>
    <style:style style:name="T158" style:family="text">
      <style:text-properties officeooo:rsid="02655487"/>
    </style:style>
    <style:style style:name="T159" style:family="text">
      <style:text-properties fo:font-weight="bold" officeooo:rsid="024ffd84" style:font-weight-asian="bold" style:font-weight-complex="bold"/>
    </style:style>
    <style:style style:name="T160" style:family="text">
      <style:text-properties officeooo:rsid="024ffd84"/>
    </style:style>
    <style:style style:name="T161" style:family="text">
      <style:text-properties fo:font-weight="bold" officeooo:rsid="025ffb69" style:font-weight-asian="bold" style:font-weight-complex="bold"/>
    </style:style>
    <style:style style:name="T162" style:family="text">
      <style:text-properties officeooo:rsid="026e0a33"/>
    </style:style>
    <style:style style:name="T163" style:family="text">
      <style:text-properties officeooo:rsid="0261f5e2"/>
    </style:style>
    <style:style style:name="T164" style:family="text">
      <style:text-properties fo:font-weight="bold" officeooo:rsid="022bfd4f" style:font-weight-asian="bold" style:font-weight-complex="bold"/>
    </style:style>
    <style:style style:name="T165" style:family="text">
      <style:text-properties fo:font-weight="normal" officeooo:rsid="0236297c" style:font-weight-asian="normal" style:font-weight-complex="normal"/>
    </style:style>
    <style:style style:name="T166" style:family="text">
      <style:text-properties fo:font-weight="bold" officeooo:rsid="026e0a33" style:font-weight-asian="bold" style:font-weight-complex="bold"/>
    </style:style>
    <style:style style:name="T167" style:family="text">
      <style:text-properties fo:font-weight="normal" officeooo:rsid="022c0a35" style:font-weight-asian="normal" style:font-weight-complex="normal"/>
    </style:style>
    <style:style style:name="T168" style:family="text">
      <style:text-properties fo:font-weight="normal" officeooo:rsid="0261f5e2" style:font-weight-asian="normal" style:font-weight-complex="normal"/>
    </style:style>
    <style:style style:name="T169" style:family="text">
      <style:text-properties officeooo:rsid="0237fb32"/>
    </style:style>
    <style:style style:name="T170" style:family="text">
      <style:text-properties fo:font-weight="bold" officeooo:rsid="022e451f" style:font-weight-asian="bold" style:font-weight-complex="bold"/>
    </style:style>
    <style:style style:name="T171" style:family="text">
      <style:text-properties officeooo:rsid="022e451f"/>
    </style:style>
    <style:style style:name="T172" style:family="text">
      <style:text-properties officeooo:rsid="022ca122"/>
    </style:style>
    <style:style style:name="T173" style:family="text">
      <style:text-properties officeooo:rsid="025c3c79"/>
    </style:style>
    <style:style style:name="T174" style:family="text">
      <style:text-properties fo:font-weight="bold" officeooo:rsid="026cf7b9" style:font-weight-asian="bold" style:font-weight-complex="bold"/>
    </style:style>
    <style:style style:name="T175" style:family="text">
      <style:text-properties officeooo:rsid="0236297c"/>
    </style:style>
    <style:style style:name="T176" style:family="text">
      <style:text-properties fo:font-weight="bold" officeooo:rsid="0262a9ec" style:font-weight-asian="bold" style:font-weight-complex="bold"/>
    </style:style>
    <style:style style:name="T177" style:family="text">
      <style:text-properties fo:font-weight="normal" officeooo:rsid="0262a9ec" style:font-weight-asian="normal" style:font-weight-complex="normal"/>
    </style:style>
    <style:style style:name="T178" style:family="text">
      <style:text-properties officeooo:rsid="0248d2eb"/>
    </style:style>
    <style:style style:name="T179" style:family="text">
      <style:text-properties fo:font-weight="normal" officeooo:rsid="026cf7b9" style:font-weight-asian="normal" style:font-weight-complex="normal"/>
    </style:style>
    <style:style style:name="T180" style:family="text">
      <style:text-properties fo:font-weight="normal" officeooo:rsid="025fb798" style:font-weight-asian="normal" style:font-weight-complex="normal"/>
    </style:style>
    <style:style style:name="T181" style:family="text">
      <style:text-properties officeooo:rsid="0262a9ec"/>
    </style:style>
    <style:style style:name="T182" style:family="text">
      <style:text-properties officeooo:rsid="022757a5"/>
    </style:style>
    <style:style style:name="T183" style:family="text">
      <style:text-properties fo:font-weight="bold" officeooo:rsid="02431f76" style:font-weight-asian="bold" style:font-weight-complex="bold"/>
    </style:style>
    <style:style style:name="T184" style:family="text">
      <style:text-properties officeooo:rsid="026cf7b9"/>
    </style:style>
    <style:style style:name="T185" style:family="text">
      <style:text-properties fo:font-weight="normal" officeooo:rsid="023d2250" style:font-weight-asian="normal" style:font-weight-complex="normal"/>
    </style:style>
    <style:style style:name="T186" style:family="text">
      <style:text-properties fo:font-weight="bold" officeooo:rsid="02704852" style:font-weight-asian="bold" style:font-weight-complex="bold"/>
    </style:style>
    <style:style style:name="T187" style:family="text">
      <style:text-properties fo:font-weight="bold" officeooo:rsid="02704f80" style:font-weight-asian="bold" style:font-weight-complex="bold"/>
    </style:style>
    <style:style style:name="T188" style:family="text">
      <style:text-properties fo:font-weight="bold" officeooo:rsid="023d2250" style:font-weight-asian="bold" style:font-weight-complex="bold"/>
    </style:style>
    <style:style style:name="T189" style:family="text">
      <style:text-properties fo:font-weight="normal" officeooo:rsid="02655487" style:font-weight-asian="normal" style:font-weight-complex="normal"/>
    </style:style>
    <style:style style:name="T190" style:family="text">
      <style:text-properties fo:font-weight="normal" officeooo:rsid="022bfd4f" style:font-weight-asian="normal" style:font-weight-complex="normal"/>
    </style:style>
    <style:style style:name="T191" style:family="text">
      <style:text-properties fo:font-weight="bold" officeooo:rsid="024f3b22" style:font-weight-asian="bold" style:font-weight-complex="bold"/>
    </style:style>
    <style:style style:name="T192" style:family="text">
      <style:text-properties fo:font-weight="normal" officeooo:rsid="024f3b22" style:font-weight-asian="normal" style:font-weight-complex="normal"/>
    </style:style>
    <style:style style:name="T193" style:family="text">
      <style:text-properties officeooo:rsid="024f3b22"/>
    </style:style>
    <style:style style:name="T194" style:family="text">
      <style:text-properties fo:font-style="normal" fo:font-weight="bold" officeooo:rsid="024f3b22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24ffd84" style:font-style-asian="normal" style:font-weight-asian="bold" style:font-style-complex="normal" style:font-weight-complex="bold"/>
    </style:style>
    <style:style style:name="T196" style:family="text">
      <style:text-properties officeooo:rsid="02704f80"/>
    </style:style>
    <style:style style:name="T197" style:family="text">
      <style:text-properties officeooo:rsid="0124ef49"/>
    </style:style>
    <style:style style:name="T198" style:family="text">
      <style:text-properties officeooo:rsid="011d1ff8"/>
    </style:style>
    <style:style style:name="T199" style:family="text">
      <style:text-properties fo:font-weight="normal" officeooo:rsid="01ebd1bb" style:font-weight-asian="normal" style:font-weight-complex="normal"/>
    </style:style>
    <style:style style:name="T200" style:family="text">
      <style:text-properties fo:font-weight="bold" officeooo:rsid="01ebd1bb" style:font-weight-asian="bold" style:font-weight-complex="bold"/>
    </style:style>
    <style:style style:name="T201" style:family="text">
      <style:text-properties officeooo:rsid="01ebd1bb"/>
    </style:style>
    <style:style style:name="T202" style:family="text">
      <style:text-properties officeooo:rsid="01fc8117"/>
    </style:style>
    <style:style style:name="T203" style:family="text">
      <style:text-properties officeooo:rsid="02879403"/>
    </style:style>
    <style:style style:name="T204" style:family="text">
      <style:text-properties officeooo:rsid="01f04e4a"/>
    </style:style>
    <style:style style:name="T205" style:family="text">
      <style:text-properties officeooo:rsid="01fe05bd"/>
    </style:style>
    <style:style style:name="T206" style:family="text">
      <style:text-properties officeooo:rsid="01fd73b3"/>
    </style:style>
    <style:style style:name="T207" style:family="text">
      <style:text-properties officeooo:rsid="01e9faac"/>
    </style:style>
    <style:style style:name="T208" style:family="text">
      <style:text-properties officeooo:rsid="012789ed"/>
    </style:style>
    <style:style style:name="T209" style:family="text">
      <style:text-properties officeooo:rsid="0108eef9"/>
    </style:style>
    <style:style style:name="T210" style:family="text">
      <style:text-properties officeooo:rsid="010d918c"/>
    </style:style>
    <style:style style:name="T211" style:family="text">
      <style:text-properties officeooo:rsid="00f2865b"/>
    </style:style>
    <style:style style:name="T212" style:family="text">
      <style:text-properties officeooo:rsid="00f44568"/>
    </style:style>
    <style:style style:name="T213" style:family="text">
      <style:text-properties officeooo:rsid="00ee0f78"/>
    </style:style>
    <style:style style:name="T214" style:family="text">
      <style:text-properties officeooo:rsid="010d7baa"/>
    </style:style>
    <style:style style:name="T215" style:family="text">
      <style:text-properties officeooo:rsid="01380cb9"/>
    </style:style>
    <style:style style:name="T216" style:family="text">
      <style:text-properties officeooo:rsid="010c03e8"/>
    </style:style>
    <style:style style:name="T217" style:family="text">
      <style:text-properties officeooo:rsid="02574d9d"/>
    </style:style>
    <style:style style:name="T218" style:family="text">
      <style:text-properties officeooo:rsid="0049c165"/>
    </style:style>
    <style:style style:name="T219" style:family="text">
      <style:text-properties officeooo:rsid="0104f98a"/>
    </style:style>
    <style:style style:name="T220" style:family="text">
      <style:text-properties officeooo:rsid="0105c84a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123ce0b" style:font-style-asian="italic" style:font-style-complex="italic"/>
    </style:style>
    <style:style style:name="T223" style:family="text">
      <style:text-properties officeooo:rsid="01daf459"/>
    </style:style>
    <style:style style:name="T224" style:family="text">
      <style:text-properties officeooo:rsid="012243b4"/>
    </style:style>
    <style:style style:name="T225" style:family="text">
      <style:text-properties officeooo:rsid="01f76d36"/>
    </style:style>
    <style:style style:name="T226" style:family="text">
      <style:text-properties officeooo:rsid="018163c9"/>
    </style:style>
    <style:style style:name="T227" style:family="text">
      <style:text-properties fo:font-weight="bold" officeooo:rsid="01f76d36" style:font-weight-asian="bold" style:font-weight-complex="bold"/>
    </style:style>
    <style:style style:name="T228" style:family="text">
      <style:text-properties officeooo:rsid="01f7ba86"/>
    </style:style>
    <style:style style:name="T229" style:family="text">
      <style:text-properties fo:font-style="italic" officeooo:rsid="01f76d36" style:font-style-asian="italic" style:font-style-complex="italic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25pt">
          <style:column style:rel-width="32767*" fo:start-indent="0pt" fo:end-indent="12.5pt"/>
          <style:column style:rel-width="32768*" fo:start-indent="12.5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0.8pt" fo:text-indent="-10.8pt" fo:margin-left="10.8pt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loext:num-list-format="%1%" text:bullet-char="↳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min-label-width="14.09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: <text:span text:style-name="T1">Heldenerschaffung</text:span></text:h>
        <text:p text:style-name="P2">Natürlich ist dein Charakter für dich das Zentrum des Spiels. Vermutlich hast du schon ein paar konkrete Vorstellungen und Ideen, die du gerne umsetzen möchtest.</text:p>
        <text:p text:style-name="P2">Also lass uns keine Zeit verschwenden. <text:span text:style-name="T2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2876411542" text:style-name="L1">
                <text:list-item>
                  <text:p text:style-name="P3"><text:span text:style-name="T3">Fertigkeiten</text:span>: <text:span text:style-name="T4">Verteil folgende Werte auf deine Fertigkeiten: </text:span><text:span text:style-name="T5">3, 3, 2, 2, 1, 1</text:span><text:span text:style-name="T4">. Alle anderen Fertigkeiten starten auf </text:span><text:span text:style-name="T5">0</text:span><text:span text:style-name="T4">.</text:span></text:p>
                </text:list-item>
                <text:list-item>
                  <text:p text:style-name="P4"><text:span text:style-name="T6">Spezialisierungen</text:span>: Wähle <text:span text:style-name="T7">3</text:span> Spezialisierungen.</text:p>
                </text:list-item>
                <text:list-item>
                  <text:p text:style-name="P5"><text:span text:style-name="T8">Merkmale</text:span>: Du startest mit:</text:p>
                </text:list-item>
              </text:list>
              <text:list text:style-name="L2">
                <text:list-item>
                  <text:list>
                    <text:list-item>
                      <text:p text:style-name="P6">AP: <text:span text:style-name="T9">6</text:span></text:p>
                    </text:list-item>
                    <text:list-item>
                      <text:p text:style-name="P6">LP: <text:span text:style-name="T9">6</text:span></text:p>
                    </text:list-item>
                    <text:list-item>
                      <text:p text:style-name="P7">SP: <text:span text:style-name="T5">1</text:span></text:p>
                    </text:list-item>
                    <text:list-item>
                      <text:p text:style-name="P6">EP: 0</text:p>
                    </text:list-item>
                    <text:list-item>
                      <text:p text:style-name="P6">Taler: <text:span text:style-name="T5">20</text:span></text:p>
                    </text:list-item>
                  </text:list>
                </text:list-item>
              </text:list>
              <text:list text:continue-list="list2876411542" text:style-name="L1">
                <text:list-item>
                  <text:p text:style-name="P8"><text:span text:style-name="T10">Disziplinen</text:span>: <text:span text:style-name="T5">Verteil 3 Punkte auf bis zu zwei Disziplinen.</text:span></text:p>
                </text:list-item>
                <text:list-item>
                  <text:p text:style-name="P9"><text:span text:style-name="T6">Optional, Vorteil</text:span>: <text:span text:style-name="T5">Wähle ein oder zwei passende Vorteile für deinen Charakter.</text:span></text:p>
                </text:list-item>
                <text:list-item>
                  <text:p text:style-name="P10"><text:span text:style-name="T8">Inventar</text:span>: <text:span text:style-name="T11">Sofern der Erzähler nichts anderes bestimmt, startest du mit 2 bis 3 Gegenständen die zu deinem Charakter passen und 3 Vorräten.</text:span></text:p>
                </text:list-item>
                <text:list-item>
                  <text:p text:style-name="P11"><text:span text:style-name="T8">Details</text:span>: <text:span text:style-name="T12">Gib deinem Charakter einen Namen, leg fest wo er herkommt, was ihn motiviert und beschreibe ein paar Details zu ihm (z.B. Geschlecht, Haarfarbe, </text:span><text:span text:style-name="T13">oder </text:span><text:span text:style-name="T12">Alter).</text:span></text:p>
                </text:list-item>
              </text:list>
            </table:table-cell>
          </table:table-row>
        </table:table>
        <text:p text:style-name="Standard"/>
        <text:h text:style-name="P12" text:outline-level="1">Kapitel <text:span text:style-name="T14">x</text:span><text:span text:style-name="T15">x</text:span><text:span text:style-name="T14">: </text:span><text:span text:style-name="T16">Fertigkeiten</text:span></text:h>
        <text:p text:style-name="P13"><text:span text:style-name="T16">Fertigkeiten</text:span><text:span text:style-name="T17"> verkörpern die Fähigkeiten deines Helden. </text:span><text:span text:style-name="T18">Sie zeigen was er kann und</text:span><text:span text:style-name="T17"> bilden die Basis für alle </text:span><text:span text:style-name="T19">seine </text:span><text:span text:style-name="T17">Proben.</text:span></text:p>
        <text:p text:style-name="P13"/>
        <text:section text:style-name="Sect2" text:name="Section5">
          <text:h text:style-name="P14" text:outline-level="2"><text:span text:style-name="T20">S</text:span>pezialisierungen</text:h>
          <text:p text:style-name="P15">Spezialisierungen verkörpern <text:span text:style-name="T21">Training in einem</text:span> bestimmten <text:span text:style-name="T22">Fachb</text:span>ereich <text:span text:style-name="T18">eine</text:span><text:span text:style-name="T16">r Fertigkeit</text:span><text:span text:style-name="T18">.</text:span></text:p>
          <text:p text:style-name="P16">Du erhältst +2 auf alle Proben, für die dein Held wenigstens eine passende <text:span text:style-name="T23">Spezialisierung</text:span> hat.</text:p>
          <text:p text:style-name="P16"/>
          <text:h text:style-name="P17" text:outline-level="2">Standard Fertigkeiten</text:h>
          <text:h text:style-name="P18" text:outline-level="3">Charisma</text:h>
          <text:p text:style-name="P19"><text:span text:style-name="T6">Spezialisierungen</text:span>: Etikette, Singen, Tanzen, Überreden, Verführen</text:p>
          <text:p text:style-name="P20"><text:span text:style-name="T24">Beschreibung</text:span><text:span text:style-name="T25">: </text:span>Charisma steht für Auftreten, Überzeugungskraft und den geschickten Umgang mit anderen Menschen.</text:p>
          <text:p text:style-name="P19"/>
          <text:h text:style-name="Heading_20_3" text:outline-level="3">Gerissenheit</text:h>
          <text:p text:style-name="P21"><text:span text:style-name="T6">Spezialisierungen</text:span>: <text:span text:style-name="T26">Fälschen, </text:span>Gassenwissen, Schleichen, <text:span text:style-name="T27">Schlösser</text:span><text:span text:style-name="T2"> knacken</text:span>, <text:span text:style-name="T26">Taschendiebstahl, Verkleiden</text:span></text:p>
          <text:p text:style-name="P22"><text:span text:style-name="T24">Beschreibung</text:span><text:span text:style-name="T25">: Gerissenheit steht für List, Heimlichkeit und die Fähigkeit, Hindernisse mit unkonventionellen Methoden zu überwinden.</text:span></text:p>
          <text:p text:style-name="P21"/>
          <text:h text:style-name="Heading_20_3" text:outline-level="3">Geschick</text:h>
          <text:p text:style-name="P21"><text:span text:style-name="T6">Spezialisierungen</text:span>: <text:span text:style-name="T26">Klettern, </text:span><text:span text:style-name="T18">Laufen, Springen, </text:span><text:span text:style-name="T28">Reiten</text:span></text:p>
          <text:p text:style-name="P21">Beschreibung: Geschick steht für Körperbeherrschung, Koordination und präzise Bewegungen.</text:p>
          <text:p text:style-name="P21"/>
          <text:h text:style-name="P23" text:outline-level="3">Intuition</text:h>
          <text:p text:style-name="P21"><text:span text:style-name="T6">Spezialisierungen</text:span>: <text:span text:style-name="T29">Empathie, Ermitteln, Gefahreninstinkt, Wahrnehmung</text:span></text:p>
          <text:p text:style-name="P21"><text:span text:style-name="T6">Beschreibung</text:span>: Intuition steht für Aufmerksamkeit, Menschenkenntnis und die Fähigkeit, Zusammenhänge und Gefahren zu erkennen.</text:p>
          <text:p text:style-name="P21"/>
          <text:h text:style-name="P24" text:outline-level="3">Kampf</text:h>
          <text:p text:style-name="P19"><text:span text:style-name="T6">Spezialisierungen</text:span>: <text:span text:style-name="T16">Axt</text:span><text:span text:style-name="T26">, </text:span>Armbrust, Bogen, Schwert, Degen, Waffenlos, <text:span text:style-name="T26">Geschütze</text:span></text:p>
          <text:p text:style-name="P19"><text:span text:style-name="T6">Beschreibung</text:span>: Kampf steht für den Umgang mit Waffen und die Fähigkeit, Gegner im Gefecht zu besiegen.</text:p>
          <text:p text:style-name="P19"/>
          <text:h text:style-name="Heading_20_3" text:outline-level="3">Klugheit</text:h>
          <text:p text:style-name="P21"><text:span text:style-name="T6">Spezialisierungen</text:span>: <text:span text:style-name="T30">Heraldik, </text:span><text:span text:style-name="T18">Geschichte, <text:s/>Jura, </text:span>Medizin, <text:span text:style-name="T30">Magiekunde</text:span></text:p>
          <text:p text:style-name="P21"><text:span text:style-name="T6">Beschreibung</text:span>: Klugheit steht für Wissen, Bildung und die Fähigkeit, Probleme durch Nachdenken und Fachkenntnis zu lösen.</text:p>
          <text:p text:style-name="P21"/>
          <text:h text:style-name="P25" text:outline-level="3">Stärke</text:h>
          <text:p text:style-name="P21"><text:span text:style-name="T6">Spezialisierungen</text:span>: <text:span text:style-name="T31">Ausdauer, <text:s/></text:span><text:span text:style-name="T32">Einschüchtern, </text:span><text:span text:style-name="T30">Kraftakte, </text:span><text:span text:style-name="T33">Schwimmen</text:span></text:p>
          <text:p text:style-name="P21"><text:span text:style-name="T6">Beschreibung</text:span>: Kraft steht für körperliche Stärke, Ausdauer und die Fähigkeit, Hindernisse mit Muskelkraft zu überwinden.</text:p>
          <text:p text:style-name="P21"/>
          <text:p text:style-name="P21"/>
          <text:p text:style-name="P21"/>
          <text:p text:style-name="P21"/>
          <text:h text:style-name="P26" text:outline-level="3"><text:soft-page-break/>Willenskraft</text:h>
          <text:p text:style-name="P27"><text:span text:style-name="T6">Spezialisierungen</text:span>: <text:span text:style-name="T34">Selbstbeherrschung, Konzentration, </text:span><text:span text:style-name="T35">Mut, Magieresistenz</text:span></text:p>
          <text:p text:style-name="P27"><text:span text:style-name="T6">Beschreibung</text:span>: Willenskraft steht für Mut, Selbstbeherrschung und die Fähigkeit, geistigen oder übernatürlichen Einflüssen zu widerstehen.</text:p>
          <text:p text:style-name="P21"/>
          <text:h text:style-name="Heading_20_3" text:outline-level="3">Zähigkeit</text:h>
          <text:p text:style-name="P21"><text:span text:style-name="T6">Spezialisierungen</text:span>: <text:span text:style-name="T36">Schild, </text:span><text:span text:style-name="T37">Lederrüstung, </text:span><text:span text:style-name="T36">Kettenhemd, </text:span><text:span text:style-name="T37">Plattenrüstung, Ohne Rüstung</text:span></text:p>
          <text:p text:style-name="P21"><text:span text:style-name="T6">Beschreibung</text:span>: Zähigkeit steht für körperliche Widerstandskraft und die Fähigkeit, Verletzungen, Erschöpfung und Strapazen zu überstehen.</text:p>
          <text:p text:style-name="Standard"/>
          <text:h text:style-name="Heading_20_3" text:outline-level="3">Zauberei</text:h>
          <text:p text:style-name="P28"><text:span text:style-name="T6">Spezialisierungen</text:span>: <text:span text:style-name="T35">Bestimmter Zauber (z.B. Teleport)</text:span></text:p>
          <text:p text:style-name="Standard"><text:span text:style-name="T38">Beschreibung</text:span><text:span text:style-name="T39">: </text:span>Zauberei steht für die Beherrschung magischer Kräfte und die Fähigkeit, übernatürliche Effekte zu wirken.</text:p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</text:section>
        <text:p text:style-name="P30"/>
        <text:h text:style-name="P31" text:outline-level="1">Kapitel <text:span text:style-name="T14">x: </text:span>Merkmale</text:h>
        <text:p text:style-name="P32">Merkmale beschreiben die passiven Eigenschaften deines Helden, <text:span text:style-name="T40">z.B.</text:span> wie viel Schaden er einstecken kann oder wie erschöpft er ist.</text:p>
        <text:p text:style-name="P32"/>
        <text:section text:style-name="Sect2" text:name="Section1">
          <text:h text:style-name="P33" text:outline-level="2">AP</text:h>
          <text:p text:style-name="P34">AP (Ausdauerpunkte) werden benötigt, um viele <text:span text:style-name="T41">der aktiven </text:span>Talente einzusetzen.</text:p>
          <text:p text:style-name="P34">Nach einer Nachtruhe regenerierst du W6 AP.</text:p>
          <text:p text:style-name="P35"/>
          <text:h text:style-name="P33" text:outline-level="2">LP</text:h>
          <text:p text:style-name="P34">LP (Lebenspunkte) geben an, wie viel Schaden dein Held einstecken kann.</text:p>
          <text:p text:style-name="P34">Erleidet dein Held Schaden, verliert er entsprechend viele LP. Sinken seine LP auf 0, wird er kampfunfähig.</text:p>
          <text:p text:style-name="P34">Eine Nachtruhe stellt <text:span text:style-name="T40">1</text:span> LP wieder her.</text:p>
          <text:p text:style-name="P35"/>
          <text:h text:style-name="P36" text:outline-level="2">SP</text:h>
          <text:p text:style-name="P37">SP (Schicksalspunkte) erlauben es dir, <text:span text:style-name="T42">eine Probe </text:span><text:span text:style-name="T40">erneut</text:span><text:span text:style-name="T42"> zu würfeln. Das neue Ergebnis ist dann </text:span><text:span text:style-name="T40">jedoch </text:span><text:span text:style-name="T42">bindend.</text:span></text:p>
          <text:p text:style-name="P37">Du beginnst jeden Spielabend mit allen deinen SP. Einmal ausgegebene SP können während des Spielabends nicht zurückgewonnen werden.</text:p>
          <text:h text:style-name="P38" text:outline-level="2">EP</text:h>
          <text:p text:style-name="P34">Du erhältst <text:span text:style-name="T43">10</text:span> EP (Erfahrungspunkt) pro Spielabend <text:span text:style-name="T43">und</text:span> <text:span text:style-name="T43">weitere 5 EP für </text:span>das Besiegen mächtiger Monster und das Abschließen von Quests.</text:p>
          <text:p text:style-name="P34">Nach etwa einer Woche Training können EP ausgegeben werden:</text:p>
          <text:list text:style-name="L3">
            <text:list-item>
              <text:p text:style-name="P39"><text:span text:style-name="T6">Fertigkeit</text:span> +1: Neuer Wert <text:span text:style-name="T4">*</text:span><text:span text:style-name="T43">2</text:span> EP</text:p>
            </text:list-item>
            <text:list-item>
              <text:p text:style-name="P39"><text:span text:style-name="T44">Neue </text:span><text:span text:style-name="T6">Spezialisierung</text:span>: <text:span text:style-name="T4">20</text:span> EP</text:p>
            </text:list-item>
            <text:list-item>
              <text:p text:style-name="P40"><text:span text:style-name="T6">Neues Talent</text:span>: <text:span text:style-name="T4">20</text:span> EP</text:p>
            </text:list-item>
          </text:list>
          <text:p text:style-name="P35"/>
          <text:h text:style-name="P41" text:outline-level="2">ST</text:h>
          <text:p text:style-name="P42"><text:span text:style-name="T45">Silberta</text:span>ler sind die Standardwährung des Spiels. Regeltechnisch werden nur Taler verwaltet, in der Spielwelt existieren jedoch verschiedene Münzen:</text:p>
          <text:list text:style-name="L4">
            <text:list-item>
              <text:p text:style-name="P43">1 Dukat</text:p>
            </text:list-item>
            <text:list-item>
              <text:p text:style-name="P43">10 Taler</text:p>
            </text:list-item>
            <text:list-item>
              <text:p text:style-name="P43">1<text:span text:style-name="T46">0</text:span>0 Heller</text:p>
            </text:list-item>
            <text:list-item>
              <text:p text:style-name="P43">1<text:span text:style-name="T46">00</text:span>0 Kreuzer</text:p>
            </text:list-item>
          </text:list>
          <text:p text:style-name="P44"/>
          <text:p text:style-name="P42"><text:span text:style-name="T47">Hinweis</text:span><text:span text:style-name="T46">: </text:span>Kleinstausgaben, wie ein Bier in der Taverne oder ein Trinkgeld für einen Botenjungen, müssen nicht verwaltet werden.</text:p>
        </text:section>
        <text:p text:style-name="P32"/>
        <text:p text:style-name="P32"/>
        <text:p text:style-name="P32"/>
        <text:h text:style-name="P45" text:outline-level="1">Kapitel <text:span text:style-name="T48">xx</text:span>: <text:span text:style-name="T5">Disziplinen</text:span></text:h>
        <text:p text:style-name="P46"/>
        <text:p text:style-name="P47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8">Stufe</text:p>
            </table:table-cell>
            <table:table-cell table:style-name="Table8.B1" office:value-type="string">
              <text:p text:style-name="P49">Verfügbare Talente</text:p>
            </table:table-cell>
          </table:table-row>
          <table:table-row>
            <table:table-cell table:style-name="Table8.A2" office:value-type="string">
              <text:p text:style-name="P50">1-<text:span text:style-name="T49">3</text:span></text:p>
            </table:table-cell>
            <table:table-cell table:style-name="Table8.B2" office:value-type="string">
              <text:p text:style-name="P51">Bronze</text:p>
            </table:table-cell>
          </table:table-row>
          <table:table-row>
            <table:table-cell table:style-name="Table8.A2" office:value-type="string">
              <text:p text:style-name="P52">4-6</text:p>
            </table:table-cell>
            <table:table-cell table:style-name="Table8.B2" office:value-type="string">
              <text:p text:style-name="P51">Bronze oder Silber</text:p>
            </table:table-cell>
          </table:table-row>
          <table:table-row>
            <table:table-cell table:style-name="Table8.A4" office:value-type="string">
              <text:p text:style-name="P52">7-9</text:p>
            </table:table-cell>
            <table:table-cell table:style-name="Table8.B4" office:value-type="string">
              <text:p text:style-name="P51">Bronze, Silber oder Gold</text:p>
            </table:table-cell>
          </table:table-row>
        </table:table>
        <text:p text:style-name="P53"/>
        <text:p text:style-name="P54"/>
        <text:h text:style-name="Heading_20_2" text:outline-level="2">Sonderregel, Verstärken</text:h>
        <text:p text:style-name="P55">Du kannst zusätzliche AP ausgeben, um Zahlenwerte eines Talents <text:span text:style-name="T50">für eine Anwendung </text:span>zu verdoppeln (z.B. um die Reichweite von 25 auf 50 Meter zu erhöhen oder den Durchmesser einer Explosion von 3m auf 6 auszuweiten).</text:p>
        <text:p text:style-name="P56"/>
        <text:h text:style-name="P57" text:outline-level="2">Abenteuer</text:h>
        <text:p text:style-name="P58"><text:span text:style-name="T6">Schlagwörter</text:span>: <text:span text:style-name="T51">Abenteuer, Glück, Überleben</text:span></text:p>
        <text:p text:style-name="P59"/>
        <text:h text:style-name="P60" text:outline-level="3">Bronze Talente</text:h>
        <text:p text:style-name="P61"><text:span text:style-name="T6">Ausdauernd</text:span>: Passiv. +<text:span text:style-name="T9">2</text:span> maximale AP. <text:span text:style-name="T52">Kann mehrfach gewählt werden.</text:span></text:p>
        <text:p text:style-name="P62"><text:span text:style-name="T53">Erste Hilfe</text:span><text:span text:style-name="T54">: </text:span>5 Minuten &amp; Berührung. Die Zielperson erholt sich innerhalb <text:span text:style-name="T55">einer Stunde</text:span> von 1 Schaden, einfachen Krankheiten <text:span text:style-name="T55">und</text:span> simplen Giften.</text:p>
        <text:p text:style-name="P63">Expertise<text:span text:style-name="T54">: 1 AP. Du erhältst einen Vorteil auf eine Proben, die nichts mit Kampf oder Magie zu tun hat.</text:span></text:p>
        <text:p text:style-name="P64"><text:span text:style-name="T56">Geländekunde</text:span><text:span text:style-name="T57">: Wähle beim Erlernen einen Geländetyp (z. B. Stadt oder Wald). Verbring 1 Stunde mit Nachforschungen in der Gewählten Umgebung um nützliche Informationen zur Region, Bewohnern und lokalen Besonderheiten zu erhalten. Kann mehrfach gewählt werden.</text:span></text:p>
        <text:p text:style-name="P59"><text:span text:style-name="T58">Glück</text:span><text:span text:style-name="T59">: Passiv. +1 </text:span><text:span text:style-name="T60">maximale </text:span><text:span text:style-name="T59">SP. </text:span><text:span text:style-name="T61">Kann </text:span><text:span text:style-name="T50">4x</text:span><text:span text:style-name="T61"> gewählt werden.</text:span></text:p>
        <text:p text:style-name="P59"><text:span text:style-name="T62">Hinterhalt</text:span><text:span text:style-name="T63">: Passiv. Du verursachst +1 Schaden </text:span><text:span text:style-name="T64">bei</text:span><text:span text:style-name="T63"> abgelenkte</text:span><text:span text:style-name="T64">n</text:span><text:span text:style-name="T63"> Gegner</text:span><text:span text:style-name="T64">n</text:span><text:span text:style-name="T63">.</text:span></text:p>
        <text:p text:style-name="P59"><text:span text:style-name="T65">Parkour</text:span><text:span text:style-name="T66">: Bewegung &amp; 1 AP. Beweg dich bis zu 12 Meter, ignoriere schwieriges Gelände und </text:span><text:span text:style-name="T67">erklimm Wände ohne Probe.</text:span></text:p>
        <text:p text:style-name="P65"><text:span text:style-name="T6">Sprache</text:span>: Passiv. Du erlernst eine neue Sprache.</text:p>
        <text:p text:style-name="P59"><text:span text:style-name="T68">Unauffällig</text:span><text:span text:style-name="T69">: Passiv. Du wirst meist ignoriert, bist unauffällig und schwer zu beschreiben.</text:span></text:p>
        <text:p text:style-name="P66"><text:span text:style-name="T6">Zäh</text:span>: <text:span text:style-name="T70">Passiv. </text:span><text:span text:style-name="T71">+</text:span><text:span text:style-name="T9">2</text:span><text:span text:style-name="T71"> </text:span><text:span text:style-name="T60">maximale</text:span><text:span text:style-name="T71"> LP. </text:span><text:span text:style-name="T52">Kann mehrfach gewählt werden.</text:span></text:p>
        <text:p text:style-name="P67"/>
        <text:h text:style-name="P60" text:outline-level="3"><text:span text:style-name="T51">Silber</text:span> Talente <text:span text:style-name="T51">(Stufe 4+)</text:span></text:h>
        <text:p text:style-name="P68"><text:span text:style-name="T6">Katzenaugen</text:span>: Passiv. Du kannst im Dunkeln sehen.</text:p>
        <text:p text:style-name="P59"><text:span text:style-name="T6">Krähenfüße</text:span>: Aktion &amp; 1 AP. Ein Bereich von 3 Metern wird zu schwierigem Gelände, bis die Krähenfüße entfernt werden.</text:p>
        <text:p text:style-name="P59"/>
        <text:p text:style-name="P59"/>
        <text:p text:style-name="P59"/>
        <text:h text:style-name="P69" text:outline-level="2">Kampf</text:h>
        <text:p text:style-name="P70"><text:span text:style-name="T6">Schlagwörter</text:span>: <text:span text:style-name="T72">Kampf, </text:span><text:span text:style-name="T73">Mut, Führungsstärke</text:span></text:p>
        <text:p text:style-name="Standard"/>
        <text:h text:style-name="P71" text:outline-level="3">Bronze Talente</text:h>
        <text:p text:style-name="P72"><text:span text:style-name="T6">Ausweichen</text:span>: <text:span text:style-name="T74">1 AP. </text:span><text:span text:style-name="T75">Du erhältst einen</text:span><text:span text:style-name="T74"> Vorteil auf eine </text:span><text:span text:style-name="T54">Parade</text:span><text:span text:style-name="T74">.</text:span></text:p>
        <text:p text:style-name="P73"><text:span text:style-name="T58">Blutrausch</text:span><text:span text:style-name="T59">: </text:span><text:span text:style-name="T70">Passiv. </text:span><text:span text:style-name="T59">Nachdem du einen Gegner ausgeschaltet hast, darfst du sofort eine </text:span><text:span text:style-name="T76">weitere</text:span><text:span text:style-name="T59"> Attacke ausführen.</text:span></text:p>
        <text:p text:style-name="P74"><text:span text:style-name="T77">Finte</text:span><text:span text:style-name="T78">: </text:span><text:span text:style-name="T79">1</text:span> AP. <text:span text:style-name="T75">Du erhältst einen</text:span><text:span text:style-name="T74"> Vorteil auf eine Attacke.</text:span></text:p>
        <text:p text:style-name="P73"><text:span text:style-name="T80">Provozieren</text:span><text:span text:style-name="T81">: </text:span><text:span text:style-name="T82">Aktion &amp; 1 AP. </text:span><text:span text:style-name="T81">Ziehe die Aufmerksamkeit von bis zu drei Gegnern auf dich.</text:span></text:p>
        <text:p text:style-name="P75"><text:span text:style-name="T6">Schnellziehen</text:span>: Passiv. Du kannst eine Waffe als freie Aktion ziehen.</text:p>
        <text:p text:style-name="P76"><text:span text:style-name="T6">Tapferkeit</text:span>: Passiv. Du und Verbündete in deiner Nähe erhalten einen Vorteil auf Moralproben.</text:p>
        <text:p text:style-name="P77"/>
        <text:h text:style-name="P71" text:outline-level="3">Silber Talente <text:span text:style-name="T64">(Stufe 4+)</text:span></text:h>
        <text:p text:style-name="P78"><text:span text:style-name="T83">Befehle</text:span>: Aktion &amp; 1 AP. Ein Verbündeter darf sofort eine Aktion oder Bewegung ausführen.</text:p>
        <text:p text:style-name="P79"><text:span text:style-name="T6">Entwaffnen</text:span>: <text:span text:style-name="T82">Aktion &amp; 1 AP</text:span> vor deiner Attacke. Bei Erfolg entreißt du dem Gegner die Waffe, anstelle Schaden zu verursachen.</text:p>
        <text:p text:style-name="P80"><text:span text:style-name="T83">Inspirieren</text:span><text:span text:style-name="T84">: Aktion &amp; 1 AP. </text:span><text:span text:style-name="T85">Alle Verbündeten </text:span><text:span text:style-name="T61">erhalten einen Vorteil auf ihre nächste Attacke oder Parade.</text:span></text:p>
        <text:p text:style-name="P73"><text:span text:style-name="T86">Kampfrausch </text:span><text:span text:style-name="T87">I</text:span><text:span text:style-name="T88">: </text:span><text:span text:style-name="T82">Aktion &amp; 1 AP.</text:span><text:span text:style-name="T89"> Führ</text:span><text:span text:style-name="T70">e</text:span><text:span text:style-name="T89"> 2 </text:span><text:span text:style-name="T88">Attacken aus.</text:span></text:p>
        <text:p text:style-name="P73"><text:span text:style-name="T90">Kampfsinn</text:span><text:span text:style-name="T91">: </text:span><text:span text:style-name="T92">Passiv. </text:span><text:span text:style-name="T91">Du erleidest erst ab der dritten Parade einen Nachteil.</text:span></text:p>
        <text:p text:style-name="P81"><text:span text:style-name="T62">Konter</text:span><text:span text:style-name="T63">: </text:span>Reaktion &amp; 1 AP vor einer Nahkampfparade. <text:span text:style-name="T63">Bei Erfolg wehrst du den Angriff ab und der Gegner erleidet 1 Schaden.</text:span></text:p>
        <text:p text:style-name="P75"><text:span text:style-name="T86">Sturmangriff</text:span>: <text:span text:style-name="T82">Aktion &amp; 1 AP. </text:span><text:span text:style-name="T92">Du kannst sprinten UND attackieren.</text:span></text:p>
        <text:p text:style-name="P82"/>
        <text:h text:style-name="P71" text:outline-level="3">Gold Talente <text:span text:style-name="T64">(Stufe 7+)</text:span></text:h>
        <text:p text:style-name="P83"><text:span text:style-name="T6">Kampfrausch II</text:span>: <text:span text:style-name="T54">Erfordert </text:span><text:span text:style-name="T93">Kampfrausch</text:span><text:span text:style-name="T74"> I</text:span><text:span text:style-name="T54">. </text:span><text:span text:style-name="T82">Aktion &amp; 1 AP. </text:span><text:span text:style-name="T89">Führ</text:span><text:span text:style-name="T70">e</text:span><text:span text:style-name="T89"> 3 </text:span>Attacken aus.</text:p>
        <text:p text:style-name="P84"><text:span text:style-name="T6">Kampfsinn </text:span><text:span text:style-name="T94">II</text:span>: <text:span text:style-name="T88">Erfordert </text:span><text:span text:style-name="T89">Kampfsinn I</text:span><text:span text:style-name="T88">. </text:span><text:span text:style-name="T70">Passiv. Du erleidest erst ab der vierten Parade einen Nachteil.</text:span></text:p>
        <text:p text:style-name="P74"><text:span text:style-name="T95">Niederstrecken</text:span><text:span text:style-name="T63">:</text:span><text:span text:style-name="T82"> </text:span><text:span text:style-name="T96">Nach einer erfolgreichen Attacke darfst du 1 AP ausgeben, um 1 zusätzlichen Schaden zu verursachen. Dies ist mit Kampfrausch kombinierbar.</text:span></text:p>
        <text:p text:style-name="P85"/>
        <text:h text:style-name="P86" text:outline-level="2">Alchemie</text:h>
        <text:p text:style-name="P87"><text:span text:style-name="T6">Schlagwörter</text:span>: Tränke, Magische Artefakte, Verzauberung<text:span text:style-name="T97">en</text:span></text:p>
        <text:p text:style-name="P88"><text:span text:style-name="T6">Sonderregel, </text:span><text:span text:style-name="T98">Alchemika</text:span><text:span text:style-name="T6">*</text:span>: Alchemika können vorbereitet und an andere Personen übergeben werden. Dies kostet 1 AP zusätzlich. Das Alchemika bleibt eine Woche haltbar.</text:p>
        <text:p text:style-name="P89"><text:span text:style-name="T99">Sonderregel, </text:span><text:span text:style-name="T100">Gift</text:span><text:span text:style-name="T101">**</text:span><text:span text:style-name="T102">: <text:s/>Gifte können nicht im Kampf eingesetzt werden. Sie können auf bis zu 7 m Distanz (z.B. per Dart oder Blasrohr) verabreicht oder </text:span><text:span text:style-name="T103">in </text:span><text:span text:style-name="T102">Speisen </text:span><text:span text:style-name="T103">oder</text:span><text:span text:style-name="T102"> Getränken </text:span><text:span text:style-name="T103">gemischt</text:span><text:span text:style-name="T102"> werden. Eine Klugheitsprobe entscheidet, ob das Gift wirkt.</text:span></text:p>
        <text:p text:style-name="P90"/>
        <text:h text:style-name="P91" text:outline-level="3">Bronze Talente</text:h>
        <text:p text:style-name="P92"><text:span text:style-name="T104">Objekt</text:span><text:span text:style-name="T98">analyse</text:span><text:span text:style-name="T105">: 10 Minuten. Der Erzähler beantwortet dir 3 Ja/Nein-Fragen zu einem Gegenstand oder Ort.</text:span></text:p>
        <text:p text:style-name="P93"><text:span text:style-name="T6">Rauchbombe*</text:span>: Aktion &amp; 1 AP. Erzeuge einen dichten Rauchnebel mit 3 m Durchmesser in bis zu 25 m Entfernung. Hält 5 Minuten.</text:p>
        <text:p text:style-name="P94"><text:span text:style-name="T106">Superkleber</text:span><text:span text:style-name="T107">*</text:span><text:span text:style-name="T108">: 1 Minute &amp; 1 AP. Bestreiche bis zu 1 m² Fläche mit schnell wirkendem Superkleber.</text:span></text:p>
        <text:p text:style-name="P94"><text:span text:style-name="T6">Tricks</text:span><text:span text:style-name="T107">*</text:span>: Passiv. Du kannst kleine <text:span text:style-name="T97">alchemische</text:span> <text:span text:style-name="T97">Mittel herstellen</text:span>, <text:span text:style-name="T97">z.B. unsichtbare Tinte, leuchtendes Wasser oder Stinkpulver.</text:span></text:p>
        <text:p text:style-name="P90"/>
        <text:h text:style-name="P91" text:outline-level="3">Silber Talente <text:span text:style-name="T64">(Stufe 4+)</text:span></text:h>
        <text:p text:style-name="P95"><text:span text:style-name="T6">Alchemistisches Feuer</text:span><text:span text:style-name="T107">*</text:span>: Aktion &amp; 1 AP. Entzünde einen Bereich von 3 m Durchmesser in bis zu 25 m Entfernung. <text:span text:style-name="T109">Hält 10 Minuten.</text:span></text:p>
        <text:p text:style-name="P96"><text:span text:style-name="T110">Infusion</text:span><text:span text:style-name="T111">: </text:span><text:span text:style-name="T75">10 Minuten,</text:span><text:span text:style-name="T111"> Berührung &amp; 1 AP. </text:span><text:span text:style-name="T75">Du erhöhst den Bonus eines beliebigen Gegenstands für 1 Tag um 1. Waffen mit Infusion gelten als magisch.</text:span></text:p>
        <text:p text:style-name="P96"><text:span text:style-name="T112">Narkotikum</text:span><text:span text:style-name="T113">*</text:span><text:span text:style-name="T114">*</text:span><text:span text:style-name="T54">: A</text:span>ktion &amp; 1 AP. Das Opfer wird müde, muss brechen oder wird auf andere Weise außer Gefecht gesetzt.</text:p>
        <text:p text:style-name="P97"><text:span text:style-name="T6">Mutationselexier</text:span>*: Aktion, Berührung &amp; 1 AP. Das Ziel erhält eine Tierfähigkeit (z.B. Katzenaugen, Spinnenklettern, Fischkiemen). Hält 1 Stunde.</text:p>
        <text:p text:style-name="P98"><text:span text:style-name="T6">Wahrheitsserum**</text:span>: Aktion &amp; 1 AP. Das Opfer wird gesprächig und leicht zu beeinflussen.</text:p>
        <text:p text:style-name="P99"/>
        <text:h text:style-name="P91" text:outline-level="3">Gold Talente <text:span text:style-name="T64">(Stufe </text:span><text:span text:style-name="T115">7</text:span><text:span text:style-name="T64">+)</text:span></text:h>
        <text:p text:style-name="P96"><text:span text:style-name="T116">Artefakt</text:span><text:span text:style-name="T117">*</text:span><text:span text:style-name="T118">: 30 Minuten &amp; </text:span><text:span text:style-name="T119">2</text:span><text:span text:style-name="T118"> AP. Du speicherst eine Ladung eines Zaubers in einem Gegenstand.</text:span><text:span text:style-name="T67"> </text:span><text:span text:style-name="T120">Du brauchst jemanden der den Zauber während der Herstellung wirkt. Der Gegenstand ist für 1 Woche haltbar.</text:span></text:p>
        <text:p text:style-name="P94"><text:span text:style-name="T116">Drachensäure</text:span><text:span text:style-name="T107">*</text:span>: Aktion, Berührung &amp; 1 AP. <text:span text:style-name="T108">Du zerstörst bis zu 3m³ gewöhnliches Material mit einer extrem ätzenden Mixtur.</text:span></text:p>
        <text:p text:style-name="P94"><text:span text:style-name="T101">Verwandlungstrunk</text:span><text:span text:style-name="T107">*</text:span><text:span text:style-name="T97">: Aktion, Berührung &amp; 1 AP. Erfordert Material der gewünschten Gestalt (z.B. Haare oder Blut). Das Ziel verwandelt sich in ein Tier oder eine </text:span><text:span text:style-name="T72">andere </text:span><text:span text:style-name="T97">Person. Hält 1 Stunde.</text:span></text:p>
        <text:h text:style-name="P100" text:outline-level="2">Elementarmagie</text:h>
        <text:p text:style-name="P101"><text:span text:style-name="T121">Schlagwörter</text:span><text:span text:style-name="T122">: </text:span><text:span text:style-name="T123">Feuer, Erde, Luft </text:span><text:span text:style-name="T124">und</text:span><text:span text:style-name="T123"> Wasser</text:span></text:p>
        <text:p text:style-name="P102"><text:span text:style-name="T6">Sonderregel, </text:span><text:span text:style-name="T125">Elementarmagie</text:span>: <text:span text:style-name="T126">Du musst vor der Anwendung ein Element wählen: </text:span><text:span text:style-name="T123">Feuer, Erde, Luft oder Wasser. </text:span><text:span text:style-name="T124">Du kannst auch Mischformen beeinflussen (z. B. Lava, Eis, Nebel oder Dampf). Dies ist jedoch schwieriger.</text:span></text:p>
        <text:p text:style-name="P89">Sofern nicht anders angegeben, musst du das Ziel sehen können. Nicht-passive Zauber erfordern eine erfolgreiche Zauberprobe.</text:p>
        <text:p text:style-name="P103"/>
        <text:h text:style-name="P104" text:outline-level="3">Bronze Talente</text:h>
        <text:p text:style-name="P105"><text:span text:style-name="T127">Geschoss</text:span>: Aktion. <text:span text:style-name="T128">Würfel Zauberei für einen magischen Angriff mit </text:span><text:span text:style-name="T129">25</text:span><text:span text:style-name="T128">m Reichweite.</text:span></text:p>
        <text:p text:style-name="P106"><text:span text:style-name="T125">Harmonie</text:span>: <text:span text:style-name="T123">Aktion &amp; 1 AP. Du wirst immun gegen mindere Ausprägungen des gewählten Elements (unter Wasser atmen, Wüstenhitze ignorieren, starken Wind ertragen, usw.). Hält 1 Stunde.</text:span></text:p>
        <text:p text:style-name="P103"><text:span text:style-name="T125">Schild</text:span><text:span text:style-name="T105">: </text:span>Reaktion &amp; 1 AP. <text:span text:style-name="T75">Du erhältst einen</text:span><text:span text:style-name="T74"> Vorteil auf eine Parade.</text:span></text:p>
        <text:p text:style-name="P107"><text:span text:style-name="T6">Tricks</text:span>: Passiv. Du kannst kleine <text:span text:style-name="T123">elementare</text:span> Effekte erzeugen, z.B. <text:span text:style-name="T123">Tasse erhitzen, Windhauch beschwören.</text:span></text:p>
        <text:p text:style-name="P107"/>
        <text:h text:style-name="P104" text:outline-level="3">Silber Talente <text:span text:style-name="T64">(Stufe 4+)</text:span></text:h>
        <text:p text:style-name="P103"><text:span text:style-name="T130">Erneuerung</text:span><text:span text:style-name="T131">:</text:span> Aktion, Berührung &amp; 1 AP. <text:span text:style-name="T124">1m³ des Gewählten Elements </text:span><text:span text:style-name="T129">wird aufgelöst, </text:span><text:span text:style-name="T124">um dich von 1 Schaden, einfachen Krankheiten und simplen Giften zu heilen.</text:span></text:p>
        <text:p text:style-name="P103"><text:span text:style-name="T132">Explosion</text:span><text:span text:style-name="T133">: Aktion &amp; 1 AP. Erzeuge in bis zu 25 m Entfernung eine Explosion mit 3 m Durchmesser. Alle Ziele im </text:span><text:span text:style-name="T124">Bereich</text:span><text:span text:style-name="T133"> erleiden Schaden.</text:span></text:p>
        <text:p text:style-name="P103"><text:span text:style-name="T104">Mauer</text:span><text:span text:style-name="T105">: Aktion &amp; 1 AP. Erschaffe eine 3 m lange und 3 m hohe Barriere aus dem gewählten Element. Hält 10 Minuten.</text:span></text:p>
        <text:p text:style-name="P103"><text:span text:style-name="T125">Kontrolle</text:span>: Aktion &amp; 1 AP. <text:span text:style-name="T123">Bewege (</text:span><text:span text:style-name="T134">S</text:span><text:span text:style-name="T123">chritttempo), verstärke oder schwäche elementare Ausprägung in </text:span><text:span text:style-name="T134">25</text:span><text:span text:style-name="T123">m Umkreis. </text:span><text:span text:style-name="T124">Hält solange du dich Konzentrierst.</text:span></text:p>
        <text:p text:style-name="P103"/>
        <text:h text:style-name="P104" text:outline-level="3">Gold Talente <text:span text:style-name="T135">(Stufe 7+)</text:span></text:h>
        <text:p text:style-name="P103"><text:span text:style-name="T6">Beschwörung</text:span>: Aktion &amp; 1 AP. Du beschwörst ein Elementar dass dir loyal dient. Hält 1 Stunde.</text:p>
        <text:p text:style-name="P103"><text:span text:style-name="T136">Elementarbann</text:span><text:span text:style-name="T134">: Aktion &amp; 1 AP. Du löschst, vertreibst oder beruhigst eine große Menge eines Elements im Umkreis von 25m.</text:span></text:p>
        <text:p text:style-name="P103"><text:span text:style-name="T6">Verschmelzen</text:span><text:span text:style-name="T54">: Aktion &amp; 1 AP. Du erschaffst ein magisches Portal zwischen zwei Quellen desselben Elements. Du musst die Zielquelle sehen oder </text:span><text:span text:style-name="T137">in den letzten 7 Tagen</text:span><text:span text:style-name="T54"> berührt haben. </text:span><text:span text:style-name="T137">Hält 1 Runde.</text:span></text:p>
        <text:p text:style-name="P103"/>
        <text:h text:style-name="P69" text:outline-level="2">Illusionen</text:h>
        <text:p text:style-name="P108"><text:span text:style-name="T121">Schlagwörter</text:span><text:span text:style-name="T122">: </text:span>Illusionen, Gedankenmanipulation</text:p>
        <text:p text:style-name="P109"><text:span text:style-name="T6">Sonderregel, </text:span><text:span text:style-name="T138">Illusionen</text:span>: Sofern nicht anders angegeben, musst du das Ziel sehen können. Nicht-passive Zauber erfordern eine erfolgreiche Zauberprobe. <text:span text:style-name="T139">Nur lebende Wesen werden von Illusionen beeinflusst.</text:span></text:p>
        <text:p text:style-name="P108"/>
        <text:h text:style-name="P110" text:outline-level="3">Bronze Talente</text:h>
        <text:p text:style-name="P111"><text:span text:style-name="T140">Botschaft</text:span><text:span text:style-name="T141">: Aktion &amp; 1 AP / </text:span><text:span text:style-name="T142">Erfordert keinen Sichtkontakt. </text:span><text:span text:style-name="T143">Die </text:span><text:span text:style-name="T64">Zielperson erhält </text:span><text:span text:style-name="T143">eine </text:span><text:span text:style-name="T64">kurze, </text:span><text:span text:style-name="T143">mentale</text:span><text:span text:style-name="T64"> Botschaft (2 bis 3 Sätze).</text:span></text:p>
        <text:p text:style-name="P112"><text:span text:style-name="T144">Schlaf</text:span>: <text:span text:style-name="T54">Aktion &amp; 1 AP. </text:span><text:span text:style-name="T145">Nicht im Kampf nutzbar. </text:span><text:span text:style-name="T146">Das anvisierte Lebewesen</text:span><text:span text:style-name="T54"> schläft ein.</text:span></text:p>
        <text:p text:style-name="P113"><text:span text:style-name="T6">Traumbilder</text:span>: Aktion &amp; 1 AP. <text:span text:style-name="T142">Erfordert keinen Sichtkontakt. </text:span><text:span text:style-name="T105">Du dringst in den Traum einer Person ein. Du kannst den Traum anpassen und dich mit dem Träumer unterhalten.</text:span></text:p>
        <text:p text:style-name="P111"><text:span text:style-name="T6">Tricks</text:span>: Passiv. Du kannst kleine magische Effekte erzeugen, <text:span text:style-name="T147">z.B. Bauchreden, kleine Halluzinationen </text:span><text:span text:style-name="T143">erzeugen</text:span><text:span text:style-name="T147">, etc.</text:span></text:p>
        <text:p text:style-name="P114"><text:span text:style-name="T6">Verwirren</text:span>: Aktion &amp; 1 AP. Umstehende Feinde ignorieren dich für eine Runde.</text:p>
        <text:p text:style-name="P115"/>
        <text:h text:style-name="P110" text:outline-level="3">Silber Talente <text:span text:style-name="T64">(Stufe 4+)</text:span></text:h>
        <text:p text:style-name="P116">Dunkelheit / Stille<text:span text:style-name="T54">: Aktion &amp; 1 AP: Du erzeugst ein 3m durchmessendes Gebiet absoluter Dunkelheit oder Stille. Hält 5 Minuten.</text:span></text:p>
        <text:p text:style-name="P117"><text:span text:style-name="T148">Entzücken</text:span><text:span text:style-name="T54">: Aktion &amp; 1 AP. </text:span><text:span text:style-name="T75">Nicht im Kampf einsetzbar. </text:span><text:span text:style-name="T149">Bis zu drei Opfer möchten deine Freunde sein und glauben dir fast alles. Hält 1 Stunde.</text:span></text:p>
        <text:p text:style-name="P118"><text:span text:style-name="T150">Gedankenlesen</text:span>: <text:span text:style-name="T141">Aktion &amp; 1 AP. Der Erzähler beantwortet drei Ja/Nein-Fragen zu den Gedanken, Absichten oder Erinnerungen einer Person.</text:span></text:p>
        <text:p text:style-name="P119"><text:span text:style-name="T6">Hypnose</text:span>: Aktion &amp; 1 AP. <text:span text:style-name="T105">Nicht im Kampf einsetzbar. </text:span>Du gibst dem Opfer einen einfachen Befehl, den es befolgen muss. <text:span text:style-name="T143">Hält 10 Minuten.</text:span></text:p>
        <text:p text:style-name="P112"><text:span text:style-name="T6">Illusion</text:span><text:span text:style-name="T54">: Aktion &amp; 1 AP. </text:span><text:span text:style-name="T151">Du erzeugst eine </text:span><text:span text:style-name="T152">Illusion. SG hängt vom Umfang ab (Tür tarnen &lt; Bühnenbild &lt; Traum Schloss). </text:span><text:span text:style-name="T153">Hält </text:span><text:span text:style-name="T152">3 Stunden.</text:span></text:p>
        <text:p text:style-name="P111"><text:span text:style-name="T144">Unsichtbarkeit</text:span><text:span text:style-name="T141">: </text:span>Aktion &amp; 1 AP. <text:span text:style-name="T141">Selbst oder Berührung. Die Zielperson wird </text:span>unsichtbar, <text:span text:style-name="T154">solange sie sich unauffällig verhält.</text:span></text:p>
        <text:p text:style-name="P120"/>
        <text:h text:style-name="P110" text:outline-level="3">Gold Talente <text:span text:style-name="T64">(Stufe 7+)</text:span></text:h>
        <text:p text:style-name="P121">Aura<text:span text:style-name="T54">: </text:span><text:span text:style-name="T155">Aktion &amp; 1 AP. </text:span><text:span text:style-name="T54">Du verstärkst oder dämpfst eine Emotion in einer Gruppe (z.B. Angst, Wut, Mut oder Freude). </text:span><text:span text:style-name="T156">So kannst du z.B. einen wütenden Mobb aufstacheln oder besänftigen.</text:span></text:p>
        <text:p text:style-name="P122"><text:span text:style-name="T6">Mimik</text:span>: Aktion &amp; 1 AP. <text:span text:style-name="T152">Du erscheinst allen Betrachtern als eine andere Person und imitierst deren Stimme perfekt. </text:span><text:span text:style-name="T157">Hält 3 Stunden.</text:span></text:p>
        <text:p text:style-name="P123"><text:span text:style-name="T6">Vergessen</text:span>: Aktion &amp; 1 AP. Du lässt die Zielperson etwas vergessen das in <text:span text:style-name="T158">den letzten 7 Tagen passiert ist.</text:span></text:p>
        <text:p text:style-name="P124"/>
        <text:h text:style-name="P69" text:outline-level="2">Mystik</text:h>
        <text:p text:style-name="P108"><text:span text:style-name="T121">Schlagwörter</text:span><text:span text:style-name="T122">: Hellsicht, </text:span>Raum, Zeit</text:p>
        <text:p text:style-name="P125"><text:span text:style-name="T6">Sonderregel, Zauber*</text:span>: Eine magische Fähigkeit. Sofern nicht anders angegeben, musst du das Ziel sehen können. Nicht-passive Zauber erfordern eine erfolgreiche Zauberprobe.</text:p>
        <text:p text:style-name="P85"/>
        <text:h text:style-name="P110" text:outline-level="3">Bronze Talente</text:h>
        <text:p text:style-name="P111"><text:span text:style-name="T159">Fixieren*</text:span><text:span text:style-name="T160">: Aktion, Berührung &amp; 1 AP. Gegenstand wird </text:span><text:span text:style-name="T148">komplett unbeweglich</text:span><text:span text:style-name="T160">. Hält 1 Stunde.</text:span></text:p>
        <text:p text:style-name="P126"><text:span text:style-name="T6">Kompass*</text:span>: Aktion &amp; 1 AP. Du erfährst die Distanz und Richtung zu einem dir bekannten Gegenstand.</text:p>
        <text:p text:style-name="P127"><text:span text:style-name="T161">Stoß</text:span><text:span text:style-name="T6">*</text:span>: Aktion. <text:span text:style-name="T128">Würfel Zauberei für einen magischen Angriff mit 10m Reichweite. </text:span><text:span text:style-name="T143">Opfer wird w6 Meter von dir weg geschleudert.</text:span></text:p>
        <text:p text:style-name="P128"><text:span text:style-name="T6">Tricks*</text:span>: Passiv. Du kannst kleine magische Effekte erzeugen, z.B. <text:span text:style-name="T55">Fenster</text:span> <text:span text:style-name="T143">auf </text:span><text:span text:style-name="T162">D</text:span><text:span text:style-name="T143">istanz </text:span><text:span text:style-name="T55">öffnen,</text:span> <text:span text:style-name="T55">Kleidung reinigen/</text:span><text:span text:style-name="T143">reparieren, </text:span><text:span text:style-name="T162">den Namen einer Person erraten bevor sie sich vorstellt.</text:span></text:p>
        <text:p text:style-name="P129"><text:span text:style-name="T110">Zaubersicht</text:span><text:span text:style-name="T6">*</text:span>: Aktion &amp; 1 AP: Du kannst <text:span text:style-name="T163">Magie sehen. Mit Konzentration kannst du die wahre Gestalt von verwandelten Dingen erkennen und Illusionen durchschauen. Hält 10 Minuten.</text:span></text:p>
        <text:p text:style-name="P127"/>
        <text:h text:style-name="P130" text:outline-level="3">Silber Talente <text:span text:style-name="T64">(Stufe 4+)</text:span></text:h>
        <text:p text:style-name="P96"><text:span text:style-name="T164">Analyse*</text:span><text:span text:style-name="T55">: Aktion &amp; 1 AP: Der Erzähler beantwortet 3 Fragen zu Magie in der Umgebung.</text:span></text:p>
        <text:p text:style-name="P131"><text:span text:style-name="T6">Barriere*</text:span><text:span text:style-name="T54">: Aktion &amp; 1 AP. Erzeugt unzerstörbare, magische 3*3 Meter </text:span><text:span text:style-name="T165">W</text:span><text:span text:style-name="T54">and. Hält 5 Minuten.</text:span></text:p>
        <text:p text:style-name="Standard"><text:span text:style-name="T166">Hellsicht*</text:span><text:span text:style-name="T156">: 5 Minuten &amp; 1 AP: </text:span>Der Erzähler beantwortet drei Ja/Nein-Fragen zu den möglichen Folgen einer Handlung.</text:p>
        <text:p text:style-name="P125"><text:span text:style-name="T164">Levitation*</text:span><text:span text:style-name="T55">: </text:span><text:span text:style-name="T167">Aktion &amp; 1 AP. Du kannst im Schritttempo durch die Luft schweben. Hält </text:span><text:span text:style-name="T156">10 Minuten.</text:span></text:p>
        <text:p text:style-name="P132"><text:span text:style-name="T6">Stasis*</text:span><text:span text:style-name="T54">: Aktion &amp; 1 AP. Das Ziel wird in </text:span><text:span text:style-name="T168">Raum und</text:span><text:span text:style-name="T54"> Zeit eingefroren. </text:span><text:span text:style-name="T168">Hält 1 Runde.</text:span></text:p>
        <text:p text:style-name="P127"><text:span text:style-name="T6">Telekinese*</text:span>: <text:span text:style-name="T167">Aktion &amp; 1 AP. Du kannst ein Objekt mit bis zu </text:span><text:span text:style-name="T111">10</text:span><text:span text:style-name="T167">0kg mit Gedankenkraft anheben und im Schritttempo bewegen.</text:span></text:p>
        <text:p text:style-name="P133"/>
        <text:h text:style-name="P110" text:outline-level="3">Gold Talente <text:span text:style-name="T135">(Stufe 7+)</text:span></text:h>
        <text:p text:style-name="P134">Astralprojektion*<text:span text:style-name="T54">: 5 Minuten &amp; 1 AP. Dein Geist verlässt deinen Körper und kann entfernte Orte erkunden.</text:span></text:p>
        <text:p text:style-name="P133"><text:span text:style-name="T6">Äthergestalt*</text:span>: Aktion &amp; 1 AP. <text:span text:style-name="T169">Du bist</text:span> immun gegen Schaden und kannst durch feste Objekte <text:span text:style-name="T169">gehen</text:span>. <text:span text:style-name="T169">Hält 1 Runde.</text:span></text:p>
        <text:p text:style-name="P96"><text:span text:style-name="T170">Nachhall*</text:span><text:span text:style-name="T171">: 5 Minuten, Berührung &amp; 1 AP. </text:span><text:span text:style-name="T169">Du siehst was in den letzten 24 Stunden an diesem Ort passiert ist.</text:span></text:p>
        <text:p text:style-name="P135"><text:span text:style-name="T6">Teleport*</text:span>: <text:span text:style-name="T172">Aktion &amp; 1 AP. </text:span><text:span text:style-name="T173">Versetz</text:span><text:span text:style-name="T172"> dich an einen anderen Ort. SG hängt vom Zielort ab (Sichtkontakt &lt; kürzlich besucht &lt; vor langer Zeit besucht).</text:span></text:p>
        <text:p text:style-name="P85"/>
        <text:h text:style-name="P136" text:outline-level="2">Naturmagie</text:h>
        <text:p text:style-name="P101"><text:span text:style-name="T121">Schlagwörter</text:span><text:span text:style-name="T122">: </text:span>Pflanzen, Tiere, Verwandlung</text:p>
        <text:p text:style-name="P103"><text:span text:style-name="T6">Sonderregel, Zauber*</text:span>: Eine magische Fähigkeit. Sofern nicht anders angegeben, musst du das Ziel sehen können. Nicht-passive Zauber erfordern eine erfolgreiche Zauberprobe.</text:p>
        <text:p text:style-name="P101"/>
        <text:h text:style-name="P104" text:outline-level="3">Bronze Talente</text:h>
        <text:p text:style-name="P103"><text:span text:style-name="T68">Tierfreund</text:span><text:span text:style-name="T174">*</text:span>: Passiv. <text:span text:style-name="T122">Gewöhnliche T</text:span>iere sind dir<text:span text:style-name="T175"> </text:span>freundlich gesonnen und du kannst dich mit ihnen unterhalten.</text:p>
        <text:p text:style-name="P103"><text:span text:style-name="T6">Tricks</text:span><text:span text:style-name="T174">*</text:span>: Passiv. Du kannst kleine magische Effekte erzeugen, <text:span text:style-name="T143">z.B.</text:span> eine Pflanze erblühen lassen, ein kleines Tier herbeirufen oder deine Haarfarbe verändern.</text:p>
        <text:p text:style-name="P103"><text:span text:style-name="T176">Verschmelzen*</text:span><text:span text:style-name="T177">: Aktion &amp; 1 AP. Du verschmilzt mit 1m² Stück Erde oder Holz um sicher zu rasten. Hält solange du willst.</text:span></text:p>
        <text:p text:style-name="P103"/>
        <text:h text:style-name="P104" text:outline-level="3">Silber Talente <text:span text:style-name="T64">(Stufe 4+)</text:span></text:h>
        <text:p text:style-name="P137"><text:span text:style-name="T178">Ranken</text:span>*<text:span text:style-name="T54">: Aktion &amp; 1 AP. Ein Bereich von </text:span><text:span text:style-name="T177">bis zu 1</text:span><text:span text:style-name="T179">0</text:span><text:span text:style-name="T54"> Metern wird zu schwierigem Gelände</text:span><text:span text:style-name="T177">.</text:span></text:p>
        <text:p text:style-name="P138"><text:span text:style-name="T121">Gestaltwandel</text:span><text:span text:style-name="T6"> I*</text:span><text:span text:style-name="T54">: Aktion &amp; 1 AP. Du verwandelst dich in ein Tier</text:span><text:span text:style-name="T180"> </text:span><text:span text:style-name="T54">(min. Maus / max. Luchs). </text:span><text:span text:style-name="T179">Hält 1 Stunde.</text:span></text:p>
        <text:p text:style-name="P137"><text:span text:style-name="T181">Mutation</text:span>*<text:span text:style-name="T54">: Aktion, Berührung &amp; 1 AP. Zielperson erhält für eine Stunde eine Tierfähigkeit (z.B. Fischkiemen, Katzenaugen, oder Adlerklauen). </text:span><text:span text:style-name="T177">Hält 1 Stunde.</text:span></text:p>
        <text:p text:style-name="P139"><text:span text:style-name="T6">Tierkontrolle*</text:span>: Erfordert <text:span text:style-name="T69">Tierfreund</text:span>. Aktion &amp; 1 AP. <text:span text:style-name="T182">Du gibst einen Befehl den umstehende Tiere befolgen müssen.</text:span></text:p>
        <text:p text:style-name="P140"><text:span text:style-name="T121">Wachstum</text:span><text:span text:style-name="T6">*</text:span>: Aktion &amp; 1 AP. <text:span text:style-name="T118">Pflanzen </text:span><text:span text:style-name="T134">in 25m Umkreis </text:span><text:span text:style-name="T118">wachsen nach deinen Wünschen </text:span><text:span text:style-name="T122">(in Schrittgeschwindigkeit)</text:span><text:span text:style-name="T118">. Hält solange du dich konzentrierst.</text:span></text:p>
        <text:p text:style-name="P140"/>
        <text:h text:style-name="P104" text:outline-level="3">Gold Talente <text:span text:style-name="T64">(Stufe </text:span><text:span text:style-name="T115">7</text:span><text:span text:style-name="T64">+)</text:span></text:h>
        <text:p text:style-name="P139"><text:span text:style-name="T6">Fluch*</text:span>: Aktion &amp; 1 AP. Die Natur straft das Ziel für die nächsten Tage auf passende Weise (z.B. verdorbene Ernten, aggressives Wild <text:span text:style-name="T122">oder </text:span>schlechtes Wetter).</text:p>
        <text:p text:style-name="P139"><text:span text:style-name="T6">Gestaltwandel II*</text:span>: <text:span text:style-name="T122">Erfordert </text:span>Gestaltwandel <text:span text:style-name="T122">I. </text:span>Aktion &amp; 1 AP. Du verwandelst dich in ein Tier<text:span text:style-name="T122"> (</text:span>min. Fliege / max. Bär<text:span text:style-name="T122">). </text:span><text:span text:style-name="T181">Hält solange du willst.</text:span></text:p>
        <text:p text:style-name="P139"><text:span text:style-name="T6">Nebelgestalt*</text:span>: Aktion &amp; 1 AP. Du verwandelst dich in Nebel. <text:span text:style-name="T181">Hält solange du willst.</text:span></text:p>
        <text:p text:style-name="P141"><text:span text:style-name="T6">Schwarmgestalt*</text:span>: Erfordert Gestaltwandel I. Aktion &amp; 1 AP. Du verwandelst dich in einen Schwarm (z.B. Bienen, Fledermäuse oder Ratten). Hält solange du willst.</text:p>
        <text:p text:style-name="P139"><text:span text:style-name="T6">Wettermacht</text:span><text:span text:style-name="T183">*</text:span>: ca. 30 Minuten <text:span text:style-name="T184">&amp; 1 AP</text:span>. Das Wetter verändert sich nach deinen Wünschen, solange die Veränderung in der Region grundsätzlich möglich ist.</text:p>
        <text:h text:style-name="P142" text:outline-level="2">Weiße Magie</text:h>
        <text:p text:style-name="P143"><text:span text:style-name="T121">Schlagwörter</text:span><text:span text:style-name="T122">: </text:span>Bannen, Heilung<text:span text:style-name="T185">, </text:span><text:span text:style-name="T168">Licht</text:span></text:p>
        <text:p text:style-name="P125"><text:span text:style-name="T6">Sonderregel, Zauber*</text:span>: Eine magische Fähigkeit. Sofern nicht anders angegeben, musst du das Ziel sehen können. Nicht-passive Zauber erfordern eine erfolgreiche Zauberprobe.</text:p>
        <text:p text:style-name="P125"/>
        <text:h text:style-name="P91" text:outline-level="3">Bronze Talente</text:h>
        <text:p text:style-name="P144"><text:span text:style-name="T6">Ehrfurcht</text:span><text:span text:style-name="T166">*</text:span><text:span text:style-name="T54">: Aktion &amp; 1 AP. Feinde müssen eine Runde vor dir zurückweichen.</text:span></text:p>
        <text:p text:style-name="P145"><text:span text:style-name="T127">Heilung</text:span><text:span text:style-name="T132">*</text:span><text:span text:style-name="T54">: Aktion &amp; 1 AP. Das Ziel erholt sich von 1 Schaden, einfachen Krankheiten und simplen Giften.</text:span></text:p>
        <text:p text:style-name="P146"><text:span text:style-name="T6">Licht*</text:span>: Aktion, Berührung &amp; 1 AP. Ein Gegenstand leuchtet für eine Stunde wie eine Fackel.</text:p>
        <text:p text:style-name="P147"><text:span text:style-name="T6">Reinigen*</text:span>: <text:span text:style-name="T158">Aktion &amp; 1 AP. Du entfernst Gifte, Schadstoffe und Verunreinigungen aus einem Objekt oder einem Bereich von 3 m Radius.</text:span></text:p>
        <text:p text:style-name="P148"><text:span text:style-name="T186">Segen</text:span><text:span text:style-name="T6"> </text:span><text:span text:style-name="T144">I</text:span><text:span text:style-name="T187">*</text:span>: Aktion &amp; 1 AP. Ein Verbündeter erhält einen Vorteil auf seine nächste Probe.</text:p>
        <text:p text:style-name="P149"><text:span text:style-name="T6">Tricks*</text:span>: Passiv. Du kannst kleine magische Effekte erzeugen, z.B. <text:span text:style-name="T158">Schmerzen lindern, eine kleine Schnitt heilen oder leuchtende Funken über der Hand schweben lassen.</text:span></text:p>
        <text:p text:style-name="P149"/>
        <text:h text:style-name="P130" text:outline-level="3">Silber Talente <text:span text:style-name="T64">(Stufe 4+)</text:span></text:h>
        <text:p text:style-name="P150"><text:span text:style-name="T188">Bannen*</text:span><text:span text:style-name="T185">: </text:span><text:span text:style-name="T189">Aktion</text:span><text:span text:style-name="T190"> &amp; 1 AP. </text:span><text:span text:style-name="T185">Beendet simple Zauber </text:span><text:span text:style-name="T165">oder </text:span><text:span text:style-name="T185">unterdrückt mächtige Zauber für 15 Minuten.</text:span></text:p>
        <text:p text:style-name="P96"><text:span text:style-name="T191">Schutzkreis</text:span><text:span text:style-name="T159">*</text:span><text:span text:style-name="T192">: 5 Minuten &amp; 1 AP. Du erzeugst ein Gebiet von 3 m Durchmesser, das von bösen Kreaturen nicht betreten werden kann. Der Effekt hält an, solange der Kreis nicht unterbrochen wird.</text:span></text:p>
        <text:p text:style-name="P151"><text:span text:style-name="T186">Segen</text:span><text:span text:style-name="T140"> </text:span><text:span text:style-name="T6">II</text:span><text:span text:style-name="T187">*</text:span>: <text:span text:style-name="T88">Erfordert </text:span><text:span text:style-name="T193">Segen</text:span> I<text:span text:style-name="T88">. </text:span>Aktion &amp; 1 AP. <text:span text:style-name="T85">Alle Verbündeten in der Nähe </text:span>erhalten einen Vorteil auf ihre nächste Probe.</text:p>
        <text:p text:style-name="P152"><text:span text:style-name="T6">Schild*</text:span>: Aktion &amp; 1 AP. Du erzeugst eine schützende Blase mit 3 m Radius um dich herum. Zauber und andere magische Effekte können die Blase nicht durchdringen. Hält 10 Minuten.</text:p>
        <text:p text:style-name="P151"/>
        <text:h text:style-name="P91" text:outline-level="3">Gold Talente <text:span text:style-name="T135">(Stufe 7+)</text:span></text:h>
        <text:p text:style-name="P96"><text:span text:style-name="T191">Auferstehung</text:span><text:span text:style-name="T159">*</text:span><text:span text:style-name="T193">: </text:span>10 Minuten &amp; 2 AP. <text:span text:style-name="T162">Erfordert einen großteils kompletten Körper. </text:span>Eine Person, <text:span text:style-name="T193">die vor wenigen Stunden gestorben ist, </text:span>kehrt mit 1 LP ins Leben zurück.</text:p>
        <text:p text:style-name="P74"><text:span text:style-name="T194">Eid</text:span><text:span text:style-name="T195">*</text:span><text:span text:style-name="T193">: </text:span>Reaktion &amp; 1 AP. <text:span text:style-name="T193">Du nimmst einer Person ein freiwilliges Versprechen ab. Bricht sie ihren Eid, erfährst du dies sofort und die Person erhält ein deutlich sichtbares Schandmal.</text:span></text:p>
        <text:p text:style-name="P153"><text:span text:style-name="T127">Meditation</text:span><text:span text:style-name="T6">*</text:span>: 10 Minuten &amp; 1 AP. Der Erzähler beantwortet drei beliebige Ja/Nein-Fragen wahrheitsgemäß.</text:p>
        <text:p text:style-name="P153"><text:span text:style-name="T6">Weihe*</text:span>: <text:span text:style-name="T196">1 Stunde</text:span>, Berührung &amp; 1 AP. Ein Ort wird dauerhaft geweiht. Böse Kreaturen können den geweihten Ort nicht betreten und Schwarze Magie kann dort nicht gewirkt werden.</text:p>
        <text:p text:style-name="P154"/>
        <text:h text:style-name="P69" text:outline-level="2">Schwarze Magie</text:h>
        <text:p text:style-name="P85">Dämonen, Nekromantie</text:p>
        <text:p text:style-name="P85"/>
        <text:h text:style-name="P155" text:outline-level="1">Kapitel <text:span text:style-name="T197">xx: </text:span><text:span text:style-name="T198">Ausrüstung</text:span></text:h>
        <text:section text:style-name="Sect3" text:name="Section4">
          <text:h text:style-name="P156" text:outline-level="2">Grundregeln</text:h>
          <text:p text:style-name="P157">Jeder Held verfügt über 10 Slots für Ausrüstung. Einen Gegenstand anzulegen, wegzustecken oder gegen einen anderen auszutauschen kostet eine Aktion.</text:p>
          <text:p text:style-name="P157"/>
          <text:h text:style-name="P158" text:outline-level="2">Vorräte</text:h>
          <text:p text:style-name="P159">Vorräte stehen für alle möglichen Kleinigkeiten, die ein Abenteurer dabeihaben könnte, etwa Proviant, Fackeln oder Seile.</text:p>
          <text:p text:style-name="P160">Eine Portion Vorräte kostet <text:span text:style-name="T6">1 Silber</text:span><text:span text:style-name="T54"> </text:span><text:span text:style-name="T199">und du kannst </text:span><text:span text:style-name="T200">3 Vorräte pro Slot</text:span><text:span text:style-name="T199"> transportieren.</text:span></text:p>
          <text:p text:style-name="P159">Du kannst jederzeit eine Portion Vorräte verbrauchen, um einen <text:span text:style-name="T201">alltäglichen Gegenstand aus dem Rucksack zu ziehen. </text:span>Dieser Gegenstand wird <text:span text:style-name="T201">aber durch die Nutzung verbraucht oder geht danach verloren.</text:span></text:p>
          <text:p text:style-name="P161"/>
          <text:h text:style-name="Heading_20_3" text:outline-level="3">Haltbare Ausrüstung</text:h>
          <text:p text:style-name="P160">Haltbare Gegenstände wie Dietriche, Zelte oder Brechstangen können gezielt gekauft werden. Ein solcher Gegenstand kostet 5 Silber, belegt einen Slot und wird durch die Benutzung nicht verbraucht.</text:p>
          <text:p text:style-name="P160"/>
          <text:h text:style-name="Heading_20_2" text:outline-level="2">Bewaffnung</text:h>
          <text:p text:style-name="P162">Bewaffnung umfasst die wichtigsten Ausrüstungsgegenstände eines Abenteurers: Waffen, Schilde, Rüstungen und Foki.</text:p>
          <text:p text:style-name="P162">Sie verleihen einen Bonus auf eine Fertigkeit (z. B. Kampf, Zähigkeit oder Zauberei) und besitzen oft einige Besonderheiten, die beim Einsatz beachtet werden müssen.</text:p>
          <text:p text:style-name="P162">Weiter unten findest du einige Beispiele.</text:p>
          <text:h text:style-name="P163" text:outline-level="2">Handwerk</text:h>
          <text:p text:style-name="P164">Einen Gegenstand herstellen erfordert eine Probe auf das passende Handwerk und die dazu Materialien im halben Wert des Gegenstands.</text:p>
          <text:p text:style-name="P164"/>
          <text:h text:style-name="Heading_20_3" text:outline-level="3">Extras</text:h>
          <text:p text:style-name="P164">Erfahrene Handwerker können Gegenstände mit Extras aufrüsten.</text:p>
          <text:p text:style-name="P164">Dies erfordert eine passende Spezialisierung und 200 ST pro Extra (1stes = 200 ST, 2tes = 400 ST, etc.)</text:p>
          <text:p text:style-name="P164">Außerdem wird die Handwerksprobe pro Extra um 3 erschwert (1stes = -3, 2tes Extra = -6, etc.)</text:p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p text:style-name="P165"/>
          <text:h text:style-name="Heading_20_2" text:outline-level="2"><text:soft-page-break/><text:span text:style-name="T202">Optional: </text:span>Handwerk</text:h>
          <text:p text:style-name="P165">Um einen Gegenstand herzustellen, benötigst du Materialien im halben Wert des Gegenstands und musst eine Probe auf das entsprechende Handwerk ablegen.</text:p>
          <text:p text:style-name="P165"/>
          <text:h text:style-name="Heading_20_3" text:outline-level="3">Extras</text:h>
          <text:p text:style-name="P165">Erfahrene Handwerker können Gegenstände mit Extras aufwerten.</text:p>
          <text:p text:style-name="P165">Dies erfordert eine passende Spezialisierung. Jedes Extra kostet 200 ST und erhöht sowohl die Kosten als auch die Schwierigkeit weiterer Extras.</text:p>
          <text:p text:style-name="P166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167">Extra</text:p>
              </table:table-cell>
              <table:table-cell table:style-name="Table4.A1" office:value-type="string">
                <text:p text:style-name="P167">Kosten</text:p>
              </table:table-cell>
              <table:table-cell table:style-name="Table4.A1" office:value-type="string">
                <text:p text:style-name="P167">Schwierigkeit</text:p>
              </table:table-cell>
            </table:table-row>
            <table:table-row>
              <table:table-cell table:style-name="Table4.A2" office:value-type="string">
                <text:p text:style-name="P168">1</text:p>
              </table:table-cell>
              <table:table-cell table:style-name="Table4.B2" office:value-type="string">
                <text:p text:style-name="P168">200 ST</text:p>
              </table:table-cell>
              <table:table-cell table:style-name="Table4.C2" office:value-type="string">
                <text:p text:style-name="P168">-3</text:p>
              </table:table-cell>
            </table:table-row>
            <table:table-row>
              <table:table-cell table:style-name="Table4.A2" office:value-type="string">
                <text:p text:style-name="P168">2</text:p>
              </table:table-cell>
              <table:table-cell table:style-name="Table4.B3" office:value-type="string">
                <text:p text:style-name="P168">400 ST</text:p>
              </table:table-cell>
              <table:table-cell table:style-name="Table4.C3" office:value-type="string">
                <text:p text:style-name="P168">-6</text:p>
              </table:table-cell>
            </table:table-row>
            <table:table-row>
              <table:table-cell table:style-name="Table4.A4" office:value-type="string">
                <text:p text:style-name="P168">3</text:p>
              </table:table-cell>
              <table:table-cell table:style-name="Table4.B4" office:value-type="string">
                <text:p text:style-name="P168">800 ST</text:p>
              </table:table-cell>
              <table:table-cell table:style-name="Table4.C4" office:value-type="string">
                <text:p text:style-name="P168">-9</text:p>
              </table:table-cell>
            </table:table-row>
          </table:table>
          <text:p text:style-name="P169"/>
          <text:p text:style-name="P169"/>
          <text:p text:style-name="P169"/>
          <text:p text:style-name="P169"/>
          <text:p text:style-name="P169"/>
          <text:p text:style-name="P169"/>
          <text:p text:style-name="P169"/>
          <text:h text:style-name="Heading_20_3" text:outline-level="3">Extras Liste</text:h>
          <text:list text:style-name="L5">
            <text:list-item>
              <text:p text:style-name="P170"><text:span text:style-name="T6">Apport</text:span>: Gegenstand belegt keinen Slot und erscheint auf Kommando in der Hand des <text:span text:style-name="T203">Eigentümers</text:span>.</text:p>
            </text:list-item>
            <text:list-item>
              <text:p text:style-name="P170"><text:span text:style-name="T6">Bonus (+1 bis +3)</text:span>: Der Gegenstand verleiht einen Bonus von +1 bis +3 auf eine <text:span text:style-name="T203">passende Proben.</text:span></text:p>
            </text:list-item>
            <text:list-item>
              <text:p text:style-name="P170"><text:span text:style-name="T6">Glücksbringer</text:span>: Der Träger kann einmalig eine Probe wiederholen <text:span text:style-name="T204">(zerbricht danach).</text:span></text:p>
            </text:list-item>
            <text:list-item>
              <text:p text:style-name="P170"><text:span text:style-name="T6">Heilend</text:span>: Gegenstand kann <text:span text:style-name="T203">bis zu 15 LP speichern.</text:span></text:p>
            </text:list-item>
            <text:list-item>
              <text:p text:style-name="P171"><text:span text:style-name="T6">Lebensretter</text:span>: Der Gegenstand verhindert dass sein Träger auf 0 LP sinkt <text:s/><text:span text:style-name="T204">(zerbricht danach).</text:span></text:p>
            </text:list-item>
            <text:list-item>
              <text:p text:style-name="P170"><text:span text:style-name="T6">Lumen</text:span>: Der Gegenstand leuchtet auf Kommando wie eine Fackel.</text:p>
            </text:list-item>
            <text:list-item>
              <text:p text:style-name="P170"><text:span text:style-name="T6">Luxuriös</text:span>: Der Gegenstand ist reich verziert und wertvoll.</text:p>
            </text:list-item>
            <text:list-item>
              <text:p text:style-name="P170"><text:span text:style-name="T6">Magiespeicher</text:span>: Der Gegenstand kann bis zu <text:span text:style-name="T203">10</text:span> AP speichern.</text:p>
            </text:list-item>
            <text:list-item>
              <text:p text:style-name="P170"><text:span text:style-name="T6">Selbstreinigend</text:span>: Schmutz, Rost und Blut verschwinden von selbst.</text:p>
            </text:list-item>
            <text:list-item>
              <text:p text:style-name="P170"><text:span text:style-name="T6">Treu</text:span>: Niemand außer dem Besitzer kann den Gegenstand verwenden.</text:p>
            </text:list-item>
            <text:list-item>
              <text:p text:style-name="P170"><text:span text:style-name="T6">Unscheinbar</text:span>: Der Gegenstand ist leicht zu verbergen und schwer wiederzuerkennen.</text:p>
            </text:list-item>
            <text:list-item>
              <text:p text:style-name="P170"><text:span text:style-name="T6">Unzerbrechlich</text:span>: Der Gegenstand kann durch gewöhnliche Mittel nicht beschädigt werden.</text:p>
            </text:list-item>
          </text:list>
          <text:p text:style-name="P162"/>
        </text:section>
        <text:h text:style-name="P172" text:outline-level="3">Rüstung <text:span text:style-name="T9">(Bonus auf Zähigkeit)</text:span>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ext:p text:style-name="P173">Name</text:p>
            </table:table-cell>
            <table:table-cell table:style-name="Table7.A1" office:value-type="string">
              <text:p text:style-name="P174">Preis</text:p>
            </table:table-cell>
            <table:table-cell table:style-name="Table7.A1" office:value-type="string">
              <text:p text:style-name="P175">RK</text:p>
            </table:table-cell>
            <table:table-cell table:style-name="Table7.A1" office:value-type="string">
              <text:p text:style-name="P176">Besonderheiten</text:p>
            </table:table-cell>
          </table:table-row>
          <table:table-row>
            <table:table-cell table:style-name="Table7.A2" office:value-type="string">
              <text:p text:style-name="P177">Leichte Rüstung</text:p>
              <text:p text:style-name="P178">z.B. Leder</text:p>
            </table:table-cell>
            <table:table-cell table:style-name="Table7.B2" office:value-type="string">
              <text:p text:style-name="P179">100</text:p>
            </table:table-cell>
            <table:table-cell table:style-name="Table7.C2" office:value-type="string">
              <text:p text:style-name="P180">1</text:p>
            </table:table-cell>
            <table:table-cell table:style-name="Table7.D2" office:value-type="string">
              <text:p text:style-name="P181"><text:span text:style-name="T205">Nachteil auf Schwimmen</text:span></text:p>
            </table:table-cell>
          </table:table-row>
          <table:table-row>
            <table:table-cell table:style-name="Table7.A2" office:value-type="string">
              <text:p text:style-name="P182">Mittlere Rüstung</text:p>
              <text:p text:style-name="P178">z.B. Kette</text:p>
            </table:table-cell>
            <table:table-cell table:style-name="Table7.B3" office:value-type="string">
              <text:p text:style-name="P183">200</text:p>
            </table:table-cell>
            <table:table-cell table:style-name="Table7.C3" office:value-type="string">
              <text:p text:style-name="P183">2</text:p>
            </table:table-cell>
            <table:table-cell table:style-name="Table7.D3" office:value-type="string">
              <text:p text:style-name="P181"><text:span text:style-name="T205">Nachteil auf Schwimmen, </text:span>2 Slots</text:p>
            </table:table-cell>
          </table:table-row>
          <table:table-row>
            <table:table-cell table:style-name="Table7.A2" office:value-type="string">
              <text:p text:style-name="P177">Schwere Rüstung</text:p>
              <text:p text:style-name="P178">z.B. Platte</text:p>
            </table:table-cell>
            <table:table-cell table:style-name="Table7.B3" office:value-type="string">
              <text:p text:style-name="P180">300</text:p>
            </table:table-cell>
            <table:table-cell table:style-name="Table7.C3" office:value-type="string">
              <text:p text:style-name="P183">3</text:p>
            </table:table-cell>
            <table:table-cell table:style-name="Table7.D3" office:value-type="string">
              <text:p text:style-name="P177"><text:span text:style-name="T206">Nachteil auf </text:span>Schleichen, <text:span text:style-name="T206">Schwimmen unmöglich, </text:span>2 Slots</text:p>
            </table:table-cell>
          </table:table-row>
          <table:table-row>
            <table:table-cell table:style-name="Table7.A5" office:value-type="string">
              <text:p text:style-name="P177">Schild</text:p>
            </table:table-cell>
            <table:table-cell table:style-name="Table7.B5" office:value-type="string">
              <text:p text:style-name="P180">50</text:p>
            </table:table-cell>
            <table:table-cell table:style-name="Table7.C5" office:value-type="string">
              <text:p text:style-name="P184">1</text:p>
            </table:table-cell>
            <table:table-cell table:style-name="Table7.D5" office:value-type="string">
              <text:p text:style-name="P185"/>
            </table:table-cell>
          </table:table-row>
        </table:table>
        <text:p text:style-name="P186"/>
        <text:h text:style-name="Heading_20_3" text:outline-level="3">Einfache Waffen <text:span text:style-name="T9">(Bonus auf Kämpfen)</text:span>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>
            <table:table-cell table:style-name="Table6.A1" office:value-type="string">
              <text:p text:style-name="P173">Name</text:p>
            </table:table-cell>
            <table:table-cell table:style-name="Table6.A1" office:value-type="string">
              <text:p text:style-name="P174">Preis</text:p>
            </table:table-cell>
            <table:table-cell table:style-name="Table6.A1" office:value-type="string">
              <text:p text:style-name="P187">BO</text:p>
            </table:table-cell>
            <table:table-cell table:style-name="Table6.A1" office:value-type="string">
              <text:p text:style-name="P176">Besonderheiten</text:p>
            </table:table-cell>
          </table:table-row>
          <table:table-row>
            <table:table-cell table:style-name="Table6.A2" office:value-type="string">
              <text:p text:style-name="P182">Einfache Waffe</text:p>
              <text:p text:style-name="P182">z.B. Dolch, Keule, Schleuder</text:p>
            </table:table-cell>
            <table:table-cell table:style-name="Table6.B2" office:value-type="string">
              <text:p text:style-name="P183">5</text:p>
            </table:table-cell>
            <table:table-cell table:style-name="Table6.C2" office:value-type="string">
              <text:p text:style-name="P179">1</text:p>
            </table:table-cell>
            <table:table-cell table:style-name="Table6.D2" office:value-type="string">
              <text:p text:style-name="P182">Unauffällig</text:p>
            </table:table-cell>
          </table:table-row>
          <table:table-row>
            <table:table-cell table:style-name="Table6.A2" office:value-type="string">
              <text:p text:style-name="P182">Schwere Einfache Waffe</text:p>
              <text:p text:style-name="P182">z.B. Speer, Jagdbogen</text:p>
            </table:table-cell>
            <table:table-cell table:style-name="Table6.B3" office:value-type="string">
              <text:p text:style-name="P183">15</text:p>
            </table:table-cell>
            <table:table-cell table:style-name="Table6.C3" office:value-type="string">
              <text:p text:style-name="P179">2</text:p>
            </table:table-cell>
            <table:table-cell table:style-name="Table6.D3" office:value-type="string">
              <text:p text:style-name="P188">Zweihändig, 2 Slots</text:p>
            </table:table-cell>
          </table:table-row>
          <table:table-row>
            <table:table-cell table:style-name="Table6.A2" office:value-type="string">
              <text:p text:style-name="P182">Kriegswaffe</text:p>
              <text:p text:style-name="P182">z.B. Streitkolben, Schwert</text:p>
            </table:table-cell>
            <table:table-cell table:style-name="Table6.B4" office:value-type="string">
              <text:p text:style-name="P183">50</text:p>
            </table:table-cell>
            <table:table-cell table:style-name="Table6.C4" office:value-type="string">
              <text:p text:style-name="P179">2</text:p>
            </table:table-cell>
            <table:table-cell table:style-name="Table6.D4" office:value-type="string">
              <text:p text:style-name="P189"/>
            </table:table-cell>
          </table:table-row>
          <table:table-row>
            <table:table-cell table:style-name="Table6.A5" office:value-type="string">
              <text:p text:style-name="P182">Schwere Kriegswaffe</text:p>
              <text:p text:style-name="P178">z.B. Armbrust,<text:span text:style-name="T203"> Kriegshammer</text:span></text:p>
            </table:table-cell>
            <table:table-cell table:style-name="Table6.B5" office:value-type="string">
              <text:p text:style-name="P183">150</text:p>
            </table:table-cell>
            <table:table-cell table:style-name="Table6.C5" office:value-type="string">
              <text:p text:style-name="P179">3</text:p>
            </table:table-cell>
            <table:table-cell table:style-name="Table6.D5" office:value-type="string">
              <text:p text:style-name="P188">Zweihändig, 2 Slots</text:p>
            </table:table-cell>
          </table:table-row>
        </table:table>
        <text:p text:style-name="P186"/>
        <text:h text:style-name="Heading_20_3" text:outline-level="3">Fokus (Bonus <text:span text:style-name="T207">auf </text:span>Zauberei)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90">Name</text:p>
            </table:table-cell>
            <table:table-cell table:style-name="Table1.A1" office:value-type="string">
              <text:p text:style-name="P191">Preis</text:p>
            </table:table-cell>
            <table:table-cell table:style-name="Table1.A1" office:value-type="string">
              <text:p text:style-name="P192">BO</text:p>
            </table:table-cell>
            <table:table-cell table:style-name="Table1.A1" office:value-type="string">
              <text:p text:style-name="P176">Besonderheiten</text:p>
            </table:table-cell>
          </table:table-row>
          <table:table-row>
            <table:table-cell table:style-name="Table1.A2" office:value-type="string">
              <text:p text:style-name="P193">Ritualdolch</text:p>
            </table:table-cell>
            <table:table-cell table:style-name="Table1.B2" office:value-type="string">
              <text:p text:style-name="P194">80</text:p>
            </table:table-cell>
            <table:table-cell table:style-name="Table1.C2" office:value-type="string">
              <text:p text:style-name="P184">1</text:p>
            </table:table-cell>
            <table:table-cell table:style-name="Table1.D2" office:value-type="string">
              <text:p text:style-name="P195"/>
            </table:table-cell>
          </table:table-row>
          <table:table-row>
            <table:table-cell table:style-name="Table1.A2" office:value-type="string">
              <text:p text:style-name="P193">Zepter</text:p>
            </table:table-cell>
            <table:table-cell table:style-name="Table1.B2" office:value-type="string">
              <text:p text:style-name="P194">120</text:p>
            </table:table-cell>
            <table:table-cell table:style-name="Table1.C2" office:value-type="string">
              <text:p text:style-name="P184">2</text:p>
            </table:table-cell>
            <table:table-cell table:style-name="Table1.D2" office:value-type="string">
              <text:p text:style-name="P195"/>
            </table:table-cell>
          </table:table-row>
          <table:table-row>
            <table:table-cell table:style-name="Table1.A4" office:value-type="string">
              <text:p text:style-name="P193">Zauberstab</text:p>
            </table:table-cell>
            <table:table-cell table:style-name="Table1.B4" office:value-type="string">
              <text:p text:style-name="P194">250</text:p>
            </table:table-cell>
            <table:table-cell table:style-name="Table1.C4" office:value-type="string">
              <text:p text:style-name="P184">3</text:p>
            </table:table-cell>
            <table:table-cell table:style-name="Table1.D4" office:value-type="string">
              <text:p text:style-name="P196">Zweihändig, 2 Slots</text:p>
            </table:table-cell>
          </table:table-row>
        </table:table>
        <text:p text:style-name="P197"/>
        <text:h text:style-name="P198" text:outline-level="1">Kapitel <text:span text:style-name="T14">x</text:span><text:span text:style-name="T208">x: </text:span><text:span text:style-name="T209">Vorteile</text:span></text:h>
        <text:p text:style-name="P199">Vorteile verkörpern besondere Personen, Beziehungen <text:span text:style-name="T210">oder </text:span>Ressourcen, auf die dein Charakter zurückgreifen kann.</text:p>
        <text:p text:style-name="P200"/>
        <text:section text:style-name="Sect2" text:name="Section3">
          <text:h text:style-name="P201" text:outline-level="2">Flexibilität</text:h>
          <text:p text:style-name="P200">Vorteile sind dynamisch und können sich im Laufe des Spiels verändern, verloren gehen oder neu gewonnen werden.</text:p>
          <text:p text:style-name="P200">So kann dein Held beispielsweise den Vorteil Reich erhalten, wenn er einen Schatz hebt.</text:p>
          <text:p text:style-name="P200">Besitzt er bereits fünf Vorteile, muss er dafür einen bestehenden Vorteil aufgeben, <text:span text:style-name="T210">z.B. </text:span>indem er seine Kontakte bei der Polizei vernachlässigt, um sein neues Luxusleben zu genießen.</text:p>
          <text:p text:style-name="P200"/>
          <text:h text:style-name="P201" text:outline-level="2"><text:span text:style-name="T211">Optional: </text:span><text:span text:style-name="T212">Erweiterter</text:span> Vorteil</text:h>
          <text:p text:style-name="P202">Bei Bedarf kannst du einen bestehenden Vorteil um eine besondere Eigenschaft erweitern.</text:p>
          <text:p text:style-name="P202">So könnte dein loyaler Jagdhund (Gefährte) beispielsweise telepathisch mit dir kommunizieren, oder dein Familienschwert teleportiert sich auf Kommando in deine Hand.</text:p>
          <text:p text:style-name="P202">Eine solche Erweiterung belegt allerdings einen eigenen Vorteilsslot.</text:p>
          <text:h text:style-name="P201" text:outline-level="2">Minions</text:h>
          <text:p text:style-name="P202">Minions sind NSCs, die deinem Helden loyal zur Seite stehen. Sie werden vom Erzähler kontrolliert, aber du legst die Proben für sie ab.</text:p>
          <text:p text:style-name="P202">Anstelle von Fertigkeiten besitzen sie ein Level, das deiner höchsten Fertigkeit entspricht.</text:p>
          <text:p text:style-name="P202">Proben, die der Minion besonders gut beherrscht, legt er mit seinem vollen Level ab. Für alle anderen Proben verwendet er sein halbes Level (aufrunden).</text:p>
          <text:p text:style-name="P202">Minions können Werkzeuge benutzen, um den üblichen Bonus von +2 zu erhalten, besitzen jedoch keine Spezialisierungen.</text:p>
          <text:p text:style-name="P202">Schwache Minions sind nicht besonders robust und gehen bereits nach einem Punkt Schaden zu Boden.</text:p>
          <text:p text:style-name="P202"/>
          <text:p text:style-name="P202"/>
          <text:p text:style-name="P202"/>
          <text:p text:style-name="P202"/>
        </text:section>
        <text:p text:style-name="P199"/>
        <text:h text:style-name="P203" text:outline-level="2">Beispiel <text:span text:style-name="T213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Header">Name</text:p>
            </table:table-cell>
            <table:table-cell table:style-name="Table3.A1" office:value-type="string">
              <text:p text:style-name="Table_20_Header">Beschreibung</text:p>
            </table:table-cell>
          </table:table-row>
          <table:table-row>
            <table:table-cell table:style-name="Table3.A2" office:value-type="string">
              <text:p text:style-name="Table_20_Contents">Gefährte</text:p>
            </table:table-cell>
            <table:table-cell table:style-name="Table3.B2" office:value-type="string">
              <text:p text:style-name="Table_20_Contents">Du hast einen kompetenten Minion der dir loyal zur Seite steht (z.B. Jagdhund oder Bodyguard).</text:p>
            </table:table-cell>
          </table:table-row>
          <table:table-row>
            <table:table-cell table:style-name="Table3.A2" office:value-type="string">
              <text:p text:style-name="Table_20_Contents">Fahrzeug</text:p>
            </table:table-cell>
            <table:table-cell table:style-name="Table3.B2" office:value-type="string">
              <text:p text:style-name="Table_20_Contents">Du besitzt ein <text:span text:style-name="T214">eigenes </text:span>Fahrzeug (z.B. <text:span text:style-name="T215">Kutsche, Pferd oder Schiff</text:span>).</text:p>
            </table:table-cell>
          </table:table-row>
          <table:table-row>
            <table:table-cell table:style-name="Table3.A4" office:value-type="string">
              <text:p text:style-name="Table_20_Contents">Kontakte</text:p>
            </table:table-cell>
            <table:table-cell table:style-name="Table3.B4" office:value-type="string">
              <text:p text:style-name="Table_20_Contents">Du hast Kontakte in einer Organisation (z.B. <text:span text:style-name="T215">Adel oder </text:span>Kirche), die dich mit Informationen und kleineren Gefallen unterstützen.</text:p>
            </table:table-cell>
          </table:table-row>
          <table:table-row>
            <table:table-cell table:style-name="Table3.A4" office:value-type="string">
              <text:p text:style-name="Table_20_Contents">Mentor</text:p>
            </table:table-cell>
            <table:table-cell table:style-name="Table3.B4" office:value-type="string">
              <text:p text:style-name="Table_20_Contents">Eine mächtige Person <text:span text:style-name="T214">(z.B. Adliger </text:span><text:span text:style-name="T215">oder Magier</text:span><text:span text:style-name="T214">) </text:span><text:span text:style-name="T216">steht mit Rat und Tat zur Seite.</text:span></text:p>
            </table:table-cell>
          </table:table-row>
          <table:table-row>
            <table:table-cell table:style-name="Table3.A6" office:value-type="string">
              <text:p text:style-name="Table_20_Contents">Personal</text:p>
            </table:table-cell>
            <table:table-cell table:style-name="Table3.B6" office:value-type="string">
              <text:p text:style-name="Table_20_Contents">Du befehligst eine Gruppe <text:span text:style-name="T210">schwacher</text:span> Minions (z.B. <text:span text:style-name="T215">Schläger</text:span>).</text:p>
            </table:table-cell>
          </table:table-row>
          <table:table-row>
            <table:table-cell table:style-name="Table3.A7" office:value-type="string">
              <text:p text:style-name="Table_20_Contents">Ruhm</text:p>
            </table:table-cell>
            <table:table-cell table:style-name="Table3.B7" office:value-type="string">
              <text:p text:style-name="Table_20_Contents">Du bist <text:span text:style-name="T215">berühmt als Abenteurer, Künstler oder dergleichen.</text:span></text:p>
            </table:table-cell>
          </table:table-row>
          <table:table-row>
            <table:table-cell table:style-name="Table3.A8" office:value-type="string">
              <text:p text:style-name="Table_20_Contents">Status</text:p>
            </table:table-cell>
            <table:table-cell table:style-name="Table3.B8" office:value-type="string">
              <text:p text:style-name="Table_20_Contents">Du bist ein angesehenes Mitglied einer wichtigen Organisation (z.B. Adel <text:span text:style-name="T215">oder Kirche</text:span>).</text:p>
            </table:table-cell>
          </table:table-row>
          <table:table-row>
            <table:table-cell table:style-name="Table3.A9" office:value-type="string">
              <text:p text:style-name="Table_20_Contents">Verbündeter</text:p>
            </table:table-cell>
            <table:table-cell table:style-name="Table3.B9" office:value-type="string">
              <text:p text:style-name="Table_20_Contents">Eine mächtige Person oder Organisation steht dir zur Seite.</text:p>
            </table:table-cell>
          </table:table-row>
          <table:table-row>
            <table:table-cell table:style-name="Table3.A10" office:value-type="string">
              <text:p text:style-name="Table_20_Contents">Zuflucht</text:p>
            </table:table-cell>
            <table:table-cell table:style-name="Table3.B10" office:value-type="string">
              <text:p text:style-name="Table_20_Contents">Du hast einen sicheren oder geheimen Rückzugsort <text:s/>(z.B. gesicherte Villa oder geheime Basis).</text:p>
            </table:table-cell>
          </table:table-row>
        </table:table>
        <text:h text:style-name="P45" text:outline-level="1">Kapitel <text:span text:style-name="T217">xx</text:span><text:span text:style-name="T218">: Regeln</text:span></text:h>
        <text:p text:style-name="P204"><text:span text:style-name="T219">Für den</text:span> Großteil des Spiels <text:span text:style-name="T219">erzählt ihr eine Geschichte. Die</text:span> Spieler übernehmen die Rolle <text:span text:style-name="T219">der</text:span> Helden <text:span text:style-name="T219">und</text:span> der Erzähler <text:span text:style-name="T220">übernimmt den Rest der Welt. </text:span>Für bestimmte Situationen gibt es jedoch Regeln, die den Ausgang der Geschichte bestimmen.</text:p>
        <text:p text:style-name="P204"/>
        <text:p text:style-name="P204"><text:span text:style-name="T6">Hinweis</text:span>: <text:span text:style-name="T221">Anderswelt ist ein spielerorientiertes System. </text:span><text:span text:style-name="T222">Das bedeutet, d</text:span><text:span text:style-name="T221">er Erzähler würfelt niemals. </text:span><text:span text:style-name="T222">A</text:span><text:span text:style-name="T221">lle Proben werden von den Spielern abgelegt.</text:span></text:p>
        <text:p text:style-name="P204"/>
        <text:section text:style-name="Sect3" text:name="Section9">
          <text:h text:style-name="P205" text:outline-level="2">Einfache Probe</text:h>
          <text:p text:style-name="P206">Der Spielleiter bestimmt die passende Fertigkeit und die Schwierigkeit der Probe. Würfle anschließend 1W20.</text:p>
          <text:p text:style-name="P206">Ist das Ergebnis kleiner oder gleich deiner Fertigkeit abzüglich der Schwierigkeit, gelingt die Probe.</text:p>
          <text:p text:style-name="P206">Eine natürliche 1 ist ein meisterlicher Erfolg, eine natürliche 20 immer ein Fehlschlag.</text:p>
          <text:p text:style-name="P207"/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208">Malus</text:p>
              </table:table-cell>
              <table:table-cell table:style-name="Table5.A1" office:value-type="string">
                <text:p text:style-name="Table_20_Header">Schwierigkeit</text:p>
              </table:table-cell>
            </table:table-row>
            <table:table-row>
              <table:table-cell table:style-name="Table5.A2" office:value-type="string">
                <text:p text:style-name="P209">-0</text:p>
              </table:table-cell>
              <table:table-cell table:style-name="Table5.B2" office:value-type="string">
                <text:p text:style-name="Table_20_Contents">Simpel</text:p>
              </table:table-cell>
            </table:table-row>
            <table:table-row>
              <table:table-cell table:style-name="Table5.A2" office:value-type="string">
                <text:p text:style-name="P210">-<text:span text:style-name="T223">3</text:span></text:p>
              </table:table-cell>
              <table:table-cell table:style-name="Table5.B3" office:value-type="string">
                <text:p text:style-name="Table_20_Contents">Normal</text:p>
              </table:table-cell>
            </table:table-row>
            <table:table-row>
              <table:table-cell table:style-name="Table5.A4" office:value-type="string">
                <text:p text:style-name="Table_20_Contents">-<text:span text:style-name="T223">6</text:span></text:p>
              </table:table-cell>
              <table:table-cell table:style-name="Table5.B4" office:value-type="string">
                <text:p text:style-name="Table_20_Contents">Schwer</text:p>
              </table:table-cell>
            </table:table-row>
            <table:table-row>
              <table:table-cell table:style-name="Table5.A4" office:value-type="string">
                <text:p text:style-name="P209">-9</text:p>
              </table:table-cell>
              <table:table-cell table:style-name="Table5.B5" office:value-type="string">
                <text:p text:style-name="Table_20_Contents">Sehr Schwer</text:p>
              </table:table-cell>
            </table:table-row>
            <table:table-row>
              <table:table-cell table:style-name="Table5.A6" office:value-type="string">
                <text:p text:style-name="Table_20_Contents">-<text:span text:style-name="T223">12</text:span></text:p>
              </table:table-cell>
              <table:table-cell table:style-name="Table5.B6" office:value-type="string">
                <text:p text:style-name="Table_20_Contents">Extrem</text:p>
              </table:table-cell>
            </table:table-row>
          </table:table>
          <text:p text:style-name="P211"/>
          <text:h text:style-name="Heading_20_3" text:outline-level="3">Vor- und Nachteile</text:h>
          <text:p text:style-name="P212">Talente und Umstände können Vor- und Nachteile verleihen.</text:p>
          <text:list text:style-name="L6">
            <text:list-item>
              <text:p text:style-name="P213">Überwiegen die Vorteile, würfel 2W20 und verwendest das bessere Ergebnis.</text:p>
            </text:list-item>
            <text:list-item>
              <text:p text:style-name="P213">Überwiegen die Nachteile, würfel 2W20 und verwende das schlechtere Ergebnis.</text:p>
            </text:list-item>
            <text:list-item>
              <text:p text:style-name="P213">Gleichen sich Vor- und Nachteile aus, würfle normal.</text:p>
            </text:list-item>
          </text:list>
          <text:h text:style-name="Heading_20_2" text:outline-level="2">Vergleich</text:h>
          <text:p text:style-name="P212">Wenn Spielercharaktere miteinander konkurrieren, wird ein Vergleich durchgeführt.</text:p>
          <text:p text:style-name="P212">Alle Beteiligten legen eine passende Probe ab.</text:p>
          <text:p text:style-name="P212">Besteht nur ein Charakter die Probe, gewinnt er den Vergleich.</text:p>
          <text:p text:style-name="P212">Bestehen mehrere Charaktere die Probe, gewinnt derjenige mit dem höchsten <text:span text:style-name="T6">erfolgreichen</text:span> Würfelergebnis.</text:p>
          <text:p text:style-name="P212">Bei Gleichstand endet der Vergleich unentschieden.</text:p>
          <text:p text:style-name="P212"/>
          <text:h text:style-name="P214" text:outline-level="2">Minions</text:h>
          <text:p text:style-name="P215">Verbündete, beschworene Kreaturen und ähnliche Begleiter werden als Minions bezeichnet.</text:p>
          <text:p text:style-name="P215">Minions werden vom zugehörigen Spieler gesteuert. Für Aufgaben, die sie gut beherrschen, verwenden sie den höchsten Fertigkeitswert ihres Spielers. Für alle anderen Proben besitzen sie einen Fertigkeitswert von 10.</text:p>
          <text:p text:style-name="P215">Minions verfügen über keine Talente oder Spezialisierungen und gehen mit 2 Schaden zu Boden.</text:p>
        </text:section>
      </text:section>
      <text:section text:style-name="Sect1" text:name="Section8">
        <text:p text:style-name="Standard"/>
        <text:h text:style-name="P45" text:outline-level="1">Kapitel <text:span text:style-name="T217">xx</text:span><text:span text:style-name="T224">: Action</text:span></text:h>
        <text:p text:style-name="Standard">Action-Szenen wie Kämpfe, Verfolgungsjagden oder ähnliche Konflikte werden in Runden von jeweils 6 Sekunden abgehandelt. Bei Bedarf kann die <text:span text:style-name="T225">Umgebung die Position der Figuren auch</text:span> mit einer Skizze <text:span text:style-name="T225">verdeutlicht</text:span> werden.</text:p>
        <text:p text:style-name="Standard"/>
        <text:section text:style-name="Sect2" text:name="Section2">
          <text:h text:style-name="Heading_20_2" text:outline-level="2">Reihenfolge</text:h>
          <text:p text:style-name="Standard">Jeder Beteiligte handelt einmal pro Runde. Die Reihenfolge geht im Uhrzeigersinn. Der erste Zug gehört dem Spieler, der die Szene auslöst.</text:p>
          <text:p text:style-name="Standard"/>
          <text:h text:style-name="Heading_20_2" text:outline-level="2">Spielerzug</text:h>
          <text:p text:style-name="P216">In deinem Zug kannst du dich bewegen und eine Aktion ausführen.</text:p>
          <text:p text:style-name="P216">Menschen bewegen sich bis zu 9 Meter, sofern sie nicht durch schwieriges Gelände gebremst werden.</text:p>
          <text:p text:style-name="P216">Typische Aktionen sind:</text:p>
          <text:list text:style-name="L7">
            <text:list-item>
              <text:p text:style-name="P217">Attackieren</text:p>
            </text:list-item>
            <text:list-item>
              <text:p text:style-name="P217">Eine Waffe ziehen oder wechseln</text:p>
            </text:list-item>
            <text:list-item>
              <text:p text:style-name="P218">Gegenstand benutzen</text:p>
            </text:list-item>
            <text:list-item>
              <text:p text:style-name="P217">Sprinten (erneut bewegen)</text:p>
            </text:list-item>
          </text:list>
          <text:p text:style-name="P219">Kleine Handlungen, wie ein paar Worte zu sagen, <text:span text:style-name="T226">gelten als Nebensache und </text:span>erfordern keine Aktion.</text:p>
          <text:p text:style-name="P219"/>
          <text:p text:style-name="P220"><text:span text:style-name="T227">Hinweis, Minions</text:span><text:span text:style-name="T225">: </text:span><text:span text:style-name="T228">Minions</text:span><text:span text:style-name="T225"> handeln direkt nach ih</text:span><text:span text:style-name="T228">rem Spieler</text:span><text:span text:style-name="T225"> und benutzen die selben Regeln um sich zu Bewegen, Attackieren oder zu Verteidigen.</text:span></text:p>
          <text:p text:style-name="P221"/>
          <text:p text:style-name="P221"/>
          <text:p text:style-name="P221"/>
          <text:p text:style-name="P221"/>
          <text:h text:style-name="Heading_20_3" text:outline-level="3">Attacken</text:h>
          <text:p text:style-name="Standard">Um ein Ziel zu attackieren, legst du eine Probe auf Kämpfen ab.</text:p>
          <text:p text:style-name="Standard">Bei Erfolg erleidet das Ziel 1 Schaden (+1 Schaden bei einem meisterlichen Erfolg).</text:p>
          <text:p text:style-name="Standard"/>
          <text:p text:style-name="P222"><text:span text:style-name="T227">Hinweis, Fernkampf</text:span><text:span text:style-name="T225">: </text:span>Im Fernkampf erleidest du Nachteil, wenn das Ziel weit entfernt oder in Deckung ist.</text:p>
          <text:p text:style-name="Standard"/>
          <text:p text:style-name="P222"><text:span text:style-name="T227">Hinweis, Waffenlos</text:span><text:span text:style-name="T225">: </text:span>Im unbewaffneten Nahkampf kannst du statt Schaden anzurichten das Ziel festhalten oder ihm einen Gegenstand entreißen, sofern dies plausibel ist.</text:p>
          <text:p text:style-name="Standard"/>
          <text:h text:style-name="Heading_20_2" text:outline-level="2">Erzählerzug</text:h>
          <text:p text:style-name="Standard">Der Erzähler kontrolliert alle Figuren, die nicht von Spielern gesteuert werden.</text:p>
          <text:p text:style-name="Standard">Greift eine solche Figur einen Helden an, darf dieser eine Probe auf Zähigkeit (Parade) ablegen, um den Angriff abzuwehren.</text:p>
          <text:p text:style-name="Standard">Misslingt die Probe, erleidet das Ziel 1 Schaden.</text:p>
          <text:p text:style-name="Standard"/>
          <text:p text:style-name="P222"><text:span text:style-name="T6">Hinweis, </text:span><text:span text:style-name="T227">Multiparade</text:span>: Die meisten Figuren können <text:span text:style-name="T228">sich nur auf eine Parade pro Runde konzentrieren. </text:span>Jede weitere erleidet <text:span text:style-name="T225">einen</text:span> Nachteil.</text:p>
          <text:p text:style-name="P223"><text:span text:style-name="T229"/></text:p>
        </text:section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Bold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adornments="Regular" style:font-family-generic="roman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left" style:justify-single-word="false" fo:keep-together="always" fo:orphans="2" fo:widows="2" style:writing-mode="lr-tb">
        <style:tab-stops/>
      </style:paragraph-properties>
      <style:text-properties fo:color="#10141f" loext:opacity="100%" style:font-name="Noto Serif" fo:font-family="'Noto Serif'" style:font-style-name="Regular" style:font-family-generic="roman" style:font-pitch="variable" fo:font-size="11pt" fo:font-weight="normal" style:font-size-asian="12pt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parent-style-name="Heading" style:next-style-name="Heading_20_2" loext:linked-style-name="Überschrift_20_1_20_Zchn" style:default-outline-level="1" style:list-style-name="" style:class="chapter" style:master-page-name="">
      <loext:graphic-properties draw:fill="solid" draw:fill-color="#10141f"/>
      <style:paragraph-properties fo:margin-left="0pt" fo:margin-top="0pt" fo:margin-bottom="20.01pt" style:contextual-spacing="false" fo:line-height="100%" fo:text-align="center" style:justify-single-word="false" fo:orphans="2" fo:widows="2" style:register-true="false" fo:text-indent="0pt" style:auto-text-indent="false" style:page-number="auto" fo:background-color="#10141f" fo:padding-left="0pt" fo:padding-right="0pt" fo:padding-top="15pt" fo:padding-bottom="15pt" fo:border="none" text:number-lines="true" text:line-number="0" style:snap-to-layout-grid="false" style:writing-mode="lr-tb" style:join-border="false">
        <style:tab-stops/>
        <style:drop-cap/>
      </style:paragraph-properties>
      <style:text-properties fo:font-variant="small-caps" fo:color="#ffffff" loext:opacity="100%" style:text-outline="false" style:font-name="Bangers" fo:font-family="Bangers" style:font-style-name="Bold" style:font-pitch="variable" fo:font-size="32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lef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fo:color="#10141f" loext:opacity="100%" style:font-name="Bangers" fo:font-family="Bangers" style:font-style-name="Bold" style:font-pitch="variable" fo:font-size="22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loext:graphic-properties draw:fill="none" draw:fill-color="#000000"/>
      <style:paragraph-properties fo:margin-top="0pt" fo:margin-bottom="3pt" style:contextual-spacing="false" fo:line-height="100%" style:page-number="auto" fo:background-color="transparent"/>
      <style:text-properties fo:font-variant="normal" fo:text-transform="none" style:use-window-font-color="true" loext:opacity="0%" style:font-name="Bangers" fo:font-family="Bangers" style:font-style-name="Bold" style:font-pitch="variable" fo:font-size="14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center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TalentHeader" style:family="paragraph" style:parent-style-name="Heading_20_3" style:master-page-name="">
      <loext:graphic-properties draw:fill="solid" draw:fill-color="#10141f"/>
      <style:paragraph-properties fo:margin-left="4.99pt" fo:text-align="left" style:justify-single-word="false" fo:text-indent="0pt" style:auto-text-indent="false" style:page-number="auto" fo:background-color="#10141f" fo:padding-left="4.99pt" fo:padding-right="0pt" fo:padding-top="0.99pt" fo:padding-bottom="0.99pt" fo:border="none"/>
      <style:text-properties fo:color="#ffffff" loext:opacity="100%" style:font-name="Crimson Text" fo:font-family="'Crimson Text'" style:font-style-name="Bold" style:font-pitch="variable" fo:font-size="12pt" fo:font-weight="bold"/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right" style:justify-single-word="false"/>
    </style:style>
    <style:page-layout style:name="Mpm1">
      <style:page-layout-properties fo:page-width="595.3pt" fo:page-height="841.89pt" style:num-format="1" style:print-orientation="portrait" fo:margin-top="45.01pt" fo:margin-bottom="45.01pt" fo:margin-left="45.01pt" fo:margin-right="45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9pt" style:distance-after-sep="2.89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95.3pt" fo:page-height="419.5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><text:page-number text:select-page="current">20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772</meta:editing-cycles>
    <meta:creation-date>2020-04-16T07:43:00</meta:creation-date>
    <dc:date>2026-06-20T17:28:08.068637811</dc:date>
    <meta:generator>LibreOffice/26.2.4.2$Linux_X86_64 LibreOffice_project/0229ac93fcf0d7cbc6376066c6f35021cef002dc</meta:generator>
    <meta:editing-duration>P1DT22H45M24S</meta:editing-duration>
    <meta:print-date>2026-04-02T15:54:51.081337174</meta:print-date>
    <meta:document-statistic meta:table-count="8" meta:image-count="0" meta:object-count="0" meta:page-count="21" meta:paragraph-count="453" meta:word-count="4358" meta:character-count="29216" meta:non-whitespace-character-count="25348"/>
    <meta:template xlink:type="simple" xlink:actuate="onRequest" xlink:title="Normal" xlink:href=""/>
  </office:meta>
</office:document-meta>
</file>