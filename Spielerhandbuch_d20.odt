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Bold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adornments="Regular" style:font-family-generic="roman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automatic-styles>
    <style:style style:name="Table2" style:family="table">
      <style:table-properties style:width="505.3pt" fo:margin-top="0pt" fo:margin-bottom="0pt" table:align="margins" style:writing-mode="lr-tb"/>
    </style:style>
    <style:style style:name="Table2.A" style:family="table-column">
      <style:table-column-properties style:column-width="505.3pt" style:rel-column-width="65535*"/>
    </style:style>
    <style:style style:name="Table2.A1" style:family="table-cell">
      <style:table-cell-properties fo:background-color="#f2f2f2" fo:padding-left="15pt" fo:padding-right="15pt" fo:padding-top="22.5pt" fo:padding-bottom="15pt" fo:border="none">
        <style:background-image/>
      </style:table-cell-properties>
    </style:style>
    <style:style style:name="Table8" style:family="table">
      <style:table-properties style:width="505.3pt" table:align="margins" style:writing-mode="lr-tb"/>
    </style:style>
    <style:style style:name="Table8.A" style:family="table-column">
      <style:table-column-properties style:column-width="62.5pt" style:rel-column-width="8105*"/>
    </style:style>
    <style:style style:name="Table8.B" style:family="table-column">
      <style:table-column-properties style:column-width="442.8pt" style:rel-column-width="57430*"/>
    </style:style>
    <style:style style:name="Table8.A1" style:family="table-cell">
      <style:table-cell-properties fo:background-color="#10141f" fo:padding="2.75pt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10141f" fo:padding="2.75pt" fo:border="0.5pt solid #000000">
        <style:background-image/>
      </style:table-cell-properties>
    </style:style>
    <style:style style:name="Table8.A2" style:family="table-cell">
      <style:table-cell-properties fo:padding="2.75pt" fo:border-left="0.5pt solid #000000" fo:border-right="none" fo:border-top="none" fo:border-bottom="0.5pt solid #000000"/>
    </style:style>
    <style:style style:name="Table8.B2" style:family="table-cell">
      <style:table-cell-properties fo:padding="2.75pt" fo:border-left="0.5pt solid #000000" fo:border-right="0.5pt solid #000000" fo:border-top="none" fo:border-bottom="0.5pt solid #000000"/>
    </style:style>
    <style:style style:name="Table8.A3" style:family="table-cell">
      <style:table-cell-properties fo:padding="2.75pt" fo:border-left="0.5pt solid #000000" fo:border-right="none" fo:border-top="none" fo:border-bottom="0.5pt solid #000000"/>
    </style:style>
    <style:style style:name="Table8.B3" style:family="table-cell">
      <style:table-cell-properties fo:padding="2.75pt" fo:border-left="0.5pt solid #000000" fo:border-right="0.5pt solid #000000" fo:border-top="none" fo:border-bottom="0.5pt solid #000000"/>
    </style:style>
    <style:style style:name="Table8.A4" style:family="table-cell">
      <style:table-cell-properties fo:padding="2.75pt" fo:border-left="0.5pt solid #000000" fo:border-right="none" fo:border-top="none" fo:border-bottom="0.5pt solid #000000"/>
    </style:style>
    <style:style style:name="Table8.B4" style:family="table-cell">
      <style:table-cell-properties fo:padding="2.75pt" fo:border-left="0.5pt solid #000000" fo:border-right="0.5pt solid #000000" fo:border-top="none" fo:border-bottom="0.5pt solid #000000"/>
    </style:style>
    <style:style style:name="Table4" style:family="table">
      <style:table-properties style:width="240.15pt" table:align="margins" style:writing-mode="lr-tb"/>
    </style:style>
    <style:style style:name="Table4.A" style:family="table-column">
      <style:table-column-properties style:column-width="80.05pt" style:rel-column-width="21845*"/>
    </style:style>
    <style:style style:name="Table4.A1" style:family="table-cell">
      <style:table-cell-properties style:vertical-align=""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" fo:padding="2.75pt" fo:border-left="none" fo:border-right="none" fo:border-top="none" fo:border-bottom="0.5pt solid #000000"/>
    </style:style>
    <style:style style:name="Table4.B2" style:family="table-cell">
      <style:table-cell-properties style:vertical-align="" fo:padding="2.75pt" fo:border-left="none" fo:border-right="none" fo:border-top="none" fo:border-bottom="0.5pt solid #000000"/>
    </style:style>
    <style:style style:name="Table4.C2" style:family="table-cell">
      <style:table-cell-properties style:vertical-align="" fo:padding="2.75pt" fo:border-left="none" fo:border-right="none" fo:border-top="none" fo:border-bottom="0.5pt solid #000000"/>
    </style:style>
    <style:style style:name="Table4.A3" style:family="table-cell">
      <style:table-cell-properties style:vertical-align="" fo:padding="2.75pt" fo:border-left="none" fo:border-right="none" fo:border-top="none" fo:border-bottom="0.5pt solid #000000"/>
    </style:style>
    <style:style style:name="Table4.B3" style:family="table-cell">
      <style:table-cell-properties style:vertical-align="" fo:padding="2.75pt" fo:border-left="none" fo:border-right="none" fo:border-top="none" fo:border-bottom="0.5pt solid #000000"/>
    </style:style>
    <style:style style:name="Table4.C3" style:family="table-cell">
      <style:table-cell-properties style:vertical-align="" fo:padding="2.75pt" fo:border-left="none" fo:border-right="none" fo:border-top="none" fo:border-bottom="0.5pt solid #000000"/>
    </style:style>
    <style:style style:name="Table4.A4" style:family="table-cell">
      <style:table-cell-properties style:vertical-align="" fo:padding="2.75pt" fo:border-left="none" fo:border-right="none" fo:border-top="none" fo:border-bottom="0.5pt solid #000000"/>
    </style:style>
    <style:style style:name="Table4.B4" style:family="table-cell">
      <style:table-cell-properties style:vertical-align="" fo:padding="2.75pt" fo:border-left="none" fo:border-right="none" fo:border-top="none" fo:border-bottom="0.5pt solid #000000"/>
    </style:style>
    <style:style style:name="Table4.C4" style:family="table-cell">
      <style:table-cell-properties style:vertical-align="" fo:padding="2.75pt" fo:border-left="none" fo:border-right="none" fo:border-top="none" fo:border-bottom="0.5pt solid #000000"/>
    </style:style>
    <style:style style:name="Table7" style:family="table">
      <style:table-properties style:width="505.3pt" table:align="margins" style:writing-mode="lr-tb"/>
    </style:style>
    <style:style style:name="Table7.A" style:family="table-column">
      <style:table-column-properties style:column-width="98.8pt" style:rel-column-width="12813*"/>
    </style:style>
    <style:style style:name="Table7.B" style:family="table-column">
      <style:table-column-properties style:column-width="35.6pt" style:rel-column-width="4617*"/>
    </style:style>
    <style:style style:name="Table7.C" style:family="table-column">
      <style:table-column-properties style:column-width="36.25pt" style:rel-column-width="4701*"/>
    </style:style>
    <style:style style:name="Table7.D" style:family="table-column">
      <style:table-column-properties style:column-width="334.65pt" style:rel-column-width="43404*"/>
    </style:style>
    <style:style style:name="Table7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7.A2" style:family="table-cell">
      <style:table-cell-properties fo:padding="2.75pt" fo:border-left="none" fo:border-right="none" fo:border-top="none" fo:border-bottom="0.5pt solid #000000"/>
    </style:style>
    <style:style style:name="Table7.B2" style:family="table-cell">
      <style:table-cell-properties fo:padding="2.75pt" fo:border-left="none" fo:border-right="none" fo:border-top="none" fo:border-bottom="0.5pt solid #000000"/>
    </style:style>
    <style:style style:name="Table7.C2" style:family="table-cell">
      <style:table-cell-properties fo:padding="2.75pt" fo:border-left="none" fo:border-right="none" fo:border-top="none" fo:border-bottom="0.5pt solid #000000"/>
    </style:style>
    <style:style style:name="Table7.D2" style:family="table-cell">
      <style:table-cell-properties fo:padding="2.75pt" fo:border-left="none" fo:border-right="none" fo:border-top="none" fo:border-bottom="0.5pt solid #000000"/>
    </style:style>
    <style:style style:name="Table7.A3" style:family="table-cell">
      <style:table-cell-properties fo:padding="2.75pt" fo:border-left="none" fo:border-right="none" fo:border-top="none" fo:border-bottom="0.5pt solid #000000"/>
    </style:style>
    <style:style style:name="Table7.B3" style:family="table-cell">
      <style:table-cell-properties fo:padding="2.75pt" fo:border-left="none" fo:border-right="none" fo:border-top="none" fo:border-bottom="0.5pt solid #000000"/>
    </style:style>
    <style:style style:name="Table7.C3" style:family="table-cell">
      <style:table-cell-properties fo:padding="2.75pt" fo:border-left="none" fo:border-right="none" fo:border-top="none" fo:border-bottom="0.5pt solid #000000"/>
    </style:style>
    <style:style style:name="Table7.D3" style:family="table-cell">
      <style:table-cell-properties fo:padding="2.75pt" fo:border-left="none" fo:border-right="none" fo:border-top="none" fo:border-bottom="0.5pt solid #000000"/>
    </style:style>
    <style:style style:name="Table7.A4" style:family="table-cell">
      <style:table-cell-properties fo:padding="2.75pt" fo:border-left="none" fo:border-right="none" fo:border-top="none" fo:border-bottom="0.5pt solid #000000"/>
    </style:style>
    <style:style style:name="Table7.B4" style:family="table-cell">
      <style:table-cell-properties fo:padding="2.75pt" fo:border-left="none" fo:border-right="none" fo:border-top="none" fo:border-bottom="0.5pt solid #000000"/>
    </style:style>
    <style:style style:name="Table7.C4" style:family="table-cell">
      <style:table-cell-properties fo:padding="2.75pt" fo:border-left="none" fo:border-right="none" fo:border-top="none" fo:border-bottom="0.5pt solid #000000"/>
    </style:style>
    <style:style style:name="Table7.D4" style:family="table-cell">
      <style:table-cell-properties fo:padding="2.75pt" fo:border-left="none" fo:border-right="none" fo:border-top="none" fo:border-bottom="0.5pt solid #000000"/>
    </style:style>
    <style:style style:name="Table6" style:family="table">
      <style:table-properties style:width="505.3pt" table:align="margins" style:writing-mode="lr-tb"/>
    </style:style>
    <style:style style:name="Table6.A" style:family="table-column">
      <style:table-column-properties style:column-width="98.75pt" style:rel-column-width="12807*"/>
    </style:style>
    <style:style style:name="Table6.B" style:family="table-column">
      <style:table-column-properties style:column-width="35.65pt" style:rel-column-width="4623*"/>
    </style:style>
    <style:style style:name="Table6.C" style:family="table-column">
      <style:table-column-properties style:column-width="36.25pt" style:rel-column-width="4701*"/>
    </style:style>
    <style:style style:name="Table6.D" style:family="table-column">
      <style:table-column-properties style:column-width="334.65pt" style:rel-column-width="43404*"/>
    </style:style>
    <style:style style:name="Table6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6.A2" style:family="table-cell">
      <style:table-cell-properties fo:padding="2.75pt" fo:border-left="none" fo:border-right="none" fo:border-top="none" fo:border-bottom="0.5pt solid #000000"/>
    </style:style>
    <style:style style:name="Table6.B2" style:family="table-cell">
      <style:table-cell-properties fo:padding="2.75pt" fo:border-left="none" fo:border-right="none" fo:border-top="none" fo:border-bottom="0.5pt solid #000000"/>
    </style:style>
    <style:style style:name="Table6.C2" style:family="table-cell">
      <style:table-cell-properties fo:padding="2.75pt" fo:border-left="none" fo:border-right="none" fo:border-top="none" fo:border-bottom="0.5pt solid #000000"/>
    </style:style>
    <style:style style:name="Table6.D2" style:family="table-cell">
      <style:table-cell-properties fo:padding="2.75pt" fo:border-left="none" fo:border-right="none" fo:border-top="none" fo:border-bottom="0.5pt solid #000000"/>
    </style:style>
    <style:style style:name="Table6.A3" style:family="table-cell">
      <style:table-cell-properties fo:padding="2.75pt" fo:border-left="none" fo:border-right="none" fo:border-top="none" fo:border-bottom="0.5pt solid #000000"/>
    </style:style>
    <style:style style:name="Table6.B3" style:family="table-cell">
      <style:table-cell-properties fo:padding="2.75pt" fo:border-left="none" fo:border-right="none" fo:border-top="none" fo:border-bottom="0.5pt solid #000000"/>
    </style:style>
    <style:style style:name="Table6.C3" style:family="table-cell">
      <style:table-cell-properties fo:padding="2.75pt" fo:border-left="none" fo:border-right="none" fo:border-top="none" fo:border-bottom="0.5pt solid #000000"/>
    </style:style>
    <style:style style:name="Table6.D3" style:family="table-cell">
      <style:table-cell-properties fo:padding="2.75pt" fo:border-left="none" fo:border-right="none" fo:border-top="none" fo:border-bottom="0.5pt solid #000000"/>
    </style:style>
    <style:style style:name="Table6.A4" style:family="table-cell">
      <style:table-cell-properties fo:padding="2.75pt" fo:border-left="none" fo:border-right="none" fo:border-top="none" fo:border-bottom="0.5pt solid #000000"/>
    </style:style>
    <style:style style:name="Table6.B4" style:family="table-cell">
      <style:table-cell-properties fo:padding="2.75pt" fo:border-left="none" fo:border-right="none" fo:border-top="none" fo:border-bottom="0.5pt solid #000000"/>
    </style:style>
    <style:style style:name="Table6.C4" style:family="table-cell">
      <style:table-cell-properties fo:padding="2.75pt" fo:border-left="none" fo:border-right="none" fo:border-top="none" fo:border-bottom="0.5pt solid #000000"/>
    </style:style>
    <style:style style:name="Table6.D4" style:family="table-cell">
      <style:table-cell-properties fo:padding="2.75pt" fo:border-left="none" fo:border-right="none" fo:border-top="none" fo:border-bottom="0.5pt solid #000000"/>
    </style:style>
    <style:style style:name="Table6.A5" style:family="table-cell">
      <style:table-cell-properties fo:padding="2.75pt" fo:border-left="none" fo:border-right="none" fo:border-top="none" fo:border-bottom="0.5pt solid #000000"/>
    </style:style>
    <style:style style:name="Table6.B5" style:family="table-cell">
      <style:table-cell-properties fo:padding="2.75pt" fo:border-left="none" fo:border-right="none" fo:border-top="none" fo:border-bottom="0.5pt solid #000000"/>
    </style:style>
    <style:style style:name="Table6.C5" style:family="table-cell">
      <style:table-cell-properties fo:padding="2.75pt" fo:border-left="none" fo:border-right="none" fo:border-top="none" fo:border-bottom="0.5pt solid #000000"/>
    </style:style>
    <style:style style:name="Table6.D5" style:family="table-cell">
      <style:table-cell-properties fo:padding="2.75pt" fo:border-left="none" fo:border-right="none" fo:border-top="none" fo:border-bottom="0.5pt solid #000000"/>
    </style:style>
    <style:style style:name="Table6.A6" style:family="table-cell">
      <style:table-cell-properties fo:padding="2.75pt" fo:border-left="none" fo:border-right="none" fo:border-top="none" fo:border-bottom="0.5pt solid #000000"/>
    </style:style>
    <style:style style:name="Table6.B6" style:family="table-cell">
      <style:table-cell-properties fo:padding="2.75pt" fo:border-left="none" fo:border-right="none" fo:border-top="none" fo:border-bottom="0.5pt solid #000000"/>
    </style:style>
    <style:style style:name="Table6.C6" style:family="table-cell">
      <style:table-cell-properties fo:padding="2.75pt" fo:border-left="none" fo:border-right="none" fo:border-top="none" fo:border-bottom="0.5pt solid #000000"/>
    </style:style>
    <style:style style:name="Table6.D6" style:family="table-cell">
      <style:table-cell-properties fo:padding="2.75pt" fo:border-left="none" fo:border-right="none" fo:border-top="none" fo:border-bottom="0.5pt solid #000000"/>
    </style:style>
    <style:style style:name="Table6.A7" style:family="table-cell">
      <style:table-cell-properties fo:padding="2.75pt" fo:border-left="none" fo:border-right="none" fo:border-top="none" fo:border-bottom="0.5pt solid #000000"/>
    </style:style>
    <style:style style:name="Table6.B7" style:family="table-cell">
      <style:table-cell-properties fo:padding="2.75pt" fo:border-left="none" fo:border-right="none" fo:border-top="none" fo:border-bottom="0.5pt solid #000000"/>
    </style:style>
    <style:style style:name="Table6.C7" style:family="table-cell">
      <style:table-cell-properties fo:padding="2.75pt" fo:border-left="none" fo:border-right="none" fo:border-top="none" fo:border-bottom="0.5pt solid #000000"/>
    </style:style>
    <style:style style:name="Table6.D7" style:family="table-cell">
      <style:table-cell-properties fo:padding="2.75pt" fo:border-left="none" fo:border-right="none" fo:border-top="none" fo:border-bottom="0.5pt solid #000000"/>
    </style:style>
    <style:style style:name="Table6.A8" style:family="table-cell">
      <style:table-cell-properties fo:padding="2.75pt" fo:border-left="none" fo:border-right="none" fo:border-top="none" fo:border-bottom="0.5pt solid #000000"/>
    </style:style>
    <style:style style:name="Table6.B8" style:family="table-cell">
      <style:table-cell-properties fo:padding="2.75pt" fo:border-left="none" fo:border-right="none" fo:border-top="none" fo:border-bottom="0.5pt solid #000000"/>
    </style:style>
    <style:style style:name="Table6.C8" style:family="table-cell">
      <style:table-cell-properties fo:padding="2.75pt" fo:border-left="none" fo:border-right="none" fo:border-top="none" fo:border-bottom="0.5pt solid #000000"/>
    </style:style>
    <style:style style:name="Table6.D8" style:family="table-cell">
      <style:table-cell-properties fo:padding="2.75pt" fo:border-left="none" fo:border-right="none" fo:border-top="none" fo:border-bottom="0.5pt solid #000000"/>
    </style:style>
    <style:style style:name="Table6.A9" style:family="table-cell">
      <style:table-cell-properties fo:padding="2.75pt" fo:border-left="none" fo:border-right="none" fo:border-top="none" fo:border-bottom="0.5pt solid #000000"/>
    </style:style>
    <style:style style:name="Table6.B9" style:family="table-cell">
      <style:table-cell-properties fo:padding="2.75pt" fo:border-left="none" fo:border-right="none" fo:border-top="none" fo:border-bottom="0.5pt solid #000000"/>
    </style:style>
    <style:style style:name="Table6.C9" style:family="table-cell">
      <style:table-cell-properties fo:padding="2.75pt" fo:border-left="none" fo:border-right="none" fo:border-top="none" fo:border-bottom="0.5pt solid #000000"/>
    </style:style>
    <style:style style:name="Table6.D9" style:family="table-cell">
      <style:table-cell-properties fo:padding="2.75pt" fo:border-left="none" fo:border-right="none" fo:border-top="none" fo:border-bottom="0.5pt solid #000000"/>
    </style:style>
    <style:style style:name="Table9" style:family="table">
      <style:table-properties style:width="505.3pt" table:align="margins" style:writing-mode="lr-tb"/>
    </style:style>
    <style:style style:name="Table9.A" style:family="table-column">
      <style:table-column-properties style:column-width="98.75pt" style:rel-column-width="12807*"/>
    </style:style>
    <style:style style:name="Table9.B" style:family="table-column">
      <style:table-column-properties style:column-width="35.65pt" style:rel-column-width="4623*"/>
    </style:style>
    <style:style style:name="Table9.C" style:family="table-column">
      <style:table-column-properties style:column-width="36.25pt" style:rel-column-width="4701*"/>
    </style:style>
    <style:style style:name="Table9.D" style:family="table-column">
      <style:table-column-properties style:column-width="334.65pt" style:rel-column-width="43404*"/>
    </style:style>
    <style:style style:name="Table9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9.A2" style:family="table-cell">
      <style:table-cell-properties fo:padding="2.75pt" fo:border-left="none" fo:border-right="none" fo:border-top="none" fo:border-bottom="0.5pt solid #000000"/>
    </style:style>
    <style:style style:name="Table9.B2" style:family="table-cell">
      <style:table-cell-properties fo:padding="2.75pt" fo:border-left="none" fo:border-right="none" fo:border-top="none" fo:border-bottom="0.5pt solid #000000"/>
    </style:style>
    <style:style style:name="Table9.C2" style:family="table-cell">
      <style:table-cell-properties fo:padding="2.75pt" fo:border-left="none" fo:border-right="none" fo:border-top="none" fo:border-bottom="0.5pt solid #000000"/>
    </style:style>
    <style:style style:name="Table9.D2" style:family="table-cell">
      <style:table-cell-properties fo:padding="2.75pt" fo:border-left="none" fo:border-right="none" fo:border-top="none" fo:border-bottom="0.5pt solid #000000"/>
    </style:style>
    <style:style style:name="Table9.A3" style:family="table-cell">
      <style:table-cell-properties fo:padding="2.75pt" fo:border-left="none" fo:border-right="none" fo:border-top="none" fo:border-bottom="0.5pt solid #000000"/>
    </style:style>
    <style:style style:name="Table9.B3" style:family="table-cell">
      <style:table-cell-properties fo:padding="2.75pt" fo:border-left="none" fo:border-right="none" fo:border-top="none" fo:border-bottom="0.5pt solid #000000"/>
    </style:style>
    <style:style style:name="Table9.C3" style:family="table-cell">
      <style:table-cell-properties fo:padding="2.75pt" fo:border-left="none" fo:border-right="none" fo:border-top="none" fo:border-bottom="0.5pt solid #000000"/>
    </style:style>
    <style:style style:name="Table9.D3" style:family="table-cell">
      <style:table-cell-properties fo:padding="2.75pt" fo:border-left="none" fo:border-right="none" fo:border-top="none" fo:border-bottom="0.5pt solid #000000"/>
    </style:style>
    <style:style style:name="Table9.A4" style:family="table-cell">
      <style:table-cell-properties fo:padding="2.75pt" fo:border-left="none" fo:border-right="none" fo:border-top="none" fo:border-bottom="0.5pt solid #000000"/>
    </style:style>
    <style:style style:name="Table9.B4" style:family="table-cell">
      <style:table-cell-properties fo:padding="2.75pt" fo:border-left="none" fo:border-right="none" fo:border-top="none" fo:border-bottom="0.5pt solid #000000"/>
    </style:style>
    <style:style style:name="Table9.C4" style:family="table-cell">
      <style:table-cell-properties fo:padding="2.75pt" fo:border-left="none" fo:border-right="none" fo:border-top="none" fo:border-bottom="0.5pt solid #000000"/>
    </style:style>
    <style:style style:name="Table9.D4" style:family="table-cell">
      <style:table-cell-properties fo:padding="2.75pt" fo:border-left="none" fo:border-right="none" fo:border-top="none" fo:border-bottom="0.5pt solid #000000"/>
    </style:style>
    <style:style style:name="Table9.A5" style:family="table-cell">
      <style:table-cell-properties fo:padding="2.75pt" fo:border-left="none" fo:border-right="none" fo:border-top="none" fo:border-bottom="0.5pt solid #000000"/>
    </style:style>
    <style:style style:name="Table9.B5" style:family="table-cell">
      <style:table-cell-properties fo:padding="2.75pt" fo:border-left="none" fo:border-right="none" fo:border-top="none" fo:border-bottom="0.5pt solid #000000"/>
    </style:style>
    <style:style style:name="Table9.C5" style:family="table-cell">
      <style:table-cell-properties fo:padding="2.75pt" fo:border-left="none" fo:border-right="none" fo:border-top="none" fo:border-bottom="0.5pt solid #000000"/>
    </style:style>
    <style:style style:name="Table9.D5" style:family="table-cell">
      <style:table-cell-properties fo:padding="2.75pt" fo:border-left="none" fo:border-right="none" fo:border-top="none" fo:border-bottom="0.5pt solid #000000"/>
    </style:style>
    <style:style style:name="Table9.A6" style:family="table-cell">
      <style:table-cell-properties fo:padding="2.75pt" fo:border-left="none" fo:border-right="none" fo:border-top="none" fo:border-bottom="0.5pt solid #000000"/>
    </style:style>
    <style:style style:name="Table9.B6" style:family="table-cell">
      <style:table-cell-properties fo:padding="2.75pt" fo:border-left="none" fo:border-right="none" fo:border-top="none" fo:border-bottom="0.5pt solid #000000"/>
    </style:style>
    <style:style style:name="Table9.C6" style:family="table-cell">
      <style:table-cell-properties fo:padding="2.75pt" fo:border-left="none" fo:border-right="none" fo:border-top="none" fo:border-bottom="0.5pt solid #000000"/>
    </style:style>
    <style:style style:name="Table9.D6" style:family="table-cell">
      <style:table-cell-properties fo:padding="2.75pt" fo:border-left="none" fo:border-right="none" fo:border-top="none" fo:border-bottom="0.5pt solid #000000"/>
    </style:style>
    <style:style style:name="Table9.A7" style:family="table-cell">
      <style:table-cell-properties fo:padding="2.75pt" fo:border-left="none" fo:border-right="none" fo:border-top="none" fo:border-bottom="0.5pt solid #000000"/>
    </style:style>
    <style:style style:name="Table9.B7" style:family="table-cell">
      <style:table-cell-properties fo:padding="2.75pt" fo:border-left="none" fo:border-right="none" fo:border-top="none" fo:border-bottom="0.5pt solid #000000"/>
    </style:style>
    <style:style style:name="Table9.C7" style:family="table-cell">
      <style:table-cell-properties fo:padding="2.75pt" fo:border-left="none" fo:border-right="none" fo:border-top="none" fo:border-bottom="0.5pt solid #000000"/>
    </style:style>
    <style:style style:name="Table9.D7" style:family="table-cell">
      <style:table-cell-properties fo:padding="2.75pt" fo:border-left="none" fo:border-right="none" fo:border-top="none" fo:border-bottom="0.5pt solid #000000"/>
    </style:style>
    <style:style style:name="Table9.A8" style:family="table-cell">
      <style:table-cell-properties fo:padding="2.75pt" fo:border-left="none" fo:border-right="none" fo:border-top="none" fo:border-bottom="0.5pt solid #000000"/>
    </style:style>
    <style:style style:name="Table9.B8" style:family="table-cell">
      <style:table-cell-properties fo:padding="2.75pt" fo:border-left="none" fo:border-right="none" fo:border-top="none" fo:border-bottom="0.5pt solid #000000"/>
    </style:style>
    <style:style style:name="Table9.C8" style:family="table-cell">
      <style:table-cell-properties fo:padding="2.75pt" fo:border-left="none" fo:border-right="none" fo:border-top="none" fo:border-bottom="0.5pt solid #000000"/>
    </style:style>
    <style:style style:name="Table9.D8" style:family="table-cell">
      <style:table-cell-properties fo:padding="2.75pt" fo:border-left="none" fo:border-right="none" fo:border-top="none" fo:border-bottom="0.5pt solid #000000"/>
    </style:style>
    <style:style style:name="Table9.A9" style:family="table-cell">
      <style:table-cell-properties fo:padding="2.75pt" fo:border-left="none" fo:border-right="none" fo:border-top="none" fo:border-bottom="0.5pt solid #000000"/>
    </style:style>
    <style:style style:name="Table9.B9" style:family="table-cell">
      <style:table-cell-properties fo:padding="2.75pt" fo:border-left="none" fo:border-right="none" fo:border-top="none" fo:border-bottom="0.5pt solid #000000"/>
    </style:style>
    <style:style style:name="Table9.C9" style:family="table-cell">
      <style:table-cell-properties fo:padding="2.75pt" fo:border-left="none" fo:border-right="none" fo:border-top="none" fo:border-bottom="0.5pt solid #000000"/>
    </style:style>
    <style:style style:name="Table9.D9" style:family="table-cell">
      <style:table-cell-properties fo:padding="2.75pt" fo:border-left="none" fo:border-right="none" fo:border-top="none" fo:border-bottom="0.5pt solid #000000"/>
    </style:style>
    <style:style style:name="Table1" style:family="table">
      <style:table-properties style:width="505.3pt" table:align="margins" style:writing-mode="lr-tb"/>
    </style:style>
    <style:style style:name="Table1.A" style:family="table-column">
      <style:table-column-properties style:column-width="98.75pt" style:rel-column-width="12807*"/>
    </style:style>
    <style:style style:name="Table1.B" style:family="table-column">
      <style:table-column-properties style:column-width="35.65pt" style:rel-column-width="4623*"/>
    </style:style>
    <style:style style:name="Table1.C" style:family="table-column">
      <style:table-column-properties style:column-width="36.25pt" style:rel-column-width="4701*"/>
    </style:style>
    <style:style style:name="Table1.D" style:family="table-column">
      <style:table-column-properties style:column-width="334.65pt" style:rel-column-width="43404*"/>
    </style:style>
    <style:style style:name="Table1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1.A2" style:family="table-cell">
      <style:table-cell-properties fo:padding="2.75pt" fo:border-left="none" fo:border-right="none" fo:border-top="none" fo:border-bottom="0.5pt solid #000000"/>
    </style:style>
    <style:style style:name="Table1.B2" style:family="table-cell">
      <style:table-cell-properties fo:padding="2.75pt" fo:border-left="none" fo:border-right="none" fo:border-top="none" fo:border-bottom="0.5pt solid #000000"/>
    </style:style>
    <style:style style:name="Table1.C2" style:family="table-cell">
      <style:table-cell-properties fo:padding="2.75pt" fo:border-left="none" fo:border-right="none" fo:border-top="none" fo:border-bottom="0.5pt solid #000000"/>
    </style:style>
    <style:style style:name="Table1.D2" style:family="table-cell">
      <style:table-cell-properties fo:padding="2.75pt" fo:border-left="none" fo:border-right="none" fo:border-top="none" fo:border-bottom="0.5pt solid #000000"/>
    </style:style>
    <style:style style:name="Table1.A3" style:family="table-cell">
      <style:table-cell-properties fo:padding="2.75pt" fo:border-left="none" fo:border-right="none" fo:border-top="none" fo:border-bottom="0.5pt solid #000000"/>
    </style:style>
    <style:style style:name="Table1.B3" style:family="table-cell">
      <style:table-cell-properties fo:padding="2.75pt" fo:border-left="none" fo:border-right="none" fo:border-top="none" fo:border-bottom="0.5pt solid #000000"/>
    </style:style>
    <style:style style:name="Table1.C3" style:family="table-cell">
      <style:table-cell-properties fo:padding="2.75pt" fo:border-left="none" fo:border-right="none" fo:border-top="none" fo:border-bottom="0.5pt solid #000000"/>
    </style:style>
    <style:style style:name="Table1.D3" style:family="table-cell">
      <style:table-cell-properties fo:padding="2.75pt" fo:border-left="none" fo:border-right="none" fo:border-top="none" fo:border-bottom="0.5pt solid #000000"/>
    </style:style>
    <style:style style:name="Table1.A4" style:family="table-cell">
      <style:table-cell-properties fo:padding="2.75pt" fo:border-left="none" fo:border-right="none" fo:border-top="none" fo:border-bottom="0.5pt solid #000000"/>
    </style:style>
    <style:style style:name="Table1.B4" style:family="table-cell">
      <style:table-cell-properties fo:padding="2.75pt" fo:border-left="none" fo:border-right="none" fo:border-top="none" fo:border-bottom="0.5pt solid #000000"/>
    </style:style>
    <style:style style:name="Table1.C4" style:family="table-cell">
      <style:table-cell-properties fo:padding="2.75pt" fo:border-left="none" fo:border-right="none" fo:border-top="none" fo:border-bottom="0.5pt solid #000000"/>
    </style:style>
    <style:style style:name="Table1.D4" style:family="table-cell">
      <style:table-cell-properties fo:padding="2.75pt" fo:border-left="none" fo:border-right="none" fo:border-top="none" fo:border-bottom="0.5pt solid #000000"/>
    </style:style>
    <style:style style:name="Table3" style:family="table">
      <style:table-properties style:width="505.3pt" table:align="margins" style:writing-mode="lr-tb"/>
    </style:style>
    <style:style style:name="Table3.A" style:family="table-column">
      <style:table-column-properties style:column-width="109.05pt" style:rel-column-width="14144*"/>
    </style:style>
    <style:style style:name="Table3.B" style:family="table-column">
      <style:table-column-properties style:column-width="396.25pt" style:rel-column-width="51391*"/>
    </style:style>
    <style:style style:name="Table3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3.A2" style:family="table-cell">
      <style:table-cell-properties fo:padding="2.75pt" fo:border-left="none" fo:border-right="none" fo:border-top="none" fo:border-bottom="0.5pt solid #000000"/>
    </style:style>
    <style:style style:name="Table3.B2" style:family="table-cell">
      <style:table-cell-properties fo:padding="2.75pt" fo:border-left="none" fo:border-right="none" fo:border-top="none" fo:border-bottom="0.5pt solid #000000"/>
    </style:style>
    <style:style style:name="Table3.A3" style:family="table-cell">
      <style:table-cell-properties fo:padding="2.75pt" fo:border-left="none" fo:border-right="none" fo:border-top="none" fo:border-bottom="0.5pt solid #000000"/>
    </style:style>
    <style:style style:name="Table3.B3" style:family="table-cell">
      <style:table-cell-properties fo:padding="2.75pt" fo:border-left="none" fo:border-right="none" fo:border-top="none" fo:border-bottom="0.5pt solid #000000"/>
    </style:style>
    <style:style style:name="Table3.A4" style:family="table-cell">
      <style:table-cell-properties fo:padding="2.75pt" fo:border-left="none" fo:border-right="none" fo:border-top="none" fo:border-bottom="0.5pt solid #000000"/>
    </style:style>
    <style:style style:name="Table3.B4" style:family="table-cell">
      <style:table-cell-properties fo:padding="2.75pt" fo:border-left="none" fo:border-right="none" fo:border-top="none" fo:border-bottom="0.5pt solid #000000"/>
    </style:style>
    <style:style style:name="Table3.A5" style:family="table-cell">
      <style:table-cell-properties fo:padding="2.75pt" fo:border-left="none" fo:border-right="none" fo:border-top="none" fo:border-bottom="0.5pt solid #000000"/>
    </style:style>
    <style:style style:name="Table3.B5" style:family="table-cell">
      <style:table-cell-properties fo:padding="2.75pt" fo:border-left="none" fo:border-right="none" fo:border-top="none" fo:border-bottom="0.5pt solid #000000"/>
    </style:style>
    <style:style style:name="Table3.A6" style:family="table-cell">
      <style:table-cell-properties fo:padding="2.75pt" fo:border-left="none" fo:border-right="none" fo:border-top="none" fo:border-bottom="0.5pt solid #000000"/>
    </style:style>
    <style:style style:name="Table3.B6" style:family="table-cell">
      <style:table-cell-properties fo:padding="2.75pt" fo:border-left="none" fo:border-right="none" fo:border-top="none" fo:border-bottom="0.5pt solid #000000"/>
    </style:style>
    <style:style style:name="Table3.A7" style:family="table-cell">
      <style:table-cell-properties fo:padding="2.75pt" fo:border-left="none" fo:border-right="none" fo:border-top="none" fo:border-bottom="0.5pt solid #000000"/>
    </style:style>
    <style:style style:name="Table3.B7" style:family="table-cell">
      <style:table-cell-properties fo:padding="2.75pt" fo:border-left="none" fo:border-right="none" fo:border-top="none" fo:border-bottom="0.5pt solid #000000"/>
    </style:style>
    <style:style style:name="Table3.A8" style:family="table-cell">
      <style:table-cell-properties fo:padding="2.75pt" fo:border-left="none" fo:border-right="none" fo:border-top="none" fo:border-bottom="0.5pt solid #000000"/>
    </style:style>
    <style:style style:name="Table3.B8" style:family="table-cell">
      <style:table-cell-properties fo:padding="2.75pt" fo:border-left="none" fo:border-right="none" fo:border-top="none" fo:border-bottom="0.5pt solid #000000"/>
    </style:style>
    <style:style style:name="Table3.A9" style:family="table-cell">
      <style:table-cell-properties fo:padding="2.75pt" fo:border-left="none" fo:border-right="none" fo:border-top="none" fo:border-bottom="0.5pt solid #000000"/>
    </style:style>
    <style:style style:name="Table3.B9" style:family="table-cell">
      <style:table-cell-properties fo:padding="2.75pt" fo:border-left="none" fo:border-right="none" fo:border-top="none" fo:border-bottom="0.5pt solid #000000"/>
    </style:style>
    <style:style style:name="Table3.A10" style:family="table-cell">
      <style:table-cell-properties fo:padding="2.75pt" fo:border-left="none" fo:border-right="none" fo:border-top="none" fo:border-bottom="0.5pt solid #000000"/>
    </style:style>
    <style:style style:name="Table3.B10" style:family="table-cell">
      <style:table-cell-properties fo:padding="2.75pt" fo:border-left="none" fo:border-right="none" fo:border-top="none" fo:border-bottom="0.5pt solid #000000"/>
    </style:style>
    <style:style style:name="Table5" style:family="table">
      <style:table-properties style:width="240.15pt" table:align="margins" style:writing-mode="lr-tb"/>
    </style:style>
    <style:style style:name="Table5.A" style:family="table-column">
      <style:table-column-properties style:column-width="48.75pt" style:rel-column-width="13303*"/>
    </style:style>
    <style:style style:name="Table5.B" style:family="table-column">
      <style:table-column-properties style:column-width="191.4pt" style:rel-column-width="52232*"/>
    </style:style>
    <style:style style:name="Table5.A1" style:family="table-cell">
      <style:table-cell-properties fo:background-color="#000000" fo:padding="2.75pt" fo:border-left="none" fo:border-right="none" fo:border-top="0.5pt solid #000000" fo:border-bottom="0.5pt solid #000000">
        <style:background-image/>
      </style:table-cell-properties>
    </style:style>
    <style:style style:name="Table5.A2" style:family="table-cell">
      <style:table-cell-properties fo:padding="2.75pt" fo:border-left="none" fo:border-right="none" fo:border-top="none" fo:border-bottom="0.5pt solid #000000"/>
    </style:style>
    <style:style style:name="Table5.B2" style:family="table-cell">
      <style:table-cell-properties fo:padding="2.75pt" fo:border-left="none" fo:border-right="none" fo:border-top="none" fo:border-bottom="0.5pt solid #000000"/>
    </style:style>
    <style:style style:name="Table5.A3" style:family="table-cell">
      <style:table-cell-properties fo:padding="2.75pt" fo:border-left="none" fo:border-right="none" fo:border-top="none" fo:border-bottom="0.5pt solid #000000"/>
    </style:style>
    <style:style style:name="Table5.B3" style:family="table-cell">
      <style:table-cell-properties fo:padding="2.75pt" fo:border-left="none" fo:border-right="none" fo:border-top="none" fo:border-bottom="0.5pt solid #000000"/>
    </style:style>
    <style:style style:name="Table5.A4" style:family="table-cell">
      <style:table-cell-properties fo:padding="2.75pt" fo:border-left="none" fo:border-right="none" fo:border-top="none" fo:border-bottom="0.5pt solid #000000"/>
    </style:style>
    <style:style style:name="Table5.B4" style:family="table-cell">
      <style:table-cell-properties fo:padding="2.75pt" fo:border-left="none" fo:border-right="none" fo:border-top="none" fo:border-bottom="0.5pt solid #000000"/>
    </style:style>
    <style:style style:name="Table5.A5" style:family="table-cell">
      <style:table-cell-properties fo:padding="2.75pt" fo:border-left="none" fo:border-right="none" fo:border-top="none" fo:border-bottom="0.5pt solid #000000"/>
    </style:style>
    <style:style style:name="Table5.B5" style:family="table-cell">
      <style:table-cell-properties fo:padding="2.75pt" fo:border-left="none" fo:border-right="none" fo:border-top="none" fo:border-bottom="0.5pt solid #000000"/>
    </style:style>
    <style:style style:name="Table5.A6" style:family="table-cell">
      <style:table-cell-properties fo:padding="2.75pt" fo:border-left="none" fo:border-right="none" fo:border-top="none" fo:border-bottom="0.5pt solid #000000"/>
    </style:style>
    <style:style style:name="Table5.B6" style:family="table-cell">
      <style:table-cell-properties fo:padding="2.75pt" fo:border-left="none" fo:border-right="none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paragraph-rsid="0079311a"/>
    </style:style>
    <style:style style:name="P2" style:family="paragraph" style:parent-style-name="Standard">
      <style:text-properties officeooo:paragraph-rsid="0105c84a"/>
    </style:style>
    <style:style style:name="P3" style:family="paragraph" style:parent-style-name="Standard" style:list-style-name="L1">
      <style:text-properties fo:font-weight="normal" officeooo:rsid="0218354f" officeooo:paragraph-rsid="02183ad5" style:font-weight-asian="normal" style:font-weight-complex="normal"/>
    </style:style>
    <style:style style:name="P4" style:family="paragraph" style:parent-style-name="Standard" style:list-style-name="L1">
      <style:text-properties officeooo:paragraph-rsid="01def656"/>
    </style:style>
    <style:style style:name="P5" style:family="paragraph" style:parent-style-name="Standard" style:list-style-name="L1">
      <style:text-properties officeooo:rsid="0105c84a" officeooo:paragraph-rsid="01fc890f"/>
    </style:style>
    <style:style style:name="P6" style:family="paragraph" style:parent-style-name="Standard" style:list-style-name="L1">
      <style:text-properties officeooo:paragraph-rsid="0139dde3"/>
    </style:style>
    <style:style style:name="P7" style:family="paragraph" style:parent-style-name="List_20_Paragraph" style:list-style-name="L2">
      <style:text-properties officeooo:rsid="011b3104" officeooo:paragraph-rsid="0139dde3"/>
    </style:style>
    <style:style style:name="P8" style:family="paragraph" style:parent-style-name="List_20_Paragraph" style:list-style-name="L2">
      <style:text-properties officeooo:rsid="01537011" officeooo:paragraph-rsid="01537011"/>
    </style:style>
    <style:style style:name="P9" style:family="paragraph" style:parent-style-name="Standard" style:list-style-name="L1">
      <style:text-properties officeooo:rsid="00fbd6a4" officeooo:paragraph-rsid="00fbd6a4"/>
    </style:style>
    <style:style style:name="P10" style:family="paragraph" style:parent-style-name="Standard" style:list-style-name="L1">
      <style:text-properties officeooo:paragraph-rsid="01f4d272"/>
    </style:style>
    <style:style style:name="P11" style:family="paragraph" style:parent-style-name="Standard" style:list-style-name="L1">
      <style:text-properties officeooo:paragraph-rsid="006cb291"/>
    </style:style>
    <style:style style:name="P12" style:family="paragraph" style:parent-style-name="Heading_20_1">
      <style:paragraph-properties fo:break-before="page"/>
      <style:text-properties officeooo:paragraph-rsid="003f62b7"/>
    </style:style>
    <style:style style:name="P13" style:family="paragraph" style:parent-style-name="Standard">
      <style:text-properties officeooo:paragraph-rsid="00d323f9"/>
    </style:style>
    <style:style style:name="P14" style:family="paragraph" style:parent-style-name="Heading_20_2">
      <style:text-properties officeooo:rsid="00ca99e7" officeooo:paragraph-rsid="00d323f9"/>
    </style:style>
    <style:style style:name="P15" style:family="paragraph" style:parent-style-name="Standard">
      <style:text-properties officeooo:rsid="00ca99e7" officeooo:paragraph-rsid="00d323f9"/>
    </style:style>
    <style:style style:name="P16" style:family="paragraph" style:parent-style-name="Standard">
      <style:text-properties officeooo:rsid="00c95a39" officeooo:paragraph-rsid="00d323f9"/>
    </style:style>
    <style:style style:name="P17" style:family="paragraph" style:parent-style-name="Heading_20_2">
      <style:text-properties officeooo:paragraph-rsid="0127a33f"/>
    </style:style>
    <style:style style:name="P18" style:family="paragraph" style:parent-style-name="Heading_20_3">
      <style:text-properties officeooo:paragraph-rsid="0127a33f"/>
    </style:style>
    <style:style style:name="P19" style:family="paragraph" style:parent-style-name="Standard">
      <style:text-properties officeooo:rsid="0127a33f" officeooo:paragraph-rsid="0127a33f"/>
    </style:style>
    <style:style style:name="P20" style:family="paragraph" style:parent-style-name="Standard">
      <style:text-properties officeooo:paragraph-rsid="0127a33f"/>
    </style:style>
    <style:style style:name="P21" style:family="paragraph" style:parent-style-name="Standard">
      <style:text-properties officeooo:rsid="0127a33f" officeooo:paragraph-rsid="01297e03"/>
    </style:style>
    <style:style style:name="P22" style:family="paragraph" style:parent-style-name="Standard">
      <style:text-properties officeooo:paragraph-rsid="01297e03"/>
    </style:style>
    <style:style style:name="P23" style:family="paragraph" style:parent-style-name="Heading_20_3">
      <style:text-properties officeooo:rsid="012b3e17" officeooo:paragraph-rsid="012b3e17"/>
    </style:style>
    <style:style style:name="P24" style:family="paragraph" style:parent-style-name="Heading_20_3">
      <style:text-properties officeooo:rsid="01297e03" officeooo:paragraph-rsid="01297e03"/>
    </style:style>
    <style:style style:name="P25" style:family="paragraph" style:parent-style-name="Heading_20_3">
      <style:text-properties officeooo:rsid="01e5b977" officeooo:paragraph-rsid="01e5b977"/>
    </style:style>
    <style:style style:name="P26" style:family="paragraph" style:parent-style-name="Standard">
      <style:text-properties officeooo:rsid="0127a33f" officeooo:paragraph-rsid="01e5b977"/>
    </style:style>
    <style:style style:name="P27" style:family="paragraph" style:parent-style-name="Standard">
      <style:text-properties officeooo:rsid="01af756d" officeooo:paragraph-rsid="01af756d"/>
    </style:style>
    <style:style style:name="P28" style:family="paragraph" style:parent-style-name="Table_20_Contents">
      <style:paragraph-properties fo:text-align="left" style:justify-single-word="false"/>
      <style:text-properties officeooo:rsid="00f7eed7" officeooo:paragraph-rsid="012e8789"/>
    </style:style>
    <style:style style:name="P29" style:family="paragraph" style:parent-style-name="Standard">
      <style:text-properties officeooo:rsid="00ccde7a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>
      <style:text-properties officeooo:rsid="02116a0a" officeooo:paragraph-rsid="02156d29"/>
    </style:style>
    <style:style style:name="P32" style:family="paragraph" style:parent-style-name="Table_20_Header">
      <style:text-properties officeooo:paragraph-rsid="02156d29"/>
    </style:style>
    <style:style style:name="P33" style:family="paragraph" style:parent-style-name="Table_20_Header">
      <style:paragraph-properties fo:text-align="left" style:justify-single-word="false"/>
      <style:text-properties officeooo:rsid="02156d29" officeooo:paragraph-rsid="02156d29"/>
    </style:style>
    <style:style style:name="P34" style:family="paragraph" style:parent-style-name="Table_20_Contents">
      <style:text-properties officeooo:rsid="02138e0f" officeooo:paragraph-rsid="02156d29"/>
    </style:style>
    <style:style style:name="P35" style:family="paragraph" style:parent-style-name="Table_20_Contents">
      <style:paragraph-properties fo:text-align="left" style:justify-single-word="false"/>
      <style:text-properties officeooo:rsid="02156d29" officeooo:paragraph-rsid="02156d29"/>
    </style:style>
    <style:style style:name="P36" style:family="paragraph" style:parent-style-name="Table_20_Contents">
      <style:text-properties officeooo:rsid="02156d29" officeooo:paragraph-rsid="02156d29"/>
    </style:style>
    <style:style style:name="P37" style:family="paragraph" style:parent-style-name="Heading_20_2">
      <style:text-properties officeooo:paragraph-rsid="02156d29"/>
    </style:style>
    <style:style style:name="P38" style:family="paragraph" style:parent-style-name="Standard">
      <style:text-properties officeooo:rsid="02116a0a" officeooo:paragraph-rsid="02116a0a"/>
    </style:style>
    <style:style style:name="P39" style:family="paragraph" style:parent-style-name="Standard">
      <style:text-properties officeooo:rsid="0201cdb5" officeooo:paragraph-rsid="02116a0a"/>
    </style:style>
    <style:style style:name="P40" style:family="paragraph" style:parent-style-name="Standard">
      <style:text-properties officeooo:paragraph-rsid="02128068"/>
    </style:style>
    <style:style style:name="P41" style:family="paragraph" style:parent-style-name="Standard">
      <style:text-properties officeooo:paragraph-rsid="02138e0f"/>
    </style:style>
    <style:style style:name="P42" style:family="paragraph" style:parent-style-name="Standard">
      <style:text-properties officeooo:paragraph-rsid="0211e772"/>
    </style:style>
    <style:style style:name="P43" style:family="paragraph" style:parent-style-name="Standard">
      <style:text-properties officeooo:rsid="0211e772" officeooo:paragraph-rsid="0211e772"/>
    </style:style>
    <style:style style:name="P44" style:family="paragraph" style:parent-style-name="Standard">
      <style:text-properties officeooo:rsid="02116a0a" officeooo:paragraph-rsid="0211e772"/>
    </style:style>
    <style:style style:name="P45" style:family="paragraph" style:parent-style-name="Standard">
      <style:text-properties officeooo:rsid="0201cdb5" officeooo:paragraph-rsid="0216bb27"/>
    </style:style>
    <style:style style:name="P46" style:family="paragraph" style:parent-style-name="Standard">
      <style:text-properties fo:font-weight="normal" officeooo:rsid="0207719f" officeooo:paragraph-rsid="02128068" style:font-weight-asian="normal" style:font-weight-complex="normal"/>
    </style:style>
    <style:style style:name="P47" style:family="paragraph" style:parent-style-name="Standard">
      <style:text-properties officeooo:rsid="0201cdb5" officeooo:paragraph-rsid="0211e772"/>
    </style:style>
    <style:style style:name="P48" style:family="paragraph" style:parent-style-name="Standard">
      <style:text-properties officeooo:rsid="02037b48" officeooo:paragraph-rsid="0211e772"/>
    </style:style>
    <style:style style:name="P49" style:family="paragraph" style:parent-style-name="Standard">
      <style:text-properties officeooo:rsid="02116a0a" officeooo:paragraph-rsid="02128068"/>
    </style:style>
    <style:style style:name="P50" style:family="paragraph" style:parent-style-name="Standard">
      <style:text-properties officeooo:rsid="0211e772" officeooo:paragraph-rsid="02138e0f"/>
    </style:style>
    <style:style style:name="P51" style:family="paragraph" style:parent-style-name="Standard">
      <style:text-properties fo:font-weight="normal" officeooo:rsid="0207719f" officeooo:paragraph-rsid="02138e0f" style:font-weight-asian="normal" style:font-weight-complex="normal"/>
    </style:style>
    <style:style style:name="P52" style:family="paragraph" style:parent-style-name="Standard">
      <style:text-properties officeooo:rsid="0201cdb5" officeooo:paragraph-rsid="02138e0f"/>
    </style:style>
    <style:style style:name="P53" style:family="paragraph" style:parent-style-name="Standard">
      <style:text-properties officeooo:rsid="0201cdb5" officeooo:paragraph-rsid="02156d29"/>
    </style:style>
    <style:style style:name="P54" style:family="paragraph" style:parent-style-name="TalentHeader">
      <style:text-properties officeooo:paragraph-rsid="02156d29"/>
    </style:style>
    <style:style style:name="P55" style:family="paragraph" style:parent-style-name="Standard">
      <style:text-properties fo:font-weight="normal" officeooo:rsid="0207f7f5" officeooo:paragraph-rsid="0216bb27" style:font-weight-asian="normal" style:font-weight-complex="normal"/>
    </style:style>
    <style:style style:name="P56" style:family="paragraph" style:parent-style-name="Standard">
      <style:text-properties officeooo:paragraph-rsid="0216bb27"/>
    </style:style>
    <style:style style:name="P57" style:family="paragraph" style:parent-style-name="Standard">
      <style:text-properties officeooo:rsid="02037b48" officeooo:paragraph-rsid="0216bb27"/>
    </style:style>
    <style:style style:name="P58" style:family="paragraph" style:parent-style-name="Standard">
      <style:text-properties officeooo:rsid="02037b48" officeooo:paragraph-rsid="02156d29"/>
    </style:style>
    <style:style style:name="P59" style:family="paragraph" style:parent-style-name="Standard">
      <style:text-properties officeooo:rsid="02156d29" officeooo:paragraph-rsid="02156d29"/>
    </style:style>
    <style:style style:name="P60" style:family="paragraph" style:parent-style-name="Standard">
      <style:text-properties officeooo:rsid="0201cdb5" officeooo:paragraph-rsid="02183ad5"/>
    </style:style>
    <style:style style:name="P61" style:family="paragraph" style:parent-style-name="TalentHeader">
      <style:text-properties officeooo:paragraph-rsid="02183ad5"/>
    </style:style>
    <style:style style:name="P62" style:family="paragraph" style:parent-style-name="Standard">
      <style:text-properties fo:font-weight="normal" officeooo:rsid="0207f7f5" officeooo:paragraph-rsid="02183ad5" style:font-weight-asian="normal" style:font-weight-complex="normal"/>
    </style:style>
    <style:style style:name="P63" style:family="paragraph" style:parent-style-name="Standard">
      <style:text-properties officeooo:rsid="02116a0a" officeooo:paragraph-rsid="02183ad5"/>
    </style:style>
    <style:style style:name="P64" style:family="paragraph" style:parent-style-name="Standard">
      <style:text-properties officeooo:rsid="0201cdb5" officeooo:paragraph-rsid="020fda2a"/>
    </style:style>
    <style:style style:name="P65" style:family="paragraph" style:parent-style-name="TalentHeader">
      <style:text-properties officeooo:paragraph-rsid="020fda2a"/>
    </style:style>
    <style:style style:name="P66" style:family="paragraph" style:parent-style-name="Standard">
      <style:text-properties fo:font-weight="normal" officeooo:rsid="0201cdb5" officeooo:paragraph-rsid="020fda2a" style:font-weight-asian="normal" style:font-weight-complex="normal"/>
    </style:style>
    <style:style style:name="P67" style:family="paragraph" style:parent-style-name="Standard">
      <style:text-properties officeooo:paragraph-rsid="020fda2a"/>
    </style:style>
    <style:style style:name="P68" style:family="paragraph" style:parent-style-name="Standard">
      <style:text-properties officeooo:rsid="02037b48" officeooo:paragraph-rsid="020fda2a"/>
    </style:style>
    <style:style style:name="P69" style:family="paragraph" style:parent-style-name="Standard">
      <style:text-properties fo:font-weight="normal" officeooo:rsid="0207f7f5" officeooo:paragraph-rsid="020fda2a" style:font-weight-asian="normal" style:font-weight-complex="normal"/>
    </style:style>
    <style:style style:name="P70" style:family="paragraph" style:parent-style-name="TalentHeader">
      <style:text-properties officeooo:rsid="0202da41" officeooo:paragraph-rsid="02039a7f"/>
    </style:style>
    <style:style style:name="P71" style:family="paragraph" style:parent-style-name="Standard">
      <style:text-properties fo:font-weight="normal" officeooo:rsid="0201cdb5" officeooo:paragraph-rsid="02039a7f" style:font-weight-asian="normal" style:font-weight-complex="normal"/>
    </style:style>
    <style:style style:name="P72" style:family="paragraph" style:parent-style-name="Standard">
      <style:text-properties fo:font-weight="normal" officeooo:rsid="02037b48" officeooo:paragraph-rsid="02039a7f" style:font-weight-asian="normal" style:font-weight-complex="normal"/>
    </style:style>
    <style:style style:name="P73" style:family="paragraph" style:parent-style-name="Standard">
      <style:text-properties officeooo:paragraph-rsid="02039a7f"/>
    </style:style>
    <style:style style:name="P74" style:family="paragraph" style:parent-style-name="Standard">
      <style:text-properties officeooo:rsid="02039a7f" officeooo:paragraph-rsid="02039a7f"/>
    </style:style>
    <style:style style:name="P75" style:family="paragraph" style:parent-style-name="Standard">
      <style:text-properties fo:font-weight="normal" officeooo:rsid="0207f7f5" officeooo:paragraph-rsid="02084106" style:font-weight-asian="normal" style:font-weight-complex="normal"/>
    </style:style>
    <style:style style:name="P76" style:family="paragraph" style:parent-style-name="Standard">
      <style:text-properties officeooo:rsid="0201cdb5" officeooo:paragraph-rsid="02039a7f"/>
    </style:style>
    <style:style style:name="P77" style:family="paragraph" style:parent-style-name="Standard">
      <style:text-properties fo:font-weight="normal" officeooo:rsid="0207719f" officeooo:paragraph-rsid="0207719f" style:font-weight-asian="normal" style:font-weight-complex="normal"/>
    </style:style>
    <style:style style:name="P78" style:family="paragraph" style:parent-style-name="Standard">
      <style:text-properties officeooo:paragraph-rsid="0207719f"/>
    </style:style>
    <style:style style:name="P79" style:family="paragraph" style:parent-style-name="Standard">
      <style:text-properties officeooo:rsid="0201cdb5" officeooo:paragraph-rsid="0207719f"/>
    </style:style>
    <style:style style:name="P80" style:family="paragraph" style:parent-style-name="Standard">
      <style:text-properties officeooo:rsid="0207f7f5" officeooo:paragraph-rsid="020e1050"/>
    </style:style>
    <style:style style:name="P81" style:family="paragraph" style:parent-style-name="Standard">
      <style:text-properties officeooo:rsid="02037b48" officeooo:paragraph-rsid="02084106"/>
    </style:style>
    <style:style style:name="P82" style:family="paragraph" style:parent-style-name="Standard">
      <style:text-properties officeooo:rsid="0201cdb5" officeooo:paragraph-rsid="02084106"/>
    </style:style>
    <style:style style:name="P83" style:family="paragraph" style:parent-style-name="Standard">
      <style:text-properties officeooo:rsid="0201cdb5" officeooo:paragraph-rsid="0201cdb5"/>
    </style:style>
    <style:style style:name="P84" style:family="paragraph" style:parent-style-name="TalentHeader">
      <style:text-properties officeooo:paragraph-rsid="0207719f"/>
    </style:style>
    <style:style style:name="P85" style:family="paragraph" style:parent-style-name="Standard">
      <style:text-properties fo:font-weight="normal" officeooo:rsid="0207f7f5" officeooo:paragraph-rsid="0207f7f5" style:font-weight-asian="normal" style:font-weight-complex="normal"/>
    </style:style>
    <style:style style:name="P86" style:family="paragraph" style:parent-style-name="Standard">
      <style:text-properties fo:font-weight="normal" officeooo:rsid="02059233" officeooo:paragraph-rsid="020e1050" style:font-weight-asian="normal" style:font-weight-complex="normal"/>
    </style:style>
    <style:style style:name="P87" style:family="paragraph" style:parent-style-name="Standard">
      <style:text-properties fo:font-weight="normal" officeooo:rsid="0207719f" officeooo:paragraph-rsid="02084106" style:font-weight-asian="normal" style:font-weight-complex="normal"/>
    </style:style>
    <style:style style:name="P88" style:family="paragraph" style:parent-style-name="Standard">
      <style:text-properties fo:font-weight="normal" officeooo:rsid="0201cdb5" officeooo:paragraph-rsid="020a979f" style:font-weight-asian="normal" style:font-weight-complex="normal"/>
    </style:style>
    <style:style style:name="P89" style:family="paragraph" style:parent-style-name="Standard">
      <style:text-properties fo:font-weight="normal" officeooo:rsid="0201cdb5" officeooo:paragraph-rsid="0209225e" style:font-weight-asian="normal" style:font-weight-complex="normal"/>
    </style:style>
    <style:style style:name="P90" style:family="paragraph" style:parent-style-name="Standard">
      <style:text-properties fo:font-weight="normal" officeooo:rsid="0207f7f5" officeooo:paragraph-rsid="020e1050" style:font-weight-asian="normal" style:font-weight-complex="normal"/>
    </style:style>
    <style:style style:name="P91" style:family="paragraph" style:parent-style-name="Standard">
      <style:text-properties fo:font-weight="normal" officeooo:rsid="0201cdb5" officeooo:paragraph-rsid="0207719f" style:font-weight-asian="normal" style:font-weight-complex="normal"/>
    </style:style>
    <style:style style:name="P92" style:family="paragraph" style:parent-style-name="Standard">
      <style:text-properties officeooo:paragraph-rsid="0201cdb5"/>
    </style:style>
    <style:style style:name="P93" style:family="paragraph" style:parent-style-name="Standard">
      <style:text-properties officeooo:rsid="013cfc33" officeooo:paragraph-rsid="0201cdb5"/>
    </style:style>
    <style:style style:name="P94" style:family="paragraph" style:parent-style-name="Heading_20_1">
      <style:paragraph-properties fo:break-before="page"/>
      <style:text-properties officeooo:paragraph-rsid="0149ceb2"/>
    </style:style>
    <style:style style:name="P95" style:family="paragraph" style:parent-style-name="Heading_20_2">
      <style:text-properties fo:color="#080914" loext:opacity="100%" officeooo:paragraph-rsid="015530ac"/>
    </style:style>
    <style:style style:name="P96" style:family="paragraph" style:parent-style-name="TalentHeader">
      <style:text-properties officeooo:paragraph-rsid="0159bb1a"/>
    </style:style>
    <style:style style:name="P97" style:family="paragraph" style:parent-style-name="Standard">
      <style:text-properties officeooo:rsid="014b6f77" officeooo:paragraph-rsid="0159bb1a"/>
    </style:style>
    <style:style style:name="P98" style:family="paragraph" style:parent-style-name="TalentHeader">
      <style:text-properties officeooo:rsid="01503b34" officeooo:paragraph-rsid="0159bb1a"/>
    </style:style>
    <style:style style:name="P99" style:family="paragraph" style:parent-style-name="Standard">
      <style:text-properties officeooo:rsid="015530ac" officeooo:paragraph-rsid="0159bb1a"/>
    </style:style>
    <style:style style:name="P100" style:family="paragraph" style:parent-style-name="Standard">
      <style:text-properties officeooo:rsid="014b6f77" officeooo:paragraph-rsid="014b6f77"/>
    </style:style>
    <style:style style:name="P101" style:family="paragraph" style:parent-style-name="Heading_20_2">
      <style:paragraph-properties fo:break-before="page"/>
      <style:text-properties officeooo:rsid="0149ceb2" officeooo:paragraph-rsid="0149ceb2"/>
    </style:style>
    <style:style style:name="P102" style:family="paragraph" style:parent-style-name="Standard">
      <style:text-properties officeooo:rsid="013cfc33" officeooo:paragraph-rsid="0157ba6e"/>
    </style:style>
    <style:style style:name="P103" style:family="paragraph" style:parent-style-name="Standard">
      <style:text-properties officeooo:paragraph-rsid="013cfc33"/>
    </style:style>
    <style:style style:name="P104" style:family="paragraph" style:parent-style-name="Standard">
      <style:text-properties officeooo:rsid="013cfc33" officeooo:paragraph-rsid="013cfc33"/>
    </style:style>
    <style:style style:name="P105" style:family="paragraph" style:parent-style-name="Standard">
      <style:text-properties fo:font-weight="bold" officeooo:rsid="01d52328" officeooo:paragraph-rsid="01d52328" style:font-weight-asian="bold" style:font-weight-complex="bold"/>
    </style:style>
    <style:style style:name="P106" style:family="paragraph" style:parent-style-name="Standard">
      <style:text-properties officeooo:paragraph-rsid="01d36cea"/>
    </style:style>
    <style:style style:name="P107" style:family="paragraph" style:parent-style-name="Standard">
      <style:text-properties officeooo:rsid="013cfc33" officeooo:paragraph-rsid="01d36cea"/>
    </style:style>
    <style:style style:name="P108" style:family="paragraph" style:parent-style-name="Standard">
      <style:text-properties fo:font-weight="bold" officeooo:rsid="0144037e" officeooo:paragraph-rsid="0144037e" style:font-weight-asian="bold" style:font-weight-complex="bold"/>
    </style:style>
    <style:style style:name="P109" style:family="paragraph" style:parent-style-name="Standard">
      <style:text-properties officeooo:rsid="01405cf9" officeooo:paragraph-rsid="01405cf9"/>
    </style:style>
    <style:style style:name="P110" style:family="paragraph" style:parent-style-name="Standard">
      <style:text-properties officeooo:rsid="013cfc33" officeooo:paragraph-rsid="020199af"/>
    </style:style>
    <style:style style:name="P111" style:family="paragraph" style:parent-style-name="TalentHeader">
      <style:text-properties officeooo:paragraph-rsid="020199af"/>
    </style:style>
    <style:style style:name="P112" style:family="paragraph" style:parent-style-name="Standard">
      <style:text-properties fo:font-weight="bold" officeooo:rsid="01d52328" officeooo:paragraph-rsid="020199af" style:font-weight-asian="bold" style:font-weight-complex="bold"/>
    </style:style>
    <style:style style:name="P113" style:family="paragraph" style:parent-style-name="Standard">
      <style:text-properties officeooo:rsid="013c6743" officeooo:paragraph-rsid="013cfc33"/>
    </style:style>
    <style:style style:name="P114" style:family="paragraph" style:parent-style-name="Standard">
      <style:text-properties officeooo:rsid="013cfc33" officeooo:paragraph-rsid="01d52328"/>
    </style:style>
    <style:style style:name="P115" style:family="paragraph" style:parent-style-name="Standard">
      <style:text-properties officeooo:rsid="013cfc33" officeooo:paragraph-rsid="014145a3"/>
    </style:style>
    <style:style style:name="P116" style:family="paragraph" style:parent-style-name="TalentHeader">
      <style:text-properties officeooo:rsid="01a9c8bb" officeooo:paragraph-rsid="01a9c8bb"/>
    </style:style>
    <style:style style:name="P117" style:family="paragraph" style:parent-style-name="Standard">
      <style:text-properties officeooo:rsid="013cfc33" officeooo:paragraph-rsid="01a9c8bb"/>
    </style:style>
    <style:style style:name="P118" style:family="paragraph" style:parent-style-name="TalentHeader">
      <style:text-properties officeooo:rsid="0157ba6e" officeooo:paragraph-rsid="0157ba6e"/>
    </style:style>
    <style:style style:name="P119" style:family="paragraph" style:parent-style-name="Standard">
      <style:text-properties officeooo:rsid="013cfc33" officeooo:paragraph-rsid="01a911f0"/>
    </style:style>
    <style:style style:name="P120" style:family="paragraph" style:parent-style-name="Standard">
      <style:text-properties officeooo:rsid="013cfc33" officeooo:paragraph-rsid="013f71ff"/>
    </style:style>
    <style:style style:name="P121" style:family="paragraph" style:parent-style-name="Standard">
      <style:text-properties officeooo:rsid="013cfc33" officeooo:paragraph-rsid="01405cf9"/>
    </style:style>
    <style:style style:name="P122" style:family="paragraph" style:parent-style-name="Standard">
      <style:text-properties officeooo:rsid="013cfc33" officeooo:paragraph-rsid="013c6743"/>
    </style:style>
    <style:style style:name="P123" style:family="paragraph" style:parent-style-name="Heading_20_2">
      <style:paragraph-properties fo:break-before="page"/>
      <style:text-properties officeooo:rsid="01766d40" officeooo:paragraph-rsid="01766d40"/>
    </style:style>
    <style:style style:name="P124" style:family="paragraph" style:parent-style-name="Standard">
      <style:text-properties officeooo:rsid="01766d40" officeooo:paragraph-rsid="01766d40"/>
    </style:style>
    <style:style style:name="P125" style:family="paragraph" style:parent-style-name="TalentHeader">
      <style:text-properties officeooo:rsid="015e34d3" officeooo:paragraph-rsid="015e34d3"/>
    </style:style>
    <style:style style:name="P126" style:family="paragraph" style:parent-style-name="Standard">
      <style:text-properties officeooo:rsid="0159f948" officeooo:paragraph-rsid="015e34d3"/>
    </style:style>
    <style:style style:name="P127" style:family="paragraph" style:parent-style-name="Standard">
      <style:text-properties officeooo:rsid="015b2edc" officeooo:paragraph-rsid="015e34d3"/>
    </style:style>
    <style:style style:name="P128" style:family="paragraph" style:parent-style-name="Standard">
      <style:text-properties officeooo:rsid="015c1384" officeooo:paragraph-rsid="015e34d3"/>
    </style:style>
    <style:style style:name="P129" style:family="paragraph" style:parent-style-name="List_20_Paragraph" style:list-style-name="L3">
      <style:text-properties officeooo:rsid="015e34d3" officeooo:paragraph-rsid="0170ba8a"/>
    </style:style>
    <style:style style:name="P130" style:family="paragraph" style:parent-style-name="List_20_Paragraph">
      <style:text-properties officeooo:rsid="015e34d3" officeooo:paragraph-rsid="015e34d3"/>
    </style:style>
    <style:style style:name="P131" style:family="paragraph" style:parent-style-name="Standard">
      <style:text-properties officeooo:rsid="0159f948" officeooo:paragraph-rsid="01633829"/>
    </style:style>
    <style:style style:name="P132" style:family="paragraph" style:parent-style-name="Standard">
      <style:text-properties officeooo:rsid="015b2edc" officeooo:paragraph-rsid="01633829"/>
    </style:style>
    <style:style style:name="P133" style:family="paragraph" style:parent-style-name="Standard">
      <style:text-properties officeooo:rsid="015b2edc" officeooo:paragraph-rsid="0177c544"/>
    </style:style>
    <style:style style:name="P134" style:family="paragraph" style:parent-style-name="List_20_Paragraph" style:list-style-name="L3">
      <style:text-properties officeooo:rsid="01633829" officeooo:paragraph-rsid="01633829"/>
    </style:style>
    <style:style style:name="P135" style:family="paragraph" style:parent-style-name="List_20_Paragraph">
      <style:text-properties officeooo:rsid="015c1384" officeooo:paragraph-rsid="015e34d3"/>
    </style:style>
    <style:style style:name="P136" style:family="paragraph" style:parent-style-name="TalentHeader">
      <style:text-properties officeooo:rsid="015c1384" officeooo:paragraph-rsid="015c1384"/>
    </style:style>
    <style:style style:name="P137" style:family="paragraph" style:parent-style-name="Standard">
      <style:text-properties officeooo:rsid="0159f948" officeooo:paragraph-rsid="015c1384"/>
    </style:style>
    <style:style style:name="P138" style:family="paragraph" style:parent-style-name="Standard">
      <style:text-properties officeooo:rsid="015b2edc" officeooo:paragraph-rsid="015c1384"/>
    </style:style>
    <style:style style:name="P139" style:family="paragraph" style:parent-style-name="Standard">
      <style:text-properties officeooo:rsid="015c1384" officeooo:paragraph-rsid="015c1384"/>
    </style:style>
    <style:style style:name="P140" style:family="paragraph" style:parent-style-name="List_20_Paragraph" style:list-style-name="L3">
      <style:text-properties officeooo:rsid="01608c61" officeooo:paragraph-rsid="01608c61"/>
    </style:style>
    <style:style style:name="P141" style:family="paragraph" style:parent-style-name="List_20_Paragraph" style:list-style-name="L3">
      <style:text-properties officeooo:rsid="015c1384" officeooo:paragraph-rsid="015c1384"/>
    </style:style>
    <style:style style:name="P142" style:family="paragraph" style:parent-style-name="List_20_Paragraph" style:list-style-name="L3">
      <style:text-properties officeooo:rsid="01611b20" officeooo:paragraph-rsid="01611b20"/>
    </style:style>
    <style:style style:name="P143" style:family="paragraph" style:parent-style-name="List_20_Paragraph">
      <style:text-properties officeooo:rsid="015c1384" officeooo:paragraph-rsid="015c1384"/>
    </style:style>
    <style:style style:name="P144" style:family="paragraph" style:parent-style-name="TalentHeader">
      <style:text-properties officeooo:rsid="015b2edc" officeooo:paragraph-rsid="015b2edc"/>
    </style:style>
    <style:style style:name="P145" style:family="paragraph" style:parent-style-name="Standard">
      <style:text-properties officeooo:rsid="0159f948" officeooo:paragraph-rsid="015b2edc"/>
    </style:style>
    <style:style style:name="P146" style:family="paragraph" style:parent-style-name="Standard">
      <style:text-properties officeooo:rsid="015b2edc" officeooo:paragraph-rsid="015b2edc"/>
    </style:style>
    <style:style style:name="P147" style:family="paragraph" style:parent-style-name="Standard">
      <style:text-properties officeooo:rsid="015bf31d" officeooo:paragraph-rsid="015bf31d"/>
    </style:style>
    <style:style style:name="P148" style:family="paragraph" style:parent-style-name="List_20_Paragraph" style:list-style-name="L3">
      <style:text-properties officeooo:rsid="015b2edc" officeooo:paragraph-rsid="015b2edc"/>
    </style:style>
    <style:style style:name="P149" style:family="paragraph" style:parent-style-name="List_20_Paragraph" style:list-style-name="L3">
      <style:text-properties officeooo:rsid="015b2edc" officeooo:paragraph-rsid="01633829"/>
    </style:style>
    <style:style style:name="P150" style:family="paragraph" style:parent-style-name="Standard">
      <style:text-properties officeooo:rsid="0159f948" officeooo:paragraph-rsid="0159f948"/>
    </style:style>
    <style:style style:name="P151" style:family="paragraph" style:parent-style-name="Standard">
      <style:text-properties officeooo:rsid="0159f948" officeooo:paragraph-rsid="015e0bb9"/>
    </style:style>
    <style:style style:name="P152" style:family="paragraph" style:parent-style-name="Standard">
      <style:text-properties officeooo:paragraph-rsid="013c6743"/>
    </style:style>
    <style:style style:name="P153" style:family="paragraph" style:parent-style-name="TalentHeader">
      <style:text-properties officeooo:rsid="01738eff" officeooo:paragraph-rsid="01738eff"/>
    </style:style>
    <style:style style:name="P154" style:family="paragraph" style:parent-style-name="Standard">
      <style:text-properties officeooo:rsid="0159f948" officeooo:paragraph-rsid="01738eff"/>
    </style:style>
    <style:style style:name="P155" style:family="paragraph" style:parent-style-name="Standard">
      <style:text-properties officeooo:rsid="015b2edc" officeooo:paragraph-rsid="01738eff"/>
    </style:style>
    <style:style style:name="P156" style:family="paragraph" style:parent-style-name="Standard">
      <style:text-properties officeooo:rsid="0174db33" officeooo:paragraph-rsid="0174db33"/>
    </style:style>
    <style:style style:name="P157" style:family="paragraph" style:parent-style-name="Standard">
      <style:text-properties officeooo:rsid="013c6743" officeooo:paragraph-rsid="013c6743"/>
    </style:style>
    <style:style style:name="P158" style:family="paragraph" style:parent-style-name="TalentHeader">
      <style:text-properties officeooo:rsid="015e0bb9" officeooo:paragraph-rsid="015e0bb9"/>
    </style:style>
    <style:style style:name="P159" style:family="paragraph" style:parent-style-name="Standard">
      <style:text-properties officeooo:rsid="015b2edc" officeooo:paragraph-rsid="016dddb2"/>
    </style:style>
    <style:style style:name="P160" style:family="paragraph" style:parent-style-name="Standard">
      <style:text-properties officeooo:rsid="015bf31d" officeooo:paragraph-rsid="015e0bb9"/>
    </style:style>
    <style:style style:name="P161" style:family="paragraph" style:parent-style-name="Standard">
      <style:text-properties officeooo:rsid="015e0bb9" officeooo:paragraph-rsid="015e0bb9"/>
    </style:style>
    <style:style style:name="P162" style:family="paragraph" style:parent-style-name="List_20_Paragraph" style:list-style-name="L3">
      <style:text-properties officeooo:rsid="015c1384" officeooo:paragraph-rsid="016e3d94"/>
    </style:style>
    <style:style style:name="P163" style:family="paragraph" style:parent-style-name="List_20_Paragraph" style:list-style-name="L3">
      <style:text-properties officeooo:rsid="01b589aa" officeooo:paragraph-rsid="01b589aa"/>
    </style:style>
    <style:style style:name="P164" style:family="paragraph" style:parent-style-name="List_20_Paragraph" style:list-style-name="L3">
      <style:text-properties officeooo:rsid="01d7d05a" officeooo:paragraph-rsid="01d7d05a"/>
    </style:style>
    <style:style style:name="P165" style:family="paragraph" style:parent-style-name="Standard">
      <style:text-properties officeooo:rsid="013c6743" officeooo:paragraph-rsid="015e0bb9"/>
    </style:style>
    <style:style style:name="P166" style:family="paragraph" style:parent-style-name="TalentHeader">
      <style:text-properties officeooo:rsid="019935c4" officeooo:paragraph-rsid="019935c4"/>
    </style:style>
    <style:style style:name="P167" style:family="paragraph" style:parent-style-name="Standard">
      <style:text-properties officeooo:rsid="0159f948" officeooo:paragraph-rsid="019935c4"/>
    </style:style>
    <style:style style:name="P168" style:family="paragraph" style:parent-style-name="Standard">
      <style:text-properties officeooo:rsid="015b2edc" officeooo:paragraph-rsid="019935c4"/>
    </style:style>
    <style:style style:name="P169" style:family="paragraph" style:parent-style-name="List_20_Paragraph" style:list-style-name="L3">
      <style:text-properties officeooo:rsid="019935c4" officeooo:paragraph-rsid="019935c4"/>
    </style:style>
    <style:style style:name="P170" style:family="paragraph" style:parent-style-name="TalentHeader">
      <style:text-properties officeooo:rsid="0198b2aa" officeooo:paragraph-rsid="0198b2aa"/>
    </style:style>
    <style:style style:name="P171" style:family="paragraph" style:parent-style-name="Standard">
      <style:text-properties officeooo:rsid="0159f948" officeooo:paragraph-rsid="0198b2aa"/>
    </style:style>
    <style:style style:name="P172" style:family="paragraph" style:parent-style-name="Standard">
      <style:text-properties officeooo:rsid="015b2edc" officeooo:paragraph-rsid="0198b2aa"/>
    </style:style>
    <style:style style:name="P173" style:family="paragraph" style:parent-style-name="Standard">
      <style:text-properties officeooo:rsid="015bf31d" officeooo:paragraph-rsid="0198b2aa"/>
    </style:style>
    <style:style style:name="P174" style:family="paragraph" style:parent-style-name="List_20_Paragraph" style:list-style-name="L3">
      <style:text-properties officeooo:rsid="0198b2aa" officeooo:paragraph-rsid="0198b2aa"/>
    </style:style>
    <style:style style:name="P175" style:family="paragraph" style:parent-style-name="Standard">
      <style:text-properties officeooo:rsid="0159f948" officeooo:paragraph-rsid="015bf31d"/>
    </style:style>
    <style:style style:name="P176" style:family="paragraph" style:parent-style-name="Standard">
      <style:text-properties officeooo:rsid="015b2edc" officeooo:paragraph-rsid="015bf31d"/>
    </style:style>
    <style:style style:name="P177" style:family="paragraph" style:parent-style-name="List_20_Paragraph" style:list-style-name="L3">
      <style:text-properties officeooo:rsid="015e0bb9" officeooo:paragraph-rsid="01b9917d"/>
    </style:style>
    <style:style style:name="P178" style:family="paragraph" style:parent-style-name="Standard">
      <style:text-properties officeooo:rsid="013c6743" officeooo:paragraph-rsid="01675787"/>
    </style:style>
    <style:style style:name="P179" style:family="paragraph" style:parent-style-name="TalentHeader">
      <style:text-properties officeooo:rsid="016849bf" officeooo:paragraph-rsid="016849bf"/>
    </style:style>
    <style:style style:name="P180" style:family="paragraph" style:parent-style-name="Standard">
      <style:text-properties officeooo:rsid="0159f948" officeooo:paragraph-rsid="01675787"/>
    </style:style>
    <style:style style:name="P181" style:family="paragraph" style:parent-style-name="Standard">
      <style:text-properties officeooo:rsid="015b2edc" officeooo:paragraph-rsid="01675787"/>
    </style:style>
    <style:style style:name="P182" style:family="paragraph" style:parent-style-name="List_20_Paragraph" style:list-style-name="L3">
      <style:text-properties officeooo:rsid="015c1384" officeooo:paragraph-rsid="01675787"/>
    </style:style>
    <style:style style:name="P183" style:family="paragraph" style:parent-style-name="List_20_Paragraph" style:list-style-name="L3">
      <style:text-properties officeooo:rsid="016bdffd" officeooo:paragraph-rsid="016bdffd"/>
    </style:style>
    <style:style style:name="P184" style:family="paragraph" style:parent-style-name="List_20_Paragraph">
      <style:text-properties officeooo:rsid="016bdffd" officeooo:paragraph-rsid="016bdffd"/>
    </style:style>
    <style:style style:name="P185" style:family="paragraph" style:parent-style-name="TalentHeader">
      <style:text-properties officeooo:rsid="016fb640" officeooo:paragraph-rsid="016fb640"/>
    </style:style>
    <style:style style:name="P186" style:family="paragraph" style:parent-style-name="Standard">
      <style:text-properties officeooo:rsid="0159f948" officeooo:paragraph-rsid="016fb640"/>
    </style:style>
    <style:style style:name="P187" style:family="paragraph" style:parent-style-name="Standard">
      <style:text-properties officeooo:rsid="015b2edc" officeooo:paragraph-rsid="016fb640"/>
    </style:style>
    <style:style style:name="P188" style:family="paragraph" style:parent-style-name="Standard">
      <style:text-properties officeooo:rsid="0170ba8a" officeooo:paragraph-rsid="0170ba8a"/>
    </style:style>
    <style:style style:name="P189" style:family="paragraph" style:parent-style-name="Standard">
      <style:text-properties officeooo:rsid="0170ba8a" officeooo:paragraph-rsid="01738eff"/>
    </style:style>
    <style:style style:name="P190" style:family="paragraph" style:parent-style-name="List_20_Paragraph" style:list-style-name="L3">
      <style:text-properties officeooo:rsid="0170ba8a" officeooo:paragraph-rsid="0170ba8a"/>
    </style:style>
    <style:style style:name="P191" style:family="paragraph" style:parent-style-name="List_20_Paragraph">
      <style:text-properties officeooo:rsid="016bdffd" officeooo:paragraph-rsid="019732ab"/>
    </style:style>
    <style:style style:name="P192" style:family="paragraph" style:parent-style-name="TalentHeader">
      <style:text-properties officeooo:rsid="019732ab" officeooo:paragraph-rsid="019732ab"/>
    </style:style>
    <style:style style:name="P193" style:family="paragraph" style:parent-style-name="Standard">
      <style:text-properties officeooo:rsid="0159f948" officeooo:paragraph-rsid="019732ab"/>
    </style:style>
    <style:style style:name="P194" style:family="paragraph" style:parent-style-name="Standard">
      <style:text-properties officeooo:rsid="015b2edc" officeooo:paragraph-rsid="019732ab"/>
    </style:style>
    <style:style style:name="P195" style:family="paragraph" style:parent-style-name="Standard">
      <style:text-properties officeooo:rsid="01716fea" officeooo:paragraph-rsid="019732ab"/>
    </style:style>
    <style:style style:name="P196" style:family="paragraph" style:parent-style-name="List_20_Paragraph" style:list-style-name="L3">
      <style:text-properties officeooo:rsid="0197dbd1" officeooo:paragraph-rsid="0197dbd1"/>
    </style:style>
    <style:style style:name="P197" style:family="paragraph" style:parent-style-name="Standard">
      <style:text-properties officeooo:rsid="016bdffd" officeooo:paragraph-rsid="01675787"/>
    </style:style>
    <style:style style:name="P198" style:family="paragraph" style:parent-style-name="TalentHeader">
      <style:text-properties officeooo:rsid="017155ad" officeooo:paragraph-rsid="017155ad"/>
    </style:style>
    <style:style style:name="P199" style:family="paragraph" style:parent-style-name="Standard">
      <style:text-properties officeooo:rsid="0159f948" officeooo:paragraph-rsid="017155ad"/>
    </style:style>
    <style:style style:name="P200" style:family="paragraph" style:parent-style-name="Standard">
      <style:text-properties officeooo:rsid="015b2edc" officeooo:paragraph-rsid="017155ad"/>
    </style:style>
    <style:style style:name="P201" style:family="paragraph" style:parent-style-name="Standard">
      <style:text-properties officeooo:rsid="01716fea" officeooo:paragraph-rsid="01716fea"/>
    </style:style>
    <style:style style:name="P202" style:family="paragraph" style:parent-style-name="List_20_Paragraph" style:list-style-name="L3">
      <style:text-properties officeooo:rsid="01716fea" officeooo:paragraph-rsid="01716fea"/>
    </style:style>
    <style:style style:name="P203" style:family="paragraph" style:parent-style-name="Standard">
      <style:text-properties officeooo:paragraph-rsid="01675787"/>
    </style:style>
    <style:style style:name="P204" style:family="paragraph" style:parent-style-name="Standard">
      <style:text-properties officeooo:paragraph-rsid="01192e68"/>
    </style:style>
    <style:style style:name="P205" style:family="paragraph" style:parent-style-name="Heading_20_2">
      <style:text-properties officeooo:rsid="01127a28" officeooo:paragraph-rsid="01212211"/>
    </style:style>
    <style:style style:name="P206" style:family="paragraph" style:parent-style-name="Standard">
      <style:text-properties officeooo:rsid="01192e68" officeooo:paragraph-rsid="017cc684"/>
    </style:style>
    <style:style style:name="P207" style:family="paragraph" style:parent-style-name="Standard">
      <style:text-properties officeooo:rsid="0114a605" officeooo:paragraph-rsid="01192e68"/>
    </style:style>
    <style:style style:name="P208" style:family="paragraph" style:parent-style-name="Heading_20_2">
      <style:text-properties officeooo:rsid="01127a28" officeooo:paragraph-rsid="01192e68"/>
    </style:style>
    <style:style style:name="P209" style:family="paragraph" style:parent-style-name="Standard">
      <style:text-properties officeooo:rsid="01192e68" officeooo:paragraph-rsid="01192e68"/>
    </style:style>
    <style:style style:name="P210" style:family="paragraph" style:parent-style-name="Standard">
      <style:text-properties officeooo:rsid="01127a28" officeooo:paragraph-rsid="01192e68"/>
    </style:style>
    <style:style style:name="P211" style:family="paragraph" style:parent-style-name="Heading_20_2">
      <style:text-properties officeooo:paragraph-rsid="0190cc1c"/>
    </style:style>
    <style:style style:name="P212" style:family="paragraph" style:parent-style-name="Standard">
      <style:text-properties officeooo:rsid="017cc684" officeooo:paragraph-rsid="0190cc1c"/>
    </style:style>
    <style:style style:name="P213" style:family="paragraph" style:parent-style-name="Heading_20_2">
      <style:text-properties officeooo:rsid="00c34092" officeooo:paragraph-rsid="01212211"/>
    </style:style>
    <style:style style:name="P214" style:family="paragraph" style:parent-style-name="Standard">
      <style:text-properties officeooo:rsid="01192e68" officeooo:paragraph-rsid="01212211"/>
    </style:style>
    <style:style style:name="P215" style:family="paragraph" style:parent-style-name="List_20_Paragraph" style:list-style-name="L4">
      <style:text-properties fo:font-weight="normal" style:font-weight-asian="normal" style:font-weight-complex="normal"/>
    </style:style>
    <style:style style:name="P216" style:family="paragraph" style:parent-style-name="List_20_Paragraph" style:list-style-name="L4">
      <style:text-properties fo:font-weight="normal" officeooo:rsid="01c118ce" officeooo:paragraph-rsid="01c118ce" style:font-weight-asian="normal" style:font-weight-complex="normal"/>
    </style:style>
    <style:style style:name="P217" style:family="paragraph" style:parent-style-name="Standard">
      <style:text-properties officeooo:rsid="0114a605" officeooo:paragraph-rsid="01212211"/>
    </style:style>
    <style:style style:name="P218" style:family="paragraph" style:parent-style-name="Heading_20_2">
      <style:text-properties officeooo:rsid="01fb52c4" officeooo:paragraph-rsid="01fb52c4"/>
    </style:style>
    <style:style style:name="P219" style:family="paragraph" style:parent-style-name="Standard">
      <style:text-properties officeooo:rsid="011a8ea4" officeooo:paragraph-rsid="011a8ea4"/>
    </style:style>
    <style:style style:name="P220" style:family="paragraph" style:parent-style-name="List_20_Paragraph" style:list-style-name="L5"/>
    <style:style style:name="P221" style:family="paragraph" style:parent-style-name="Heading_20_1">
      <style:text-properties officeooo:paragraph-rsid="0091342b"/>
    </style:style>
    <style:style style:name="P222" style:family="paragraph" style:parent-style-name="Heading_20_2">
      <style:text-properties officeooo:rsid="011b3104" officeooo:paragraph-rsid="011b3104"/>
    </style:style>
    <style:style style:name="P223" style:family="paragraph" style:parent-style-name="Standard">
      <style:text-properties officeooo:rsid="011b3104" officeooo:paragraph-rsid="011b3104"/>
    </style:style>
    <style:style style:name="P224" style:family="paragraph" style:parent-style-name="Heading_20_2">
      <style:text-properties officeooo:paragraph-rsid="01212211"/>
    </style:style>
    <style:style style:name="P225" style:family="paragraph" style:parent-style-name="Standard">
      <style:text-properties officeooo:rsid="011e0b29" officeooo:paragraph-rsid="01212211"/>
    </style:style>
    <style:style style:name="P226" style:family="paragraph" style:parent-style-name="Standard">
      <style:text-properties officeooo:rsid="011e0b29" officeooo:paragraph-rsid="01ebd1bb"/>
    </style:style>
    <style:style style:name="P227" style:family="paragraph" style:parent-style-name="Standard">
      <style:text-properties officeooo:rsid="011b3104" officeooo:paragraph-rsid="01e9faac"/>
    </style:style>
    <style:style style:name="P228" style:family="paragraph" style:parent-style-name="Standard">
      <style:text-properties officeooo:rsid="01ebd1bb" officeooo:paragraph-rsid="01ebd1bb"/>
    </style:style>
    <style:style style:name="P229" style:family="paragraph" style:parent-style-name="Standard">
      <style:text-properties fo:font-weight="normal" officeooo:rsid="01fb52c4" officeooo:paragraph-rsid="01fb52c4" style:font-weight-asian="normal" style:font-weight-complex="normal"/>
    </style:style>
    <style:style style:name="P230" style:family="paragraph" style:parent-style-name="Standard">
      <style:text-properties fo:font-weight="normal" officeooo:rsid="01ebd1bb" officeooo:paragraph-rsid="01ee5f14" style:font-weight-asian="normal" style:font-weight-complex="normal"/>
    </style:style>
    <style:style style:name="P231" style:family="paragraph" style:parent-style-name="Standard">
      <style:text-properties officeooo:paragraph-rsid="01ee5f14"/>
    </style:style>
    <style:style style:name="P232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Noto Serif" fo:font-size="11pt" fo:font-weight="normal" officeooo:paragraph-rsid="01fc8117" style:font-size-asian="12pt" style:font-name-complex="Arial1" style:font-size-complex="12pt"/>
    </style:style>
    <style:style style:name="P233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Noto Serif" fo:font-size="11pt" fo:font-weight="normal" officeooo:paragraph-rsid="01fc8117" style:font-size-asian="12pt" style:font-name-complex="Arial1" style:font-size-complex="12pt"/>
    </style:style>
    <style:style style:name="P234" style:family="paragraph" style:parent-style-name="Standard">
      <style:text-properties officeooo:paragraph-rsid="01fc8117"/>
    </style:style>
    <style:style style:name="P235" style:family="paragraph" style:parent-style-name="List_20_Paragraph" style:list-style-name="L6"/>
    <style:style style:name="P236" style:family="paragraph" style:parent-style-name="List_20_Paragraph" style:list-style-name="L6">
      <style:text-properties officeooo:paragraph-rsid="01f04e4a"/>
    </style:style>
    <style:style style:name="P237" style:family="paragraph" style:parent-style-name="Heading_20_3">
      <style:paragraph-properties fo:break-before="page"/>
    </style:style>
    <style:style style:name="P238" style:family="paragraph" style:parent-style-name="Table_20_Header">
      <style:text-properties officeooo:paragraph-rsid="01c35ba4"/>
    </style:style>
    <style:style style:name="P239" style:family="paragraph" style:parent-style-name="Table_20_Header">
      <style:paragraph-properties fo:text-align="center" style:justify-single-word="false"/>
      <style:text-properties officeooo:rsid="01c35ba4" officeooo:paragraph-rsid="01c35ba4"/>
    </style:style>
    <style:style style:name="P240" style:family="paragraph" style:parent-style-name="Table_20_Header">
      <style:paragraph-properties fo:text-align="center" style:justify-single-word="false"/>
      <style:text-properties officeooo:rsid="01ca7f6e" officeooo:paragraph-rsid="01ca7f6e"/>
    </style:style>
    <style:style style:name="P241" style:family="paragraph" style:parent-style-name="Table_20_Header">
      <style:text-properties officeooo:rsid="01ebd1bb" officeooo:paragraph-rsid="01ebd1bb"/>
    </style:style>
    <style:style style:name="P242" style:family="paragraph" style:parent-style-name="Table_20_Contents">
      <style:text-properties officeooo:rsid="01c35ba4" officeooo:paragraph-rsid="01c35ba4"/>
    </style:style>
    <style:style style:name="P243" style:family="paragraph" style:parent-style-name="Table_20_Contents">
      <style:paragraph-properties fo:text-align="center" style:justify-single-word="false"/>
      <style:text-properties officeooo:rsid="01c35ba4" officeooo:paragraph-rsid="01c35ba4"/>
    </style:style>
    <style:style style:name="P244" style:family="paragraph" style:parent-style-name="Table_20_Contents">
      <style:paragraph-properties fo:text-align="center" style:justify-single-word="false"/>
      <style:text-properties officeooo:rsid="01ca7f6e" officeooo:paragraph-rsid="01ca7f6e"/>
    </style:style>
    <style:style style:name="P245" style:family="paragraph" style:parent-style-name="Table_20_Contents">
      <style:text-properties officeooo:rsid="01c87c41" officeooo:paragraph-rsid="01c87c41"/>
    </style:style>
    <style:style style:name="P246" style:family="paragraph" style:parent-style-name="Standard">
      <style:text-properties officeooo:rsid="011e0b29" officeooo:paragraph-rsid="01c35ba4"/>
    </style:style>
    <style:style style:name="P247" style:family="paragraph" style:parent-style-name="Table_20_Contents">
      <style:text-properties officeooo:rsid="01c6125d" officeooo:paragraph-rsid="01c6125d"/>
    </style:style>
    <style:style style:name="P248" style:family="paragraph" style:parent-style-name="Table_20_Contents">
      <style:paragraph-properties fo:text-align="center" style:justify-single-word="false"/>
      <style:text-properties officeooo:rsid="01c7a599" officeooo:paragraph-rsid="01c7a599"/>
    </style:style>
    <style:style style:name="P249" style:family="paragraph" style:parent-style-name="Table_20_Contents">
      <style:text-properties officeooo:rsid="01c6125d" officeooo:paragraph-rsid="01c7a599"/>
    </style:style>
    <style:style style:name="P250" style:family="paragraph" style:parent-style-name="Table_20_Contents">
      <style:text-properties officeooo:rsid="01c6abcc" officeooo:paragraph-rsid="01c6abcc"/>
    </style:style>
    <style:style style:name="P251" style:family="paragraph" style:parent-style-name="Table_20_Contents">
      <style:text-properties officeooo:rsid="01c6abcc" officeooo:paragraph-rsid="01c7a599"/>
    </style:style>
    <style:style style:name="P252" style:family="paragraph" style:parent-style-name="Table_20_Contents">
      <style:text-properties officeooo:rsid="01c78c2d" officeooo:paragraph-rsid="01c7a599"/>
    </style:style>
    <style:style style:name="P253" style:family="paragraph" style:parent-style-name="Table_20_Contents">
      <style:text-properties officeooo:rsid="01c6125d" officeooo:paragraph-rsid="01c78c2d"/>
    </style:style>
    <style:style style:name="P254" style:family="paragraph" style:parent-style-name="Table_20_Contents">
      <style:text-properties officeooo:rsid="01c6125d" officeooo:paragraph-rsid="01ca7f6e"/>
    </style:style>
    <style:style style:name="P255" style:family="paragraph" style:parent-style-name="Table_20_Header">
      <style:text-properties officeooo:paragraph-rsid="01c6125d"/>
    </style:style>
    <style:style style:name="P256" style:family="paragraph" style:parent-style-name="Table_20_Header">
      <style:paragraph-properties fo:text-align="center" style:justify-single-word="false"/>
      <style:text-properties officeooo:rsid="01c35ba4" officeooo:paragraph-rsid="01c6125d"/>
    </style:style>
    <style:style style:name="P257" style:family="paragraph" style:parent-style-name="Table_20_Contents">
      <style:text-properties officeooo:rsid="01c7a599" officeooo:paragraph-rsid="01c7a599"/>
    </style:style>
    <style:style style:name="P258" style:family="paragraph" style:parent-style-name="Standard">
      <style:text-properties officeooo:rsid="011e0b29" officeooo:paragraph-rsid="01c6125d"/>
    </style:style>
    <style:style style:name="P259" style:family="paragraph" style:parent-style-name="Table_20_Header">
      <style:text-properties officeooo:paragraph-rsid="01ca7f6e"/>
    </style:style>
    <style:style style:name="P260" style:family="paragraph" style:parent-style-name="Table_20_Header">
      <style:paragraph-properties fo:text-align="center" style:justify-single-word="false"/>
      <style:text-properties officeooo:rsid="01c35ba4" officeooo:paragraph-rsid="01ca7f6e"/>
    </style:style>
    <style:style style:name="P261" style:family="paragraph" style:parent-style-name="Table_20_Contents">
      <style:text-properties officeooo:rsid="01ca7f6e" officeooo:paragraph-rsid="01ca7f6e"/>
    </style:style>
    <style:style style:name="P262" style:family="paragraph" style:parent-style-name="Table_20_Contents">
      <style:paragraph-properties fo:text-align="center" style:justify-single-word="false"/>
      <style:text-properties officeooo:rsid="01e9faac" officeooo:paragraph-rsid="01e9faac"/>
    </style:style>
    <style:style style:name="P263" style:family="paragraph" style:parent-style-name="Table_20_Contents">
      <style:text-properties officeooo:rsid="01c7a599" officeooo:paragraph-rsid="01ca7f6e"/>
    </style:style>
    <style:style style:name="P264" style:family="paragraph" style:parent-style-name="Table_20_Contents">
      <style:text-properties officeooo:rsid="01c6abcc" officeooo:paragraph-rsid="01e9faac"/>
    </style:style>
    <style:style style:name="P265" style:family="paragraph" style:parent-style-name="Standard">
      <style:text-properties officeooo:rsid="01ca7f6e" officeooo:paragraph-rsid="01ca7f6e"/>
    </style:style>
    <style:style style:name="P266" style:family="paragraph" style:parent-style-name="Heading_20_1">
      <style:paragraph-properties fo:break-before="page"/>
      <style:text-properties officeooo:paragraph-rsid="012789ed"/>
    </style:style>
    <style:style style:name="P267" style:family="paragraph" style:parent-style-name="Standard">
      <style:text-properties officeooo:rsid="00e9bb14" officeooo:paragraph-rsid="012789ed"/>
    </style:style>
    <style:style style:name="P268" style:family="paragraph" style:parent-style-name="Standard">
      <style:text-properties officeooo:rsid="00f22a02" officeooo:paragraph-rsid="012789ed"/>
    </style:style>
    <style:style style:name="P269" style:family="paragraph" style:parent-style-name="Heading_20_2">
      <style:text-properties officeooo:paragraph-rsid="012789ed"/>
    </style:style>
    <style:style style:name="P270" style:family="paragraph" style:parent-style-name="Standard">
      <style:text-properties officeooo:rsid="00f2865b" officeooo:paragraph-rsid="012789ed"/>
    </style:style>
    <style:style style:name="P271" style:family="paragraph" style:parent-style-name="Heading_20_2">
      <style:paragraph-properties fo:break-before="page"/>
      <style:text-properties officeooo:paragraph-rsid="012789ed"/>
    </style:style>
    <style:style style:name="P272" style:family="paragraph" style:parent-style-name="Standard">
      <style:text-properties officeooo:paragraph-rsid="019c473e"/>
    </style:style>
    <style:style style:name="P273" style:family="paragraph" style:parent-style-name="Heading_20_2">
      <style:text-properties officeooo:paragraph-rsid="019c473e"/>
    </style:style>
    <style:style style:name="P274" style:family="paragraph" style:parent-style-name="Standard">
      <style:text-properties officeooo:rsid="01daf459" officeooo:paragraph-rsid="01daf459"/>
    </style:style>
    <style:style style:name="P275" style:family="paragraph" style:parent-style-name="Standard">
      <style:text-properties officeooo:paragraph-rsid="01daf459"/>
    </style:style>
    <style:style style:name="P276" style:family="paragraph" style:parent-style-name="Table_20_Header">
      <style:text-properties officeooo:rsid="01e3c922" officeooo:paragraph-rsid="01e3c922"/>
    </style:style>
    <style:style style:name="P277" style:family="paragraph" style:parent-style-name="Table_20_Contents">
      <style:text-properties officeooo:rsid="01daf459" officeooo:paragraph-rsid="01daf459"/>
    </style:style>
    <style:style style:name="P278" style:family="paragraph" style:parent-style-name="Table_20_Contents">
      <style:text-properties officeooo:rsid="01daabce" officeooo:paragraph-rsid="01daabce"/>
    </style:style>
    <style:style style:name="P279" style:family="paragraph" style:parent-style-name="Standard">
      <style:text-properties officeooo:paragraph-rsid="019f63fe"/>
    </style:style>
    <style:style style:name="P280" style:family="paragraph" style:parent-style-name="Standard">
      <style:text-properties officeooo:rsid="019c473e" officeooo:paragraph-rsid="019c473e"/>
    </style:style>
    <style:style style:name="P281" style:family="paragraph" style:parent-style-name="List_20_Paragraph" style:list-style-name="L7"/>
    <style:style style:name="P282" style:family="paragraph" style:parent-style-name="Heading_20_2">
      <style:text-properties officeooo:paragraph-rsid="01f7ba86"/>
    </style:style>
    <style:style style:name="P283" style:family="paragraph" style:parent-style-name="Standard">
      <style:text-properties officeooo:rsid="01f7ba86" officeooo:paragraph-rsid="01f7ba86"/>
    </style:style>
    <style:style style:name="P284" style:family="paragraph" style:parent-style-name="Standard">
      <style:paragraph-properties fo:text-align="left" style:justify-single-word="false"/>
    </style:style>
    <style:style style:name="P285" style:family="paragraph" style:parent-style-name="List_20_Paragraph" style:list-style-name="L8"/>
    <style:style style:name="P286" style:family="paragraph" style:parent-style-name="List_20_Paragraph" style:list-style-name="L8">
      <style:text-properties officeooo:rsid="018c19fc" officeooo:paragraph-rsid="018c19fc"/>
    </style:style>
    <style:style style:name="P287" style:family="paragraph" style:parent-style-name="Standard">
      <style:text-properties officeooo:paragraph-rsid="01f76d36"/>
    </style:style>
    <style:style style:name="P288" style:family="paragraph" style:parent-style-name="Standard">
      <style:text-properties fo:font-style="italic" officeooo:paragraph-rsid="01f76d36" style:font-style-asian="italic" style:font-style-complex="italic"/>
    </style:style>
    <style:style style:name="P289" style:family="paragraph" style:parent-style-name="Standard">
      <style:text-properties officeooo:paragraph-rsid="0123ce0b"/>
    </style:style>
    <style:style style:name="P290" style:family="paragraph" style:parent-style-name="Standard">
      <style:text-properties fo:font-style="italic" style:font-style-asian="italic" style:font-style-complex="italic"/>
    </style:style>
    <style:style style:name="P291" style:family="paragraph" style:parent-style-name="Standard">
      <style:text-properties officeooo:rsid="01902a68"/>
    </style:style>
    <style:style style:name="T1" style:family="text">
      <style:text-properties officeooo:rsid="017c4ffd"/>
    </style:style>
    <style:style style:name="T2" style:family="text">
      <style:text-properties officeooo:rsid="0071b42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183ad5"/>
    </style:style>
    <style:style style:name="T5" style:family="text">
      <style:text-properties fo:font-weight="bold" officeooo:rsid="0104135c" style:font-weight-asian="bold" style:font-weight-complex="bold"/>
    </style:style>
    <style:style style:name="T6" style:family="text">
      <style:text-properties officeooo:rsid="01def656"/>
    </style:style>
    <style:style style:name="T7" style:family="text">
      <style:text-properties officeooo:rsid="01e3c922"/>
    </style:style>
    <style:style style:name="T8" style:family="text">
      <style:text-properties officeooo:rsid="01e0a987"/>
    </style:style>
    <style:style style:name="T9" style:family="text">
      <style:text-properties officeooo:rsid="01f4d272"/>
    </style:style>
    <style:style style:name="T10" style:family="text">
      <style:text-properties fo:font-weight="bold" officeooo:rsid="00a87f7e" style:font-weight-asian="bold" style:font-weight-complex="bold"/>
    </style:style>
    <style:style style:name="T11" style:family="text">
      <style:text-properties officeooo:rsid="01e800a5"/>
    </style:style>
    <style:style style:name="T12" style:family="text">
      <style:text-properties officeooo:rsid="01cfb6e2"/>
    </style:style>
    <style:style style:name="T13" style:family="text">
      <style:text-properties officeooo:rsid="01e87dcd"/>
    </style:style>
    <style:style style:name="T14" style:family="text">
      <style:text-properties officeooo:rsid="0139dde3"/>
    </style:style>
    <style:style style:name="T15" style:family="text">
      <style:text-properties officeooo:rsid="01fc890f"/>
    </style:style>
    <style:style style:name="T16" style:family="text">
      <style:text-properties officeooo:rsid="006d553f"/>
    </style:style>
    <style:style style:name="T17" style:family="text">
      <style:text-properties officeooo:rsid="00921ee3"/>
    </style:style>
    <style:style style:name="T18" style:family="text">
      <style:text-properties officeooo:rsid="011b3104"/>
    </style:style>
    <style:style style:name="T19" style:family="text">
      <style:text-properties officeooo:rsid="0104135c"/>
    </style:style>
    <style:style style:name="T20" style:family="text">
      <style:text-properties officeooo:rsid="004170e7"/>
    </style:style>
    <style:style style:name="T21" style:family="text">
      <style:text-properties officeooo:rsid="00c6b19a"/>
    </style:style>
    <style:style style:name="T22" style:family="text">
      <style:text-properties officeooo:rsid="00b8c62e"/>
    </style:style>
    <style:style style:name="T23" style:family="text">
      <style:text-properties officeooo:rsid="00d00e52"/>
    </style:style>
    <style:style style:name="T24" style:family="text">
      <style:text-properties officeooo:rsid="00d1899e"/>
    </style:style>
    <style:style style:name="T25" style:family="text">
      <style:text-properties officeooo:rsid="0110a74e"/>
    </style:style>
    <style:style style:name="T26" style:family="text">
      <style:text-properties officeooo:rsid="00ca99e7"/>
    </style:style>
    <style:style style:name="T27" style:family="text">
      <style:text-properties fo:font-weight="bold" officeooo:rsid="0127a33f" style:font-weight-asian="bold" style:font-weight-complex="bold"/>
    </style:style>
    <style:style style:name="T28" style:family="text">
      <style:text-properties officeooo:rsid="0127a33f"/>
    </style:style>
    <style:style style:name="T29" style:family="text">
      <style:text-properties officeooo:rsid="00b3bc3d"/>
    </style:style>
    <style:style style:name="T30" style:family="text">
      <style:text-properties officeooo:rsid="01072a7f"/>
    </style:style>
    <style:style style:name="T31" style:family="text">
      <style:text-properties officeooo:rsid="00ce2b17"/>
    </style:style>
    <style:style style:name="T32" style:family="text">
      <style:text-properties officeooo:rsid="00ccc4aa"/>
    </style:style>
    <style:style style:name="T33" style:family="text">
      <style:text-properties officeooo:rsid="012b3e17"/>
    </style:style>
    <style:style style:name="T34" style:family="text">
      <style:text-properties officeooo:rsid="00b565f7"/>
    </style:style>
    <style:style style:name="T35" style:family="text">
      <style:text-properties officeooo:rsid="006bacdb"/>
    </style:style>
    <style:style style:name="T36" style:family="text">
      <style:text-properties officeooo:rsid="00e9bb14"/>
    </style:style>
    <style:style style:name="T37" style:family="text">
      <style:text-properties officeooo:rsid="01e78e96"/>
    </style:style>
    <style:style style:name="T38" style:family="text">
      <style:text-properties officeooo:rsid="01297e03"/>
    </style:style>
    <style:style style:name="T39" style:family="text">
      <style:text-properties officeooo:rsid="01e5b977"/>
    </style:style>
    <style:style style:name="T40" style:family="text">
      <style:text-properties fo:font-weight="bold" officeooo:rsid="01af756d" style:font-weight-asian="bold" style:font-weight-complex="bold"/>
    </style:style>
    <style:style style:name="T41" style:family="text">
      <style:text-properties officeooo:rsid="01af756d"/>
    </style:style>
    <style:style style:name="T42" style:family="text">
      <style:text-properties officeooo:rsid="02116a0a"/>
    </style:style>
    <style:style style:name="T43" style:family="text">
      <style:text-properties officeooo:rsid="02156d29"/>
    </style:style>
    <style:style style:name="T44" style:family="text">
      <style:text-properties fo:font-weight="bold" officeooo:rsid="02037b48" style:font-weight-asian="bold" style:font-weight-complex="bold"/>
    </style:style>
    <style:style style:name="T45" style:family="text">
      <style:text-properties officeooo:rsid="02037b48"/>
    </style:style>
    <style:style style:name="T46" style:family="text">
      <style:text-properties officeooo:rsid="02039a7f"/>
    </style:style>
    <style:style style:name="T47" style:family="text">
      <style:text-properties fo:font-weight="bold" officeooo:rsid="0211e772" style:font-weight-asian="bold" style:font-weight-complex="bold"/>
    </style:style>
    <style:style style:name="T48" style:family="text">
      <style:text-properties fo:font-weight="normal" officeooo:rsid="0201cdb5" style:font-weight-asian="normal" style:font-weight-complex="normal"/>
    </style:style>
    <style:style style:name="T49" style:family="text">
      <style:text-properties fo:font-weight="normal" officeooo:rsid="02138e0f" style:font-weight-asian="normal" style:font-weight-complex="normal"/>
    </style:style>
    <style:style style:name="T50" style:family="text">
      <style:text-properties fo:font-weight="bold" officeooo:rsid="0207f7f5" style:font-weight-asian="bold" style:font-weight-complex="bold"/>
    </style:style>
    <style:style style:name="T51" style:family="text">
      <style:text-properties fo:font-weight="normal" officeooo:rsid="0207f7f5" style:font-weight-asian="normal" style:font-weight-complex="normal"/>
    </style:style>
    <style:style style:name="T52" style:family="text">
      <style:text-properties fo:font-weight="normal" officeooo:rsid="0209225e" style:font-weight-asian="normal" style:font-weight-complex="normal"/>
    </style:style>
    <style:style style:name="T53" style:family="text">
      <style:text-properties fo:font-weight="normal" officeooo:rsid="02084106" style:font-weight-asian="normal" style:font-weight-complex="normal"/>
    </style:style>
    <style:style style:name="T54" style:family="text">
      <style:text-properties officeooo:rsid="02128068"/>
    </style:style>
    <style:style style:name="T55" style:family="text">
      <style:text-properties officeooo:rsid="02138e0f"/>
    </style:style>
    <style:style style:name="T56" style:family="text">
      <style:text-properties officeooo:rsid="0201cdb5"/>
    </style:style>
    <style:style style:name="T57" style:family="text">
      <style:text-properties officeooo:rsid="0211e772"/>
    </style:style>
    <style:style style:name="T58" style:family="text">
      <style:text-properties fo:font-weight="bold" officeooo:rsid="02138e0f" style:font-weight-asian="bold" style:font-weight-complex="bold"/>
    </style:style>
    <style:style style:name="T59" style:family="text">
      <style:text-properties fo:font-weight="bold" officeooo:rsid="02128068" style:font-weight-asian="bold" style:font-weight-complex="bold"/>
    </style:style>
    <style:style style:name="T60" style:family="text">
      <style:text-properties fo:font-weight="bold" officeooo:rsid="020e1050" style:font-weight-asian="bold" style:font-weight-complex="bold"/>
    </style:style>
    <style:style style:name="T61" style:family="text">
      <style:text-properties fo:font-weight="bold" officeooo:rsid="0216bb27" style:font-weight-asian="bold" style:font-weight-complex="bold"/>
    </style:style>
    <style:style style:name="T62" style:family="text">
      <style:text-properties fo:font-weight="bold" officeooo:rsid="020fda2a" style:font-weight-asian="bold" style:font-weight-complex="bold"/>
    </style:style>
    <style:style style:name="T63" style:family="text">
      <style:text-properties officeooo:rsid="020fda2a"/>
    </style:style>
    <style:style style:name="T64" style:family="text">
      <style:text-properties fo:font-weight="bold" officeooo:rsid="0201cdb5" style:font-weight-asian="bold" style:font-weight-complex="bold"/>
    </style:style>
    <style:style style:name="T65" style:family="text">
      <style:text-properties officeooo:rsid="0202da41"/>
    </style:style>
    <style:style style:name="T66" style:family="text">
      <style:text-properties fo:font-weight="bold" officeooo:rsid="0202da41" style:font-weight-asian="bold" style:font-weight-complex="bold"/>
    </style:style>
    <style:style style:name="T67" style:family="text">
      <style:text-properties fo:font-weight="bold" officeooo:rsid="020a979f" style:font-weight-asian="bold" style:font-weight-complex="bold"/>
    </style:style>
    <style:style style:name="T68" style:family="text">
      <style:text-properties officeooo:rsid="020a979f"/>
    </style:style>
    <style:style style:name="T69" style:family="text">
      <style:text-properties officeooo:rsid="0209225e"/>
    </style:style>
    <style:style style:name="T70" style:family="text">
      <style:text-properties officeooo:rsid="02084106"/>
    </style:style>
    <style:style style:name="T71" style:family="text">
      <style:text-properties fo:font-weight="bold" officeooo:rsid="0207719f" style:font-weight-asian="bold" style:font-weight-complex="bold"/>
    </style:style>
    <style:style style:name="T72" style:family="text">
      <style:text-properties fo:font-weight="normal" officeooo:rsid="0207719f" style:font-weight-asian="normal" style:font-weight-complex="normal"/>
    </style:style>
    <style:style style:name="T73" style:family="text">
      <style:text-properties fo:font-weight="normal" officeooo:rsid="014145a3" style:font-weight-asian="normal" style:font-weight-complex="normal"/>
    </style:style>
    <style:style style:name="T74" style:family="text">
      <style:text-properties fo:font-weight="normal" officeooo:rsid="01a911f0" style:font-weight-asian="normal" style:font-weight-complex="normal"/>
    </style:style>
    <style:style style:name="T75" style:family="text">
      <style:text-properties officeooo:rsid="0207719f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20e1050" style:font-weight-asian="normal" style:font-weight-complex="normal"/>
    </style:style>
    <style:style style:name="T78" style:family="text">
      <style:text-properties fo:font-weight="bold" officeooo:rsid="02084106" style:font-weight-asian="bold" style:font-weight-complex="bold"/>
    </style:style>
    <style:style style:name="T79" style:family="text">
      <style:text-properties officeooo:rsid="020e1050"/>
    </style:style>
    <style:style style:name="T80" style:family="text">
      <style:text-properties fo:font-weight="normal" officeooo:rsid="02059233" style:font-weight-asian="normal" style:font-weight-complex="normal"/>
    </style:style>
    <style:style style:name="T81" style:family="text">
      <style:text-properties officeooo:rsid="013b6146"/>
    </style:style>
    <style:style style:name="T82" style:family="text">
      <style:text-properties officeooo:rsid="014b6f77"/>
    </style:style>
    <style:style style:name="T83" style:family="text">
      <style:text-properties officeooo:rsid="015530ac"/>
    </style:style>
    <style:style style:name="T84" style:family="text">
      <style:text-properties officeooo:rsid="01ab8e97"/>
    </style:style>
    <style:style style:name="T85" style:family="text">
      <style:text-properties officeooo:rsid="01ab8da1"/>
    </style:style>
    <style:style style:name="T86" style:family="text">
      <style:text-properties officeooo:rsid="01cdcd43"/>
    </style:style>
    <style:style style:name="T87" style:family="text">
      <style:text-properties officeooo:rsid="01766d40"/>
    </style:style>
    <style:style style:name="T88" style:family="text">
      <style:text-properties fo:font-weight="bold" officeooo:rsid="0157ba6e" style:font-weight-asian="bold" style:font-weight-complex="bold"/>
    </style:style>
    <style:style style:name="T89" style:family="text">
      <style:text-properties officeooo:rsid="0148ac44"/>
    </style:style>
    <style:style style:name="T90" style:family="text">
      <style:text-properties fo:font-weight="bold" officeooo:rsid="013cfc33" style:font-weight-asian="bold" style:font-weight-complex="bold"/>
    </style:style>
    <style:style style:name="T91" style:family="text">
      <style:text-properties officeooo:rsid="013cfc33"/>
    </style:style>
    <style:style style:name="T92" style:family="text">
      <style:text-properties officeooo:rsid="01a63b6f"/>
    </style:style>
    <style:style style:name="T93" style:family="text">
      <style:text-properties officeooo:rsid="01d36cea"/>
    </style:style>
    <style:style style:name="T94" style:family="text">
      <style:text-properties officeooo:rsid="0144037e"/>
    </style:style>
    <style:style style:name="T95" style:family="text">
      <style:text-properties officeooo:rsid="01434c57"/>
    </style:style>
    <style:style style:name="T96" style:family="text">
      <style:text-properties officeooo:rsid="020199af"/>
    </style:style>
    <style:style style:name="T97" style:family="text">
      <style:text-properties officeooo:rsid="014145a3"/>
    </style:style>
    <style:style style:name="T98" style:family="text">
      <style:text-properties officeooo:rsid="01d52328"/>
    </style:style>
    <style:style style:name="T99" style:family="text">
      <style:text-properties officeooo:rsid="013f71ff"/>
    </style:style>
    <style:style style:name="T100" style:family="text">
      <style:text-properties officeooo:rsid="01a9c8bb"/>
    </style:style>
    <style:style style:name="T101" style:family="text">
      <style:text-properties officeooo:rsid="01a911f0"/>
    </style:style>
    <style:style style:name="T102" style:family="text">
      <style:text-properties officeooo:rsid="0157ba6e"/>
    </style:style>
    <style:style style:name="T103" style:family="text">
      <style:text-properties officeooo:rsid="01405cf9"/>
    </style:style>
    <style:style style:name="T104" style:family="text">
      <style:text-properties fo:font-weight="normal" officeooo:rsid="01434c57" style:font-weight-asian="normal" style:font-weight-complex="normal"/>
    </style:style>
    <style:style style:name="T105" style:family="text">
      <style:text-properties officeooo:rsid="015e34d3"/>
    </style:style>
    <style:style style:name="T106" style:family="text">
      <style:text-properties fo:font-weight="bold" officeooo:rsid="01633829" style:font-weight-asian="bold" style:font-weight-complex="bold"/>
    </style:style>
    <style:style style:name="T107" style:family="text">
      <style:text-properties fo:font-weight="bold" officeooo:rsid="0177c544" style:font-weight-asian="bold" style:font-weight-complex="bold"/>
    </style:style>
    <style:style style:name="T108" style:family="text">
      <style:text-properties officeooo:rsid="01633829"/>
    </style:style>
    <style:style style:name="T109" style:family="text">
      <style:text-properties officeooo:rsid="01783f57"/>
    </style:style>
    <style:style style:name="T110" style:family="text">
      <style:text-properties officeooo:rsid="01608c61"/>
    </style:style>
    <style:style style:name="T111" style:family="text">
      <style:text-properties officeooo:rsid="015c1384"/>
    </style:style>
    <style:style style:name="T112" style:family="text">
      <style:text-properties officeooo:rsid="015bf31d"/>
    </style:style>
    <style:style style:name="T113" style:family="text">
      <style:text-properties officeooo:rsid="01d7d05a"/>
    </style:style>
    <style:style style:name="T114" style:family="text">
      <style:text-properties officeooo:rsid="01b26e41"/>
    </style:style>
    <style:style style:name="T115" style:family="text">
      <style:text-properties officeooo:rsid="015b2edc"/>
    </style:style>
    <style:style style:name="T116" style:family="text">
      <style:text-properties fo:font-weight="bold" officeooo:rsid="015e0bb9" style:font-weight-asian="bold" style:font-weight-complex="bold"/>
    </style:style>
    <style:style style:name="T117" style:family="text">
      <style:text-properties fo:font-weight="bold" officeooo:rsid="01637c57" style:font-weight-asian="bold" style:font-weight-complex="bold"/>
    </style:style>
    <style:style style:name="T118" style:family="text">
      <style:text-properties officeooo:rsid="0174db33"/>
    </style:style>
    <style:style style:name="T119" style:family="text">
      <style:text-properties officeooo:rsid="01738eff"/>
    </style:style>
    <style:style style:name="T120" style:family="text">
      <style:text-properties officeooo:rsid="017834a9"/>
    </style:style>
    <style:style style:name="T121" style:family="text">
      <style:text-properties officeooo:rsid="015e0bb9"/>
    </style:style>
    <style:style style:name="T122" style:family="text">
      <style:text-properties fo:font-weight="bold" officeooo:rsid="01657580" style:font-weight-asian="bold" style:font-weight-complex="bold"/>
    </style:style>
    <style:style style:name="T123" style:family="text">
      <style:text-properties officeooo:rsid="019935c4"/>
    </style:style>
    <style:style style:name="T124" style:family="text">
      <style:text-properties officeooo:rsid="0198b2aa"/>
    </style:style>
    <style:style style:name="T125" style:family="text">
      <style:text-properties officeooo:rsid="01b589aa"/>
    </style:style>
    <style:style style:name="T126" style:family="text">
      <style:text-properties officeooo:rsid="016a31e5"/>
    </style:style>
    <style:style style:name="T127" style:family="text">
      <style:text-properties officeooo:rsid="016849bf"/>
    </style:style>
    <style:style style:name="T128" style:family="text">
      <style:text-properties officeooo:rsid="016fb640"/>
    </style:style>
    <style:style style:name="T129" style:family="text">
      <style:text-properties officeooo:rsid="016a996d"/>
    </style:style>
    <style:style style:name="T130" style:family="text">
      <style:text-properties officeooo:rsid="016bdffd"/>
    </style:style>
    <style:style style:name="T131" style:family="text">
      <style:text-properties officeooo:rsid="0170ba8a"/>
    </style:style>
    <style:style style:name="T132" style:family="text">
      <style:text-properties officeooo:rsid="0197dbd1"/>
    </style:style>
    <style:style style:name="T133" style:family="text">
      <style:text-properties officeooo:rsid="01716fea"/>
    </style:style>
    <style:style style:name="T134" style:family="text">
      <style:text-properties officeooo:rsid="01734875"/>
    </style:style>
    <style:style style:name="T135" style:family="text">
      <style:text-properties officeooo:rsid="019732ab"/>
    </style:style>
    <style:style style:name="T136" style:family="text">
      <style:text-properties officeooo:rsid="017155ad"/>
    </style:style>
    <style:style style:name="T137" style:family="text">
      <style:text-properties officeooo:rsid="01bacd4e"/>
    </style:style>
    <style:style style:name="T138" style:family="text">
      <style:text-properties officeooo:rsid="017cc684"/>
    </style:style>
    <style:style style:name="T139" style:family="text">
      <style:text-properties officeooo:rsid="0124f932"/>
    </style:style>
    <style:style style:name="T140" style:family="text">
      <style:text-properties officeooo:rsid="01bf34c2"/>
    </style:style>
    <style:style style:name="T141" style:family="text">
      <style:text-properties fo:font-weight="bold" officeooo:rsid="01173f79" style:font-weight-asian="bold" style:font-weight-complex="bold"/>
    </style:style>
    <style:style style:name="T142" style:family="text">
      <style:text-properties officeooo:rsid="01fb52c4"/>
    </style:style>
    <style:style style:name="T143" style:family="text">
      <style:text-properties fo:font-weight="bold" officeooo:rsid="0124f932" style:font-weight-asian="bold" style:font-weight-complex="bold"/>
    </style:style>
    <style:style style:name="T144" style:family="text">
      <style:text-properties officeooo:rsid="0124ef49"/>
    </style:style>
    <style:style style:name="T145" style:family="text">
      <style:text-properties officeooo:rsid="011d1ff8"/>
    </style:style>
    <style:style style:name="T146" style:family="text">
      <style:text-properties fo:font-weight="normal" officeooo:rsid="01ebd1bb" style:font-weight-asian="normal" style:font-weight-complex="normal"/>
    </style:style>
    <style:style style:name="T147" style:family="text">
      <style:text-properties fo:font-weight="bold" officeooo:rsid="01ebd1bb" style:font-weight-asian="bold" style:font-weight-complex="bold"/>
    </style:style>
    <style:style style:name="T148" style:family="text">
      <style:text-properties officeooo:rsid="01ebd1bb"/>
    </style:style>
    <style:style style:name="T149" style:family="text">
      <style:text-properties officeooo:rsid="01fc8117"/>
    </style:style>
    <style:style style:name="T150" style:family="text">
      <style:text-properties officeooo:rsid="01f04e4a"/>
    </style:style>
    <style:style style:name="T151" style:family="text">
      <style:text-properties officeooo:rsid="01e9faac"/>
    </style:style>
    <style:style style:name="T152" style:family="text">
      <style:text-properties officeooo:rsid="01fe05bd"/>
    </style:style>
    <style:style style:name="T153" style:family="text">
      <style:text-properties officeooo:rsid="01fd73b3"/>
    </style:style>
    <style:style style:name="T154" style:family="text">
      <style:text-properties officeooo:rsid="01ca7f6e"/>
    </style:style>
    <style:style style:name="T155" style:family="text">
      <style:text-properties officeooo:rsid="01c6abcc"/>
    </style:style>
    <style:style style:name="T156" style:family="text">
      <style:text-properties officeooo:rsid="012789ed"/>
    </style:style>
    <style:style style:name="T157" style:family="text">
      <style:text-properties officeooo:rsid="0108eef9"/>
    </style:style>
    <style:style style:name="T158" style:family="text">
      <style:text-properties officeooo:rsid="010d918c"/>
    </style:style>
    <style:style style:name="T159" style:family="text">
      <style:text-properties officeooo:rsid="00f2865b"/>
    </style:style>
    <style:style style:name="T160" style:family="text">
      <style:text-properties officeooo:rsid="00f44568"/>
    </style:style>
    <style:style style:name="T161" style:family="text">
      <style:text-properties officeooo:rsid="00ee0f78"/>
    </style:style>
    <style:style style:name="T162" style:family="text">
      <style:text-properties officeooo:rsid="010d7baa"/>
    </style:style>
    <style:style style:name="T163" style:family="text">
      <style:text-properties officeooo:rsid="01380cb9"/>
    </style:style>
    <style:style style:name="T164" style:family="text">
      <style:text-properties officeooo:rsid="010c03e8"/>
    </style:style>
    <style:style style:name="T165" style:family="text">
      <style:text-properties officeooo:rsid="0049c165"/>
    </style:style>
    <style:style style:name="T166" style:family="text">
      <style:text-properties officeooo:rsid="0104f98a"/>
    </style:style>
    <style:style style:name="T167" style:family="text">
      <style:text-properties officeooo:rsid="0105c84a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officeooo:rsid="0123ce0b" style:font-style-asian="italic" style:font-style-complex="italic"/>
    </style:style>
    <style:style style:name="T170" style:family="text">
      <style:text-properties officeooo:rsid="01daf459"/>
    </style:style>
    <style:style style:name="T171" style:family="text">
      <style:text-properties officeooo:rsid="012243b4"/>
    </style:style>
    <style:style style:name="T172" style:family="text">
      <style:text-properties officeooo:rsid="01f76d36"/>
    </style:style>
    <style:style style:name="T173" style:family="text">
      <style:text-properties officeooo:rsid="018163c9"/>
    </style:style>
    <style:style style:name="T174" style:family="text">
      <style:text-properties fo:font-weight="bold" officeooo:rsid="01f76d36" style:font-weight-asian="bold" style:font-weight-complex="bold"/>
    </style:style>
    <style:style style:name="T175" style:family="text">
      <style:text-properties officeooo:rsid="01f7ba86"/>
    </style:style>
    <style:style style:name="T176" style:family="text">
      <style:text-properties fo:font-style="italic" officeooo:rsid="01f76d36" style:font-style-asian="italic" style:font-style-complex="italic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25pt">
          <style:column style:rel-width="32767*" fo:start-indent="0pt" fo:end-indent="12.5pt"/>
          <style:column style:rel-width="32768*" fo:start-indent="12.5pt" fo:end-indent="0pt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0.8pt" fo:text-indent="-10.8pt" fo:margin-left="10.8pt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loext:num-list-format="%1%" text:bullet-char="↳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min-label-width="14.09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Kapitel 1: <text:span text:style-name="T1">Heldenerschaffung</text:span></text:p>
        <text:p text:style-name="P2">Natürlich ist dein Charakter für dich das Zentrum des Spiels. Vermutlich hast du schon ein paar konkrete Vorstellungen und Ideen, die du gerne umsetzen möchtest.</text:p>
        <text:p text:style-name="P2">Also lass uns keine Zeit verschwenden. <text:span text:style-name="T2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2225592444" text:style-name="L1">
                <text:list-item>
                  <text:p text:style-name="P3"><text:span text:style-name="T3">Klasse</text:span>: <text:span text:style-name="T4">Wähle eine Klasse. Du startest mit Stufe 1 und darfst entsprechend ein Bronzetalent der Klasse auswählen.</text:span></text:p>
                </text:list-item>
                <text:list-item>
                  <text:p text:style-name="P4"><text:span text:style-name="T5">Fertigkeiten</text:span>: <text:span text:style-name="T6">Verteil folgende Werte auf deine Fertigkeiten: 1</text:span><text:span text:style-name="T7">3</text:span><text:span text:style-name="T6">, 1</text:span><text:span text:style-name="T7">2</text:span><text:span text:style-name="T6">, 1</text:span><text:span text:style-name="T8">1</text:span><text:span text:style-name="T6">, 9, 8. Alle anderen Fertigkeiten starten auf 10.</text:span></text:p>
                </text:list-item>
                <text:list-item>
                  <text:p text:style-name="P5"><text:span text:style-name="T3">Spezialisierungen</text:span>: Wähle <text:span text:style-name="T9">3</text:span> Spezialisierungen.</text:p>
                </text:list-item>
                <text:list-item>
                  <text:p text:style-name="P6"><text:span text:style-name="T10">Merkmale</text:span>: Du startest mit:</text:p>
                </text:list-item>
              </text:list>
              <text:list text:style-name="L2">
                <text:list-item>
                  <text:list>
                    <text:list-item>
                      <text:p text:style-name="P7">AP: <text:span text:style-name="T11">6</text:span></text:p>
                    </text:list-item>
                    <text:list-item>
                      <text:p text:style-name="P7">LP: <text:span text:style-name="T11">4</text:span></text:p>
                    </text:list-item>
                    <text:list-item>
                      <text:p text:style-name="P8">SP: <text:span text:style-name="T12">3</text:span></text:p>
                    </text:list-item>
                    <text:list-item>
                      <text:p text:style-name="P7">EP: 0</text:p>
                    </text:list-item>
                    <text:list-item>
                      <text:p text:style-name="P7">Taler: <text:span text:style-name="T13">3W6</text:span></text:p>
                    </text:list-item>
                  </text:list>
                </text:list-item>
              </text:list>
              <text:list text:continue-list="list2225592444" text:style-name="L1">
                <text:list-item>
                  <text:p text:style-name="P9"><text:span text:style-name="T3">Optional, Vorteil</text:span>: <text:span text:style-name="T14">Wähle </text:span><text:span text:style-name="T9">1 oder maximal 2</text:span><text:span text:style-name="T14"> Vorteil</text:span><text:span text:style-name="T9">e</text:span><text:span text:style-name="T14">.</text:span></text:p>
                </text:list-item>
                <text:list-item>
                  <text:p text:style-name="P10"><text:span text:style-name="T10">Inventar</text:span>: <text:span text:style-name="T15">Sofern der Erzähler nichts anderes bestimmt, startest du mit 2 bis 3 Gegenständen die zu deinem Charakter passen und 3 Vorräten.</text:span></text:p>
                </text:list-item>
                <text:list-item>
                  <text:p text:style-name="P11"><text:span text:style-name="T10">Details</text:span>: <text:span text:style-name="T16">Gib deinem Charakter einen Namen, leg fest wo er herkommt, was ihn motiviert und beschreibe ein paar Details zu ihm (z.B. Geschlecht, Haarfarbe, </text:span><text:span text:style-name="T17">oder </text:span><text:span text:style-name="T16">Alter).</text:span></text:p>
                </text:list-item>
              </text:list>
            </table:table-cell>
          </table:table-row>
        </table:table>
        <text:p text:style-name="Standard"/>
        <text:p text:style-name="P12">Kapitel <text:span text:style-name="T18">x: </text:span><text:span text:style-name="T19">Fertigkeiten</text:span></text:p>
        <text:p text:style-name="P13"><text:span text:style-name="T19">Fertigkeiten</text:span><text:span text:style-name="T20"> verkörpern die Fähigkeiten deines Helden. </text:span><text:span text:style-name="T21">Sie zeigen was er kann und</text:span><text:span text:style-name="T20"> bilden die Basis für alle </text:span><text:span text:style-name="T22">seine </text:span><text:span text:style-name="T20">Proben.</text:span></text:p>
        <text:p text:style-name="P13"/>
        <text:section text:style-name="Sect2" text:name="Section5">
          <text:h text:style-name="P14" text:outline-level="2"><text:span text:style-name="T23">S</text:span>pezialisierungen</text:h>
          <text:p text:style-name="P15">Spezialisierungen verkörpern <text:span text:style-name="T24">Training in einem</text:span> bestimmten <text:span text:style-name="T25">Fachb</text:span>ereich <text:span text:style-name="T21">eine</text:span><text:span text:style-name="T19">r Fertigkeit</text:span><text:span text:style-name="T21">.</text:span></text:p>
          <text:p text:style-name="P16">Du erhältst +2 auf alle Proben, für die dein Held wenigstens eine passende <text:span text:style-name="T26">Spezialisierung</text:span> hat.</text:p>
          <text:p text:style-name="P16"/>
          <text:h text:style-name="P17" text:outline-level="2">Standard Fertigkeiten</text:h>
          <text:h text:style-name="P18" text:outline-level="3">Charisma</text:h>
          <text:p text:style-name="P19"><text:span text:style-name="T3">Spezialisierungen</text:span>: Etikette, Singen, Tanzen, Überreden, Verführen</text:p>
          <text:p text:style-name="P20"><text:span text:style-name="T27">Beschreibung</text:span><text:span text:style-name="T28">: </text:span>Charisma steht für Auftreten, Überzeugungskraft und den geschickten Umgang mit anderen Menschen.</text:p>
          <text:p text:style-name="P19"/>
          <text:h text:style-name="Heading_20_3" text:outline-level="3">Gerissenheit</text:h>
          <text:p text:style-name="P21"><text:span text:style-name="T3">Spezialisierungen</text:span>: <text:span text:style-name="T29">Fälschen, </text:span>Gassenwissen, Schleichen, <text:span text:style-name="T30">Schlösser</text:span><text:span text:style-name="T2"> knacken</text:span>, <text:span text:style-name="T29">Taschendiebstahl, Verkleiden</text:span></text:p>
          <text:p text:style-name="P22"><text:span text:style-name="T27">Beschreibung</text:span><text:span text:style-name="T28">: Gerissenheit steht für List, Heimlichkeit und die Fähigkeit, Hindernisse mit unkonventionellen Methoden zu überwinden.</text:span></text:p>
          <text:p text:style-name="P21"/>
          <text:h text:style-name="Heading_20_3" text:outline-level="3">Geschick</text:h>
          <text:p text:style-name="P21"><text:span text:style-name="T3">Spezialisierungen</text:span>: <text:span text:style-name="T29">Klettern, </text:span><text:span text:style-name="T21">Laufen, Springen, </text:span><text:span text:style-name="T31">Reiten</text:span></text:p>
          <text:p text:style-name="P21">Beschreibung: Geschick steht für Körperbeherrschung, Koordination und präzise Bewegungen.</text:p>
          <text:p text:style-name="P21"/>
          <text:h text:style-name="P23" text:outline-level="3">Intuition</text:h>
          <text:p text:style-name="P21"><text:span text:style-name="T3">Spezialisierungen</text:span>: <text:span text:style-name="T32">Empathie, Ermitteln, Gefahreninstinkt, Wahrnehmung</text:span></text:p>
          <text:p text:style-name="P21"><text:span text:style-name="T3">Beschreibung</text:span>: Intuition steht für Aufmerksamkeit, Menschenkenntnis und die Fähigkeit, Zusammenhänge und Gefahren zu erkennen.</text:p>
          <text:p text:style-name="P21"/>
          <text:h text:style-name="P24" text:outline-level="3">Kampf</text:h>
          <text:p text:style-name="P19"><text:span text:style-name="T3">Spezialisierungen</text:span>: <text:span text:style-name="T19">Axt</text:span><text:span text:style-name="T29">, </text:span>Armbrust, Bogen, Schwert, Degen, Waffenlos, <text:span text:style-name="T29">Geschütze</text:span></text:p>
          <text:p text:style-name="P19"><text:span text:style-name="T3">Beschreibung</text:span>: Kampf steht für den Umgang mit Waffen und die Fähigkeit, Gegner im Gefecht zu besiegen.</text:p>
          <text:p text:style-name="P19"/>
          <text:h text:style-name="Heading_20_3" text:outline-level="3">Klugheit</text:h>
          <text:p text:style-name="P21"><text:span text:style-name="T3">Spezialisierungen</text:span>: <text:span text:style-name="T33">Heraldik, </text:span><text:span text:style-name="T21">Geschichte, <text:s/>Jura, </text:span>Medizin, <text:span text:style-name="T33">Magiekunde</text:span></text:p>
          <text:p text:style-name="P21"><text:span text:style-name="T3">Beschreibung</text:span>: Klugheit steht für Wissen, Bildung und die Fähigkeit, Probleme durch Nachdenken und Fachkenntnis zu lösen.</text:p>
          <text:p text:style-name="P21"/>
          <text:h text:style-name="P25" text:outline-level="3">Kraft</text:h>
          <text:p text:style-name="P21"><text:span text:style-name="T3">Spezialisierungen</text:span>: <text:span text:style-name="T34">Ausdauer, <text:s/></text:span><text:span text:style-name="T35">Einschüchtern, </text:span><text:span text:style-name="T33">Kraftakte, </text:span><text:span text:style-name="T36">Schwimmen</text:span></text:p>
          <text:p text:style-name="P21"><text:span text:style-name="T3">Beschreibung</text:span>: Kraft steht für körperliche Stärke, Ausdauer und die Fähigkeit, Hindernisse mit Muskelkraft zu überwinden.</text:p>
          <text:p text:style-name="P21"/>
          <text:p text:style-name="P21"/>
          <text:p text:style-name="P21"/>
          <text:p text:style-name="P21"/>
          <text:h text:style-name="P25" text:outline-level="3"><text:soft-page-break/>Tapferkeit</text:h>
          <text:p text:style-name="P26"><text:span text:style-name="T3">Spezialisierungen</text:span>: <text:span text:style-name="T37">Mut, Selbstbeherrschung, Konzentration, Magieresistenz</text:span></text:p>
          <text:p text:style-name="P26"><text:span text:style-name="T3">Beschreibung</text:span>: Willenskraft steht für Mut, Selbstbeherrschung und die Fähigkeit, geistigen oder übernatürlichen Einflüssen zu widerstehen.</text:p>
          <text:p text:style-name="P21"/>
          <text:h text:style-name="Heading_20_3" text:outline-level="3">Zähigkeit</text:h>
          <text:p text:style-name="P21"><text:span text:style-name="T3">Spezialisierungen</text:span>: <text:span text:style-name="T38">Schild, </text:span><text:span text:style-name="T39">Lederrüstung, </text:span><text:span text:style-name="T38">Kettenhemd, </text:span><text:span text:style-name="T39">Plattenrüstung, Ohne Rüstung</text:span></text:p>
          <text:p text:style-name="P21"><text:span text:style-name="T3">Beschreibung</text:span>: Zähigkeit steht für körperliche Widerstandskraft und die Fähigkeit, Verletzungen, Erschöpfung und Strapazen zu überstehen.</text:p>
          <text:p text:style-name="Standard"/>
          <text:h text:style-name="Heading_20_3" text:outline-level="3">Zauberei</text:h>
          <text:p text:style-name="P27"><text:span text:style-name="T3">Spezialisierungen</text:span>: </text:p>
          <text:p text:style-name="Standard"><text:span text:style-name="T40">Beschreibung</text:span><text:span text:style-name="T41">: </text:span>Zauberei steht für die Beherrschung magischer Kräfte und die Fähigkeit, übernatürliche Effekte zu wirken.</text:p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</text:section>
        <text:p text:style-name="P29"/>
        <text:p text:style-name="P30">Kapitel XX: <text:span text:style-name="T42">Klassen</text:span></text:p>
        <text:p text:style-name="P31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32">Stufe</text:p>
            </table:table-cell>
            <table:table-cell table:style-name="Table8.B1" office:value-type="string">
              <text:p text:style-name="P33">Verfügbare Talente</text:p>
            </table:table-cell>
          </table:table-row>
          <table:table-row>
            <table:table-cell table:style-name="Table8.A2" office:value-type="string">
              <text:p text:style-name="P34">1-<text:span text:style-name="T43">3</text:span></text:p>
            </table:table-cell>
            <table:table-cell table:style-name="Table8.B2" office:value-type="string">
              <text:p text:style-name="P35">Bronze</text:p>
            </table:table-cell>
          </table:table-row>
          <table:table-row>
            <table:table-cell table:style-name="Table8.A2" office:value-type="string">
              <text:p text:style-name="P36">4-6</text:p>
            </table:table-cell>
            <table:table-cell table:style-name="Table8.B2" office:value-type="string">
              <text:p text:style-name="P35">Bronze oder Silber</text:p>
            </table:table-cell>
          </table:table-row>
          <table:table-row>
            <table:table-cell table:style-name="Table8.A4" office:value-type="string">
              <text:p text:style-name="P36">7-9</text:p>
            </table:table-cell>
            <table:table-cell table:style-name="Table8.B4" office:value-type="string">
              <text:p text:style-name="P35">Bronze, Silber oder Gold</text:p>
            </table:table-cell>
          </table:table-row>
        </table:table>
        <text:p text:style-name="Standard"/>
        <text:h text:style-name="P37" text:outline-level="2">Krieger</text:h>
        <text:p text:style-name="P38">Krieger sind Experten für den Kampf. Ihre Talente erlauben ihnen besondere Manöver, die sie zu gefährlichen Duellanten, zähen Verteidigern oder brutalen Frontkämpfern machen.</text:p>
        <text:p text:style-name="P39"/>
        <text:h text:style-name="TalentHeader" text:outline-level="3">Bronze Talente</text:h>
        <text:p text:style-name="P40"><text:span text:style-name="T44">Blutrausch</text:span><text:span text:style-name="T45">: Nachdem du einen Gegner ausgeschaltet hast, darfst du sofort eine </text:span><text:span text:style-name="T46">weitere</text:span><text:span text:style-name="T45"> Attacke ausführen.</text:span></text:p>
        <text:p text:style-name="P41"><text:span text:style-name="T47">Manöver</text:span><text:span text:style-name="T48">: </text:span><text:span text:style-name="T49">Investiere 1 AP. Erhalte Vorteil auf eine Attacke oder Parade.</text:span></text:p>
        <text:p text:style-name="P42"><text:span text:style-name="T50">Provozieren</text:span><text:span text:style-name="T51">: Investiere </text:span><text:span text:style-name="T52">1 AP und d</text:span><text:span text:style-name="T51">eine Aktion. </text:span><text:span text:style-name="T49">Zieh</text:span><text:span text:style-name="T51"> </text:span><text:span text:style-name="T49">die </text:span><text:span text:style-name="T51">Aufmerksamkeit von bis zu </text:span><text:span text:style-name="T53">3</text:span><text:span text:style-name="T51"> Gegnern auf dich.</text:span></text:p>
        <text:p text:style-name="P43"><text:span text:style-name="T3">Zäh</text:span>: +1 maximale LP. <text:span text:style-name="T54">Kann mehrfach gewählt werden.</text:span></text:p>
        <text:p text:style-name="P44"/>
        <text:h text:style-name="TalentHeader" text:outline-level="3">Silber Talente</text:h>
        <text:p text:style-name="P45"><text:span text:style-name="T3">Entwaffnen</text:span>: Investiere 1 AP vor deiner Attacke. Bei Erfolg entreißt du dem Gegner die Waffe, anstelle Schaden zu verursachen.</text:p>
        <text:p text:style-name="P43"><text:span text:style-name="T3">Kampfrausch</text:span>: Investiere 1 AP <text:span text:style-name="T55">und deine Aktion. Führ 2 </text:span>Attacken aus.</text:p>
        <text:p text:style-name="P46"><text:span text:style-name="T3">Kampfsinn</text:span>: Du erleidest erst ab der 3ten Parade einen Nachteil.</text:p>
        <text:p text:style-name="P47"><text:span text:style-name="T3">Konter</text:span>: Investiere 1 AP vor deiner Parade. Bei Erfolg wehrst du den Angriff ab und der Gegner erleidet 1 Schaden.</text:p>
        <text:p text:style-name="P48"><text:span text:style-name="T47">Sturmangriff</text:span>: <text:s/><text:span text:style-name="T56">Investiere 1 AP </text:span><text:span text:style-name="T57">und deine Aktion um zu sprinten UND zu attackieren.</text:span></text:p>
        <text:p text:style-name="P49"/>
        <text:h text:style-name="TalentHeader" text:outline-level="3">Gold Talente</text:h>
        <text:p text:style-name="P50"><text:span text:style-name="T3">Kampfrausch II</text:span>: Investiere 1 AP <text:span text:style-name="T55">und deine Aktion. Führ 3 </text:span>Attacken aus.</text:p>
        <text:p text:style-name="P51"><text:span text:style-name="T3">Kampfsinn </text:span><text:span text:style-name="T58">II</text:span>: <text:span text:style-name="T57">Erfordert </text:span><text:span text:style-name="T55">Kampfsinn I</text:span><text:span text:style-name="T57">. </text:span>Du erleidest erst ab der <text:span text:style-name="T55">4</text:span>ten Parade einen Nachteil.</text:p>
        <text:p text:style-name="P52"><text:span text:style-name="T59">Niederstrecken</text:span>: <text:span text:style-name="T57">Investiere</text:span><text:span text:style-name="T55"> 2 AP nach einer erfolgreichen Attacke. Du verursachst 1 extra Schaden.</text:span></text:p>
        <text:p text:style-name="P52"><text:soft-page-break/></text:p>
        <text:h text:style-name="Heading_20_2" text:outline-level="2">Schurke</text:h>
        <text:p text:style-name="P53"/>
        <text:h text:style-name="P54" text:outline-level="3">Bronze Talente</text:h>
        <text:p text:style-name="P55"><text:span text:style-name="T60">Ablenken</text:span>: Investiere 1 AP und deine Aktion, um die Aufmerksamkeit von bis zu 3 Gegnern auf ein anderes Ziel zu lenken.</text:p>
        <text:p text:style-name="P56"><text:span text:style-name="T61">Finesse</text:span><text:span text:style-name="T56">: </text:span><text:span text:style-name="T49">Investiere 1 AP. Erhalte Vorteil auf eine Attacke oder Parade.</text:span></text:p>
        <text:p text:style-name="P45"><text:span text:style-name="T62">Hinterhalt</text:span>: Du verursachst +1 Schaden gegen überraschte oder abgelenkte Gegner.</text:p>
        <text:p text:style-name="P57"><text:span text:style-name="T3">Schnellziehen</text:span>: Du kannst leichte Waffen als freie Aktion ziehen.</text:p>
        <text:p text:style-name="P55"/>
        <text:h text:style-name="P54" text:outline-level="3">Silber Talente</text:h>
        <text:p text:style-name="P58"/>
        <text:p text:style-name="P31"/>
        <text:h text:style-name="P54" text:outline-level="3">Gold Talente</text:h>
        <text:p text:style-name="P53"/>
        <text:p text:style-name="P59"/>
        <text:h text:style-name="Heading_20_2" text:outline-level="2">Barde</text:h>
        <text:p text:style-name="P60"/>
        <text:h text:style-name="P61" text:outline-level="3">Bronze Talente</text:h>
        <text:p text:style-name="P62"/>
        <text:h text:style-name="P61" text:outline-level="3">Silber Talente</text:h>
        <text:p text:style-name="P63"/>
        <text:h text:style-name="P61" text:outline-level="3">Gold Talente</text:h>
        <text:p text:style-name="P60"/>
        <text:p text:style-name="P64"/>
        <text:p text:style-name="P64"/>
        <text:p text:style-name="P64"/>
        <text:p text:style-name="P64"/>
        <text:h text:style-name="P65" text:outline-level="3"><text:span text:style-name="T63">Leichte Waffen</text:span> <text:span text:style-name="T56">1 - 5</text:span></text:h>
        <text:p text:style-name="P66">Alle folgenden Manöver erfordern <text:span text:style-name="T45">keine oder </text:span>eine leichte Waffe.</text:p>
        <text:p text:style-name="P67"><text:span text:style-name="T3">Ausweichen </text:span><text:span text:style-name="T64">(1)</text:span><text:span text:style-name="T56">: Investiere 1 AP um einen Vorteil auf deine Parade zu erhalten.</text:span></text:p>
        <text:p text:style-name="P64"><text:span text:style-name="T3">Finte (1)</text:span>: Investiere 1 AP um einen Vorteil auf eine Attacke zu erhalten.</text:p>
        <text:p text:style-name="P68"><text:span text:style-name="T3">Schnellziehen (1)</text:span>: Du kannst leichte Waffen als freie Aktion ziehen.</text:p>
        <text:p text:style-name="P69"><text:span text:style-name="T60">Ablenken</text:span><text:span text:style-name="T3"> (2)</text:span>: Investiere 1 AP und deine Aktion, um die Aufmerksamkeit von bis zu 3 Gegnern auf ein anderes Ziel zu lenken.</text:p>
        <text:p text:style-name="P64"><text:soft-page-break/><text:span text:style-name="T3">Konter (2)</text:span>: Investiere 1 AP vor deiner Parade. Bei Erfolg wehrst du den Angriff ab und der Gegner erleidet 1 Schaden.</text:p>
        <text:p text:style-name="P64"><text:span text:style-name="T44">Tricks</text:span><text:span text:style-name="T3"> (</text:span><text:span text:style-name="T44">2</text:span><text:span text:style-name="T3">)</text:span>: Du verursachst +1 Schaden gegen überraschte oder abgelenkte Gegner.</text:p>
        <text:p text:style-name="P64"><text:span text:style-name="T3">Entwaffnen (</text:span><text:span text:style-name="T44">3</text:span><text:span text:style-name="T3">)</text:span>: Investiere 1 AP vor deiner Attacke. Bei Erfolg entreißt du dem Gegner die Waffe, anstelle Schaden zu verursachen.</text:p>
        <text:p text:style-name="P64"/>
        <text:h text:style-name="P70" text:outline-level="3"><text:span text:style-name="T63">Schwere Waffen</text:span> 1 - 5</text:h>
        <text:p text:style-name="P71">Alle folgenden Manöver erfordern eine <text:span text:style-name="T65">schwere</text:span> Waffe.</text:p>
        <text:p text:style-name="P72"><text:span text:style-name="T3">Blutrausch (1)</text:span>: Nachdem du einen Gegner ausgeschaltet hast, darfst du sofort eine <text:span text:style-name="T46">weitere</text:span> Attacke ausführen.</text:p>
        <text:p text:style-name="P73"><text:span text:style-name="T66">Harter Block</text:span><text:span text:style-name="T3"> </text:span><text:span text:style-name="T64">(1)</text:span><text:span text:style-name="T56">: Investiere 1 AP um einen Vorteil auf deine Parade zu erhalten.</text:span></text:p>
        <text:p text:style-name="P74"><text:span text:style-name="T67">Ausfall</text:span><text:span text:style-name="T3"> (</text:span><text:span text:style-name="T67">1</text:span><text:span text:style-name="T3">)</text:span>: Investiere 1 AP <text:span text:style-name="T68">um einen Vorteil auf deine Attacke zu erhalten.</text:span></text:p>
        <text:p text:style-name="P75"><text:span text:style-name="T3">Provozieren (2)</text:span>: Investiere <text:span text:style-name="T69">1 AP und d</text:span>eine Aktion, um die Aufmerksamkeit von bis zu <text:span text:style-name="T70">3</text:span> Gegnern auf dich zu ziehen.</text:p>
        <text:p text:style-name="P76"><text:span text:style-name="T66">Wuchtschlag</text:span><text:span text:style-name="T3"> (</text:span><text:span text:style-name="T66">2</text:span><text:span text:style-name="T3">)</text:span>: Investiere 1 AP <text:span text:style-name="T65">bevor du deine Attacke würfelst. Bei Erfolg verursachst du 1 extra Schaden.</text:span></text:p>
        <text:p text:style-name="P76"><text:span text:style-name="T66">Rundumschlag</text:span><text:span text:style-name="T3"> (3)</text:span>: Investiere 1 AP <text:span text:style-name="T65">und </text:span><text:span text:style-name="T69">d</text:span><text:span text:style-name="T65">eine Aktion um bis zu 3 Ziele in Reichweite zu attackieren.</text:span></text:p>
        <text:p text:style-name="P76"/>
        <text:h text:style-name="TalentHeader" text:outline-level="3">Fernkampf 1 - 5</text:h>
        <text:p text:style-name="P77">Alle folgenden Manöver erfordern eine Fernkampfwaffe.</text:p>
        <text:p text:style-name="P78"><text:span text:style-name="T71">Kernschuss (1)</text:span><text:span text:style-name="T72">: </text:span><text:span text:style-name="T73">Du erleidest keinen </text:span><text:span text:style-name="T74">Nachteil</text:span><text:span text:style-name="T73">, wen du in einen Nahkampf hinein feuerst.</text:span></text:p>
        <text:p text:style-name="P79"><text:span text:style-name="T71">Zielen</text:span><text:span text:style-name="T3"> (1)</text:span>: Investiere 1 AP <text:span text:style-name="T75">und beweg dich diese Runde nicht, </text:span>um einen Vorteil auf eine Attacke zu erhalten.</text:p>
        <text:p text:style-name="P79"><text:span text:style-name="T71">Blattschuss</text:span><text:span text:style-name="T3"> (</text:span><text:span text:style-name="T66">2</text:span><text:span text:style-name="T3">)</text:span>: Investiere 1 AP <text:span text:style-name="T65">bevor du deine Attacke würfelst. Bei Erfolg verursachst du 1 extra Schaden.</text:span></text:p>
        <text:p text:style-name="P80"><text:span text:style-name="T3">Niederhalten (2)</text:span>: <text:span text:style-name="T76">Investiere 1 AP und </text:span><text:span text:style-name="T52">d</text:span><text:span text:style-name="T76">eine Aktion, um ein Ziel für eine Runde zu markieren. Attacken gegen das markierte Ziel erhalten </text:span><text:span text:style-name="T77">einen </text:span><text:span text:style-name="T76">Vorteil.</text:span></text:p>
        <text:p text:style-name="P81"><text:span text:style-name="T78">Positionieren</text:span><text:span text:style-name="T3"> (3)</text:span>: <text:s/><text:span text:style-name="T56">Investiere 1 AP. </text:span>Du darfst deine Aktion <text:span text:style-name="T46">nutzen</text:span> um <text:span text:style-name="T68">zu sprinten</text:span> <text:span text:style-name="T68">UND</text:span> zu attackieren.</text:p>
        <text:p text:style-name="P82"><text:span text:style-name="T78">Scharfschütze</text:span><text:span text:style-name="T3"> (</text:span><text:span text:style-name="T78">3</text:span><text:span text:style-name="T3">)</text:span>: Investiere 1 AP <text:span text:style-name="T70">um Nachteile durch Deckung </text:span><text:span text:style-name="T68">und Distanz </text:span><text:span text:style-name="T70">zu ignorieren.</text:span></text:p>
        <text:p text:style-name="P83"/>
        <text:h text:style-name="P84" text:outline-level="3"><text:span text:style-name="T75">Taktik</text:span> 1 - 5</text:h>
        <text:p text:style-name="P85">Das Ziel der folgenden Manöver muss dich sehen und hören können.</text:p>
        <text:p text:style-name="P86"><text:span text:style-name="T64">Standfest</text:span><text:span text:style-name="T3"> (1)</text:span>: Minions in deiner nähe erhalten +1 auf <text:span text:style-name="T79">Kampfproben und alle Verbündete erhalten einen Vorteil auf Moralproben.</text:span></text:p>
        <text:p text:style-name="P87"><text:span text:style-name="T3">Kampfsinn (1)</text:span>: Du erleidest erst ab der 3ten Parade pro Runde einen Nachteil.</text:p>
        <text:p text:style-name="P88"><text:span text:style-name="T3">Vorwärts! (2)</text:span>: Investiere 1 AP <text:span text:style-name="T69">und </text:span>deine<text:span text:style-name="T69"> Aktion</text:span>. <text:span text:style-name="T69">Verbündete können </text:span><text:span text:style-name="T68">sich in ihrer nächsten Runde 3 Meter extra bewegen und erhalten einen Vorteil auf Attacken.</text:span></text:p>
        <text:p text:style-name="P89"><text:soft-page-break/><text:span text:style-name="T3">Haltet die Linie! (2)</text:span>: Investiere 1 AP und deine Aktion. Verbündete erhalten <text:span text:style-name="T69">für eine Runde einen Vorteil auf Paraden.</text:span></text:p>
        <text:p text:style-name="P90"><text:span text:style-name="T3">Markieren (3)</text:span>: Investiere 1 AP und <text:span text:style-name="T69">d</text:span>eine Aktion, um ein Ziel für eine Runde zu markieren. Attacken gegen das markierte Ziel erhalten <text:span text:style-name="T79">einen </text:span>Vorteil.</text:p>
        <text:p text:style-name="P91"><text:span text:style-name="T3">Attacke! (3)</text:span>: Investiere 1 AP <text:span text:style-name="T75">und eine Aktion</text:span>. Ein Verbündeter darf sofort eine <text:span text:style-name="T75">Attacke ausführen.</text:span></text:p>
        <text:p text:style-name="P79"><text:span text:style-name="T80"/></text:p>
        <text:p text:style-name="P92"/>
        <text:p text:style-name="P92"/>
        <text:p text:style-name="P92"/>
        <text:p text:style-name="P92"/>
        <text:p text:style-name="P92"/>
        <text:p text:style-name="P93"/>
        <text:p text:style-name="P94">Kapitel <text:span text:style-name="T18">x: </text:span><text:span text:style-name="T81">Talente</text:span></text:p>
        <text:h text:style-name="P95" text:outline-level="2"><text:span text:style-name="T82">Allgemeine Talent</text:span><text:span text:style-name="T83">e</text:span></text:h>
        <text:section text:style-name="Sect3" text:name="Section7">
          <text:h text:style-name="P96" text:outline-level="3">Ausdauernd I - <text:span text:style-name="T84">V</text:span></text:h>
          <text:p text:style-name="P97"><text:span text:style-name="T3">Wirkung</text:span>: Du hast <text:span text:style-name="T85">+2</text:span> maximale AP.</text:p>
          <text:p text:style-name="P97"/>
          <text:h text:style-name="P98" text:outline-level="3">Glück I - <text:span text:style-name="T86">V</text:span></text:h>
          <text:p text:style-name="P97"><text:span text:style-name="T3">Wirkung</text:span>: <text:span text:style-name="T85">Du erhältst +1 maximale SP.</text:span></text:p>
          <text:p text:style-name="P97"/>
          <text:h text:style-name="P96" text:outline-level="3">Sprache <text:span text:style-name="T83">I - V</text:span></text:h>
          <text:p text:style-name="P97"><text:span text:style-name="T3">Wirkung</text:span>: <text:span text:style-name="T83">Für jede Stufe erlernst du zwei neue Sprachen.</text:span></text:p>
          <text:p text:style-name="P99"/>
          <text:h text:style-name="P96" text:outline-level="3">Zäh I - <text:span text:style-name="T84">V</text:span></text:h>
          <text:p text:style-name="P97"><text:span text:style-name="T3">Wirkung</text:span>: Du <text:span text:style-name="T85">erhältst +</text:span><text:span text:style-name="T86">1</text:span><text:span text:style-name="T85"> maximale LP.</text:span></text:p>
        </text:section>
        <text:p text:style-name="P100"/>
        <text:h text:style-name="P101" text:outline-level="2">Kampf <text:span text:style-name="T87">Talente</text:span></text:h>
        <text:section text:style-name="Sect2" text:name="Section6">
          <text:h text:style-name="TalentHeader" text:outline-level="3">Ausweichen</text:h>
          <text:p text:style-name="P102"><text:span text:style-name="T88">Einsatz</text:span>: <text:span text:style-name="T89">Verteidigung, 1 AP</text:span></text:p>
          <text:p text:style-name="P103"><text:span text:style-name="T90">Wirkung</text:span><text:span text:style-name="T91">: Du erhältst </text:span><text:span text:style-name="T92">einen Vorteil auf deine Verteidigung.</text:span></text:p>
          <text:p text:style-name="P104"/>
          <text:h text:style-name="TalentHeader" text:outline-level="3">Binden</text:h>
          <text:p text:style-name="P105">Limits<text:span text:style-name="T76">: Nahkampf</text:span></text:p>
          <text:p text:style-name="P102"><text:span text:style-name="T88">Einsatz</text:span>: <text:span text:style-name="T89">Verteidigung, 1 AP</text:span></text:p>
          <text:p text:style-name="P106"><text:span text:style-name="T3">Wirkung</text:span>: <text:span text:style-name="T92">Du </text:span><text:span text:style-name="T93">bringst dich in eine gute Position und erhältst einen Vorteil auf deine nächste Attacke oder Parade.</text:span></text:p>
          <text:p text:style-name="Standard"/>
          <text:h text:style-name="TalentHeader" text:outline-level="3">Blattschuss</text:h>
          <text:p text:style-name="P105">Limits<text:span text:style-name="T76">: Fernkampf</text:span></text:p>
          <text:p text:style-name="P102"><text:span text:style-name="T88">Einsatz</text:span>: <text:span text:style-name="T94">Attacke</text:span><text:span text:style-name="T95">, 1 AP</text:span></text:p>
          <text:p text:style-name="P107"><text:span text:style-name="T3">Wirkung</text:span>: <text:span text:style-name="T93">Deine Attacke verursacht bei Erfolg 2 Schaden.</text:span></text:p>
          <text:p text:style-name="P104"/>
          <text:h text:style-name="TalentHeader" text:outline-level="3">Blutrausch</text:h>
          <text:p text:style-name="P108">Limits<text:span text:style-name="T76">: Nach Töten eines Gegners</text:span></text:p>
          <text:p text:style-name="P109"><text:span text:style-name="T3">Wirkung</text:span>: Führ sofort noch eine Attacke aus.</text:p>
          <text:p text:style-name="P110"/>
          <text:h text:style-name="P111" text:outline-level="3">Entwaffnen</text:h>
          <text:p text:style-name="P112">Limits<text:span text:style-name="T76">: Nahkampf</text:span></text:p>
          <text:p text:style-name="P110"><text:span text:style-name="T88">Einsatz</text:span>: <text:span text:style-name="T94">Verteidigung, 1 AP</text:span></text:p>
          <text:p text:style-name="P110"><text:span text:style-name="T3">Wirkung</text:span>: <text:span text:style-name="T96">Bei Erfolg entreißt du dem Gegner die Waffe, anstelle Schaden zu verursachen.</text:span></text:p>
          <text:p text:style-name="P113"/>
          <text:h text:style-name="TalentHeader" text:outline-level="3">Finte</text:h>
          <text:p text:style-name="P105">Limits<text:span text:style-name="T76">: Nahkampf</text:span></text:p>
          <text:p text:style-name="P102"><text:span text:style-name="T88">Einsatz</text:span>: <text:span text:style-name="T95">Attacke, 1 AP</text:span></text:p>
          <text:p text:style-name="P104"><text:span text:style-name="T3">Wirkung</text:span>: Du erhältst <text:span text:style-name="T92">einen Vorteil auf deine Attacke.</text:span></text:p>
          <text:p text:style-name="P104"/>
          <text:p text:style-name="P104"/>
          <text:p text:style-name="P104"/>
          <text:h text:style-name="TalentHeader" text:outline-level="3">Kampfsinn I - II</text:h>
          <text:p text:style-name="P102"><text:span text:style-name="T88">Einsatz</text:span>: <text:span text:style-name="T97">Verteidigung</text:span></text:p>
          <text:p text:style-name="P114"><text:span text:style-name="T3">Wirkung</text:span>: <text:span text:style-name="T98">Du erleidest erst ab der 3ten/4ten Verteidigung pro Runde einen Nachteil.</text:span></text:p>
          <text:p text:style-name="P115"/>
          <text:h text:style-name="P116" text:outline-level="3">Kampfrausch</text:h>
          <text:p text:style-name="P117"><text:span text:style-name="T88">Einsatz</text:span>: <text:span text:style-name="T94">Attacke, 1 AP</text:span></text:p>
          <text:p text:style-name="P117"><text:span text:style-name="T3">Wirkung</text:span>: <text:span text:style-name="T99">Attackiere bis zu 3 Ziele </text:span><text:span text:style-name="T100">in Reichweite.</text:span></text:p>
          <text:p text:style-name="P115"/>
          <text:h text:style-name="TalentHeader" text:outline-level="3">Kernschuss</text:h>
          <text:p text:style-name="P105">Limits<text:span text:style-name="T76">: Fernkampf</text:span></text:p>
          <text:p text:style-name="P102"><text:span text:style-name="T88">Einsatz</text:span>: <text:span text:style-name="T94">Attacke</text:span></text:p>
          <text:p text:style-name="P115"><text:span text:style-name="T3">Wirkung</text:span>: <text:span text:style-name="T97">Du erleidest keinen </text:span><text:span text:style-name="T101">Nachteil</text:span><text:span text:style-name="T97">, wen du in einen Nahkampf hinein feuerst.</text:span></text:p>
          <text:p text:style-name="P115"/>
          <text:h text:style-name="P118" text:outline-level="3">Kommandos</text:h>
          <text:p text:style-name="P102"><text:span text:style-name="T88">Einsatz</text:span>: <text:span text:style-name="T102">Aktion, 1 AP</text:span></text:p>
          <text:p text:style-name="P119"><text:span text:style-name="T3">Wirkung</text:span>: <text:span text:style-name="T102">Verbündete erhalten </text:span><text:span text:style-name="T101">einen Vorteil auf ihre nächste </text:span><text:span text:style-name="T98">Kampf Probe (</text:span><text:span text:style-name="T101">Attacke oder Verteidigung</text:span><text:span text:style-name="T98">)</text:span><text:span text:style-name="T101">.</text:span></text:p>
          <text:p text:style-name="P115"/>
          <text:h text:style-name="TalentHeader" text:outline-level="3">Konter</text:h>
          <text:p text:style-name="P105">Limits<text:span text:style-name="T76">: Nahkampf</text:span></text:p>
          <text:p text:style-name="P102"><text:span text:style-name="T88">Einsatz</text:span>: <text:span text:style-name="T94">Verteidigung, 1 AP</text:span></text:p>
          <text:p text:style-name="P120"><text:span text:style-name="T3">Wirkung</text:span>: <text:span text:style-name="T98">Gelingt die Verteidigung erleidet der Angreifer 1 Schaden.</text:span></text:p>
          <text:p text:style-name="P104"/>
          <text:h text:style-name="TalentHeader" text:outline-level="3">S<text:span text:style-name="T95">t</text:span>urmangriff</text:h>
          <text:p text:style-name="P102"><text:span text:style-name="T88">Einsatz</text:span>: <text:span text:style-name="T94">Attacke, 1 AP</text:span></text:p>
          <text:p text:style-name="P121"><text:span text:style-name="T3">Wirkung</text:span>: <text:span text:style-name="T103">Führ eine extra Bewegung aus und attackiere danach.</text:span></text:p>
          <text:p text:style-name="P104"/>
          <text:p text:style-name="P104"/>
          <text:p text:style-name="P104"/>
          <text:p text:style-name="P104"/>
          <text:h text:style-name="TalentHeader" text:outline-level="3"><text:soft-page-break/>Wuchtschlag</text:h>
          <text:p text:style-name="P105">Limits<text:span text:style-name="T76">: Nahkampf</text:span></text:p>
          <text:p text:style-name="P102"><text:span text:style-name="T88">Einsatz</text:span>: <text:span text:style-name="T95">Attacke, 1 AP</text:span></text:p>
          <text:p text:style-name="P114"><text:span text:style-name="T3">Wirkung</text:span>: <text:span text:style-name="T93">Deine Attacke verursacht bei Erfolg 2 Schaden.</text:span></text:p>
          <text:p text:style-name="P122"/>
          <text:h text:style-name="TalentHeader" text:outline-level="3">Zielen</text:h>
          <text:p text:style-name="P105">Limits<text:span text:style-name="T76">: </text:span><text:span text:style-name="T104">Fernkampf</text:span></text:p>
          <text:p text:style-name="P102"><text:span text:style-name="T88">Einsatz</text:span>:<text:span text:style-name="T95"> Attacke, 1 AP</text:span></text:p>
          <text:p text:style-name="P121"><text:span text:style-name="T3">Wirkung</text:span>: Du erhältst <text:span text:style-name="T100">einen Vorteil auf deine Attacke</text:span>.</text:p>
          <text:p text:style-name="P121"/>
        </text:section>
        <text:h text:style-name="P123" text:outline-level="2">Zauber</text:h>
        <text:p text:style-name="P124"/>
        <text:h text:style-name="P125" text:outline-level="3">Axxeleratus</text:h>
        <text:p text:style-name="P126"><text:span text:style-name="T3">Einsatz</text:span>: <text:span text:style-name="T105">Aktion, 1 AP</text:span></text:p>
        <text:p text:style-name="P127"><text:span text:style-name="T3">Limits</text:span>: <text:span text:style-name="T105">Berührung, 3 Runde</text:span></text:p>
        <text:p text:style-name="P126"><text:span text:style-name="T3">Wirkung</text:span>: <text:span text:style-name="T105">Deine Bewegung wird verdoppelt und du erhältst </text:span><text:span text:style-name="T98">einen Vorteil auf Zähigkeit</text:span><text:span text:style-name="T105">.</text:span></text:p>
        <text:p text:style-name="P128"><text:span text:style-name="T3">Alternativ, </text:span><text:span text:style-name="T106">Dauerlauf</text:span>: <text:span text:style-name="T105">Du kannst für bis zu 3 Stunden Laufen ohne müde oder schlapp zu werden.</text:span></text:p>
        <text:p text:style-name="P127"><text:span text:style-name="T3">Extra (</text:span><text:span text:style-name="T107">pro AP</text:span><text:span text:style-name="T3">)</text:span>:</text:p>
        <text:list text:style-name="L3">
          <text:list-item>
            <text:p text:style-name="P129">+<text:span text:style-name="T98">1</text:span> Runde <text:span text:style-name="T108">Wirkungsdauer</text:span></text:p>
          </text:list-item>
        </text:list>
        <text:p text:style-name="P130"/>
        <text:h text:style-name="TalentHeader" text:outline-level="3">Armatrutz</text:h>
        <text:p text:style-name="P131"><text:span text:style-name="T3">Einsatz</text:span>: <text:span text:style-name="T108">Aktion, 1 AP</text:span></text:p>
        <text:p text:style-name="P132"><text:span text:style-name="T3">Limits</text:span>: <text:span text:style-name="T108">Selbst, 5 Minuten</text:span></text:p>
        <text:p text:style-name="P131"><text:span text:style-name="T3">Wirkung</text:span>: <text:span text:style-name="T108">Du kannst </text:span><text:span text:style-name="T109">die Fertigkeit </text:span><text:span text:style-name="T108">Zauberei verwenden, um dich gegen physische Angriffe zu Verteidigen.</text:span></text:p>
        <text:p text:style-name="P133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34">Reichweite Berührung</text:p>
          </text:list-item>
          <text:list-item>
            <text:p text:style-name="P134">+5 Minuten Wirkungsdauer</text:p>
          </text:list-item>
        </text:list>
        <text:p text:style-name="P135"/>
        <text:h text:style-name="P136" text:outline-level="3">Balsam Salabunde</text:h>
        <text:p text:style-name="P137"><text:span text:style-name="T3">Einsatz</text:span>: <text:span text:style-name="T110">1 Minute</text:span>, 1 AP</text:p>
        <text:p text:style-name="P138"><text:span text:style-name="T3">Limits</text:span>: <text:span text:style-name="T111">Berührung,</text:span> <text:span text:style-name="T112">1 Lebewesen</text:span></text:p>
        <text:p text:style-name="P137"><text:span text:style-name="T3">Wirkung</text:span>: <text:span text:style-name="T109">Magische Heilung. </text:span><text:span text:style-name="T111">Ziel erhält </text:span><text:span text:style-name="T113">1</text:span><text:span text:style-name="T114"> LP</text:span><text:span text:style-name="T111"> zurück.</text:span></text:p>
        <text:p text:style-name="P139"><text:span text:style-name="T3">Alternativ, </text:span><text:span text:style-name="T106">Klarum Purum</text:span>: Ziel erholt sich von einer Krankheit oder einem Gift (SG hängt vom Gift / Krankheit ab).</text:p>
        <text:p text:style-name="P133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40">Mit nur einer Aktion wirken</text:p>
          </text:list-item>
          <text:list-item>
            <text:p text:style-name="P141">+<text:span text:style-name="T113">1</text:span> LP</text:p>
          </text:list-item>
          <text:list-item>
            <text:p text:style-name="P142">+1 Lebewesen</text:p>
          </text:list-item>
          <text:list-item>
            <text:p text:style-name="P141">+9m Reichweite</text:p>
          </text:list-item>
        </text:list>
        <text:p text:style-name="P143"/>
        <text:h text:style-name="P144" text:outline-level="3">Banballadin</text:h>
        <text:p text:style-name="P145"><text:span text:style-name="T3">Einsatz</text:span>: Aktion, 1 AP</text:p>
        <text:p text:style-name="P146"><text:span text:style-name="T3">Limits</text:span>: 15m, 1 Stunde, <text:span text:style-name="T112">1 Person</text:span></text:p>
        <text:p text:style-name="P147"><text:span text:style-name="T3">Probe</text:span>: Zauberei vs. Zähigkeit</text:p>
        <text:p text:style-name="P145"><text:span text:style-name="T3">Wirkung</text:span>: <text:span text:style-name="T115">Das Opfer möchte dein Freund sein und glaubt dir fast alles.</text:span></text:p>
        <text:p text:style-name="P133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48"><text:soft-page-break/>+1 Person</text:p>
          </text:list-item>
          <text:list-item>
            <text:p text:style-name="P149">+3 Stunden <text:span text:style-name="T108">Wirkungsdauer</text:span></text:p>
          </text:list-item>
        </text:list>
        <text:p text:style-name="Standard"/>
        <text:h text:style-name="TalentHeader" text:outline-level="3">Botschaft</text:h>
        <text:p text:style-name="P150"><text:span text:style-name="T3">Einsatz</text:span>: Aktion, 1 AP</text:p>
        <text:p text:style-name="P146"><text:span text:style-name="T3">Limits</text:span>: Unbegrenzt, <text:span text:style-name="T112">1 Person</text:span></text:p>
        <text:p text:style-name="P150"><text:span text:style-name="T3">Wirkung</text:span>: Du sprichst ein paar Wörter (2 bis 3 Sätze), welche die Zielperson als Stimme in ihrem Kopf hört.</text:p>
        <text:p text:style-name="P151"><text:span text:style-name="T116">Alternativ, </text:span><text:span text:style-name="T117">Audienz</text:span>: Du erscheinst dem Ziel in einem Traum (den du kontrollierst). Dort könnt ihr euch ungestört für mehrere Stunden unterhalten. Beide Teilnehmer können die Kommunikation jederzeit und ohne Probe beenden.</text:p>
        <text:p text:style-name="P133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48">+1 Person</text:p>
          </text:list-item>
        </text:list>
        <text:p text:style-name="P152"/>
        <text:h text:style-name="P153" text:outline-level="3">Foramen</text:h>
        <text:p text:style-name="P154"><text:span text:style-name="T3">Einsatz</text:span>: <text:span text:style-name="T118">Aktion</text:span>, 1 AP</text:p>
        <text:p text:style-name="P155"><text:span text:style-name="T3">Limits</text:span>: <text:span text:style-name="T119">Berührung, </text:span><text:span text:style-name="T118">1 </text:span><text:span text:style-name="T119">Objekt</text:span></text:p>
        <text:p text:style-name="P156"><text:span text:style-name="T3">Probe</text:span>: Zauberei</text:p>
        <text:p text:style-name="P154"><text:span text:style-name="T3">Wirkung</text:span>: <text:span text:style-name="T118">Du öffnest ein schloss oder einen Riegel mittels Magie. SG hängt von der Qualität des Schlosses ab.</text:span></text:p>
        <text:p text:style-name="P157"/>
        <text:h text:style-name="P158" text:outline-level="3">Fulminictus</text:h>
        <text:p text:style-name="P151"><text:span text:style-name="T3">Einsatz</text:span>: Aktion</text:p>
        <text:p text:style-name="P159"><text:span text:style-name="T3">Limits</text:span>: <text:span text:style-name="T111">15m,</text:span> <text:span text:style-name="T112">1 Lebewesen</text:span></text:p>
        <text:p text:style-name="P160"><text:span text:style-name="T3">Probe</text:span>: Zauberei vs. Zähigkeit</text:p>
        <text:p text:style-name="P151"><text:span text:style-name="T3">Wirkung</text:span>: <text:span text:style-name="T120">Magisches Geschoss. </text:span><text:span text:style-name="T111">Ziel erleidet </text:span><text:span text:style-name="T113">1</text:span><text:span text:style-name="T111"> </text:span><text:span text:style-name="T121">Zauberschaden</text:span><text:span text:style-name="T111">.</text:span></text:p>
        <text:p text:style-name="P161"><text:span text:style-name="T3">Alternativ, </text:span><text:span text:style-name="T122">Reinigung</text:span>: Töte alle Insekten und Kleintiere in 30m Radius.</text:p>
        <text:p text:style-name="P133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62">+15m Reichweite</text:p>
          </text:list-item>
          <text:list-item>
            <text:p text:style-name="P163">+Vorteil auf Attacke</text:p>
          </text:list-item>
          <text:list-item>
            <text:p text:style-name="P164">+1 Schaden (kann nur einmal gewählt werden)</text:p>
          </text:list-item>
        </text:list>
        <text:p text:style-name="P165"/>
        <text:h text:style-name="P166" text:outline-level="3">Gardianum</text:h>
        <text:p text:style-name="P167"><text:span text:style-name="T3">Einsatz</text:span>: Aktion, <text:span text:style-name="T123">1 AP</text:span></text:p>
        <text:p text:style-name="P168"><text:span text:style-name="T3">Limits</text:span>: <text:span text:style-name="T123">7m,</text:span><text:span text:style-name="T112"> </text:span><text:span text:style-name="T123">5 Minuten</text:span></text:p>
        <text:p text:style-name="P167"><text:span text:style-name="T3">Wirkung</text:span>: <text:span text:style-name="T123">Erzeugt eine 3m durchmessende Kugel, die Zauber von außen blockt.</text:span></text:p>
        <text:p text:style-name="P168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69">+5 Minuten Wirkungsdauer</text:p>
          </text:list-item>
          <text:list-item>
            <text:p text:style-name="P169"><text:soft-page-break/>+3m Durchmesser</text:p>
          </text:list-item>
        </text:list>
        <text:p text:style-name="P165"/>
        <text:h text:style-name="P170" text:outline-level="3">Horriphobus</text:h>
        <text:p text:style-name="P171"><text:span text:style-name="T3">Einsatz</text:span>: Aktion, <text:span text:style-name="T124">1 AP</text:span></text:p>
        <text:p text:style-name="P172"><text:span text:style-name="T3">Limits</text:span>: <text:span text:style-name="T124">7m, 1 Person, 3 Minuten</text:span></text:p>
        <text:p text:style-name="P173"><text:span text:style-name="T3">Probe</text:span>: Zauberei vs. Zähigkeit</text:p>
        <text:p text:style-name="P171"><text:span text:style-name="T3">Wirkung</text:span>: <text:span text:style-name="T124">Das Opfer fürchtet sich vor dir, ergreift die Flucht wen möglich, oder versucht dich zumindest zu meiden.</text:span></text:p>
        <text:p text:style-name="P172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74">+7m Reichweite</text:p>
          </text:list-item>
          <text:list-item>
            <text:p text:style-name="P174">+1 Person</text:p>
          </text:list-item>
          <text:list-item>
            <text:p text:style-name="P174">+3 Minuten Wirkungsdauer</text:p>
          </text:list-item>
        </text:list>
        <text:p text:style-name="P165"/>
        <text:h text:style-name="TalentHeader" text:outline-level="3">Ignifaxius</text:h>
        <text:p text:style-name="P175"><text:span text:style-name="T3">Einsatz</text:span>: Aktion</text:p>
        <text:p text:style-name="P176"><text:span text:style-name="T3">Limits</text:span>: <text:span text:style-name="T111">15m,</text:span> <text:span text:style-name="T112">1 Lebewesen</text:span></text:p>
        <text:p text:style-name="P147"><text:span text:style-name="T3">Probe</text:span>: Zauberei vs. Zähigkeit</text:p>
        <text:p text:style-name="P175"><text:span text:style-name="T3">Wirkung</text:span>: <text:span text:style-name="T120">Feuerlanze. </text:span><text:span text:style-name="T111">Ziel erleidet </text:span><text:span text:style-name="T113">1</text:span><text:span text:style-name="T111"> Feuerschaden.</text:span></text:p>
        <text:p text:style-name="P133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41">+15m Reichweite</text:p>
          </text:list-item>
          <text:list-item>
            <text:p text:style-name="P177">+<text:span text:style-name="T125">Vorteil auf Attacke</text:span></text:p>
          </text:list-item>
          <text:list-item>
            <text:p text:style-name="P164">+1 Schaden (kann nur einmal gewählt werden)</text:p>
          </text:list-item>
        </text:list>
        <text:p text:style-name="P178"/>
        <text:h text:style-name="P179" text:outline-level="3">Motoricus</text:h>
        <text:p text:style-name="P180"><text:span text:style-name="T3">Einsatz</text:span>: Aktion</text:p>
        <text:p text:style-name="P181"><text:span text:style-name="T3">Limits</text:span>: <text:span text:style-name="T126">7m,</text:span> <text:span text:style-name="T112">1 </text:span><text:span text:style-name="T127">Objekt </text:span><text:span text:style-name="T128">(25kg)</text:span><text:span text:style-name="T127">, 5 Minuten</text:span></text:p>
        <text:p text:style-name="P180"><text:span text:style-name="T3">Wirkung</text:span>: <text:span text:style-name="T127">Du kannst </text:span><text:span text:style-name="T129">ein Objekt mit </text:span><text:span text:style-name="T127">Gedankenkraft langsam heben und bewegen. </text:span><text:span text:style-name="T128">Möchtest du mit dem Objekt etwas tun dass eine Probe erfordert, wird diese auf Zauberei gewürfelt.</text:span></text:p>
        <text:p text:style-name="P133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82">+<text:span text:style-name="T130">25kg</text:span></text:p>
          </text:list-item>
          <text:list-item>
            <text:p text:style-name="P183">+7m Reichweite</text:p>
          </text:list-item>
          <text:list-item>
            <text:p text:style-name="P183">+1 Objekt (Gesamtgewicht zählt)</text:p>
          </text:list-item>
        </text:list>
        <text:p text:style-name="P184"/>
        <text:h text:style-name="P185" text:outline-level="3">Odem Arcanum</text:h>
        <text:p text:style-name="P186"><text:span text:style-name="T3">Einsatz</text:span>: Aktion, <text:span text:style-name="T128">1 AP</text:span></text:p>
        <text:p text:style-name="P187"><text:span text:style-name="T3">Limits</text:span>: <text:span text:style-name="T128">Selbst, </text:span><text:span text:style-name="T131">1 Minute</text:span></text:p>
        <text:p text:style-name="P186"><text:span text:style-name="T3">Wirkung</text:span>: <text:span text:style-name="T131">Du </text:span><text:span text:style-name="T132">Magie sehen (Wesen, Objekte, Phänomen) und Illusionen durchschauen</text:span><text:span text:style-name="T131">. </text:span><text:span text:style-name="T133">Extreme Magie kann den Anwender kurzzeitig Blenden (Teclador Effekt).</text:span></text:p>
        <text:p text:style-name="P188"><text:soft-page-break/><text:span text:style-name="T3">Alternativ, <text:s/>Blick aufs Wesen</text:span>: Der Erzähler beantwortet dir 3 Ja/Nein Fragen zu etwas magischen.</text:p>
        <text:p text:style-name="P189"><text:span text:style-name="T3">Alternativ, Analys Arcanstruktur</text:span>: <text:span text:style-name="T119">Du ergründest die Details zu etwas magischen</text:span>. Je nach Komplexität des Objekt <text:span text:style-name="T134">kann die Analyse Minuten, Stunden, Tage oder sogar Wochen dauern.</text:span></text:p>
        <text:p text:style-name="P133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90">+1 Minute <text:span text:style-name="T108">Wirkungsdauer</text:span></text:p>
          </text:list-item>
        </text:list>
        <text:p text:style-name="P191"/>
        <text:h text:style-name="P192" text:outline-level="3">Somnigravis</text:h>
        <text:p text:style-name="P193"><text:span text:style-name="T3">Einsatz</text:span>: Aktion, <text:span text:style-name="T128">1 AP</text:span></text:p>
        <text:p text:style-name="P194"><text:span text:style-name="T3">Limits</text:span>: <text:span text:style-name="T135">7m, </text:span><text:span text:style-name="T132">Entspanntes </text:span><text:span text:style-name="T135">Lebewesen</text:span></text:p>
        <text:p text:style-name="P195"><text:span text:style-name="T3">Probe</text:span>: Zaubere<text:span text:style-name="T135">i vs. Zähigkeit</text:span></text:p>
        <text:p text:style-name="P193"><text:span text:style-name="T3">Wirkung</text:span>: <text:span text:style-name="T132">Das Opfer wird innerhalb weniger Momente müde und schläft ein. Schaden oder Lärm beendet den Schlaf.</text:span></text:p>
        <text:p text:style-name="P194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196">+1 Lebewesen</text:p>
          </text:list-item>
          <text:list-item>
            <text:p text:style-name="P196">+7m Reichweite</text:p>
          </text:list-item>
        </text:list>
        <text:p text:style-name="P197"/>
        <text:h text:style-name="P198" text:outline-level="3">Transversalis</text:h>
        <text:p text:style-name="P199"><text:span text:style-name="T3">Einsatz</text:span>: Aktion, <text:span text:style-name="T136">1 </text:span><text:span text:style-name="T128">AP</text:span></text:p>
        <text:p text:style-name="P200"><text:span text:style-name="T3">Limits</text:span>: <text:span text:style-name="T128">Selbst, </text:span><text:span text:style-name="T133">50</text:span><text:span text:style-name="T136"> Meilen</text:span></text:p>
        <text:p text:style-name="P201"><text:span text:style-name="T3">Probe</text:span>: Zauberei</text:p>
        <text:p text:style-name="P199"><text:span text:style-name="T3">Wirkung</text:span>: <text:span text:style-name="T136">Du teleportierst dich an einen </text:span><text:span text:style-name="T133">anderen Ort. SG hängt davon ab wie gut du das Ziel kennst: 1</text:span><text:span text:style-name="T137">0</text:span><text:span text:style-name="T133"> = Sichtkontakt, </text:span><text:span text:style-name="T137">15</text:span><text:span text:style-name="T133"> = Gut Bekannt, </text:span><text:span text:style-name="T137">20</text:span><text:span text:style-name="T133"> = Schlecht Bekannt, </text:span><text:span text:style-name="T137">25</text:span><text:span text:style-name="T133"> = Beschreibung.</text:span></text:p>
        <text:p text:style-name="P133"><text:span text:style-name="T3">Extra (</text:span><text:span text:style-name="T107">pro AP</text:span><text:span text:style-name="T3">)</text:span>:</text:p>
        <text:list text:continue-numbering="true" text:style-name="L3">
          <text:list-item>
            <text:p text:style-name="P202">+50 Meilen</text:p>
          </text:list-item>
          <text:list-item>
            <text:p text:style-name="P202">+1 Person Mitnehmen (erfordert Berührung)</text:p>
          </text:list-item>
          <text:list-item>
            <text:p text:style-name="P202">+100kg Objekt mitnehmen (erfordert Berührung)</text:p>
          </text:list-item>
        </text:list>
        <text:p text:style-name="P203"/>
        <text:p text:style-name="P203"/>
        <text:p text:style-name="P203"/>
        <text:p text:style-name="P203"/>
        <text:p text:style-name="P203"/>
        <text:p text:style-name="P203"/>
        <text:p text:style-name="P203"/>
        <text:p text:style-name="P203"/>
        <text:p text:style-name="P203"/>
        <text:p text:style-name="Heading_20_1"><text:soft-page-break/>Kapitel <text:span text:style-name="T18">x: </text:span>Merkmale</text:p>
        <text:p text:style-name="P204">Merkmale beschreiben die passiven Eigenschaften deines Helden, <text:span text:style-name="T98">z.B.</text:span> wie viel Schaden er einstecken kann oder wie erschöpft er ist.</text:p>
        <text:p text:style-name="P204"/>
        <text:section text:style-name="Sect2" text:name="Section1">
          <text:h text:style-name="P205" text:outline-level="2">AP</text:h>
          <text:p text:style-name="P206">AP (Ausdauerpunkte) werden benötigt, um viele <text:span text:style-name="T138">der aktiven </text:span>Talente einzusetzen.</text:p>
          <text:p text:style-name="P206">Nach einer Nachtruhe regenerierst du W6 AP.</text:p>
          <text:p text:style-name="P207"/>
          <text:h text:style-name="P208" text:outline-level="2">LP</text:h>
          <text:p text:style-name="P209">LP (Lebenspunkte) geben an, wie viel Schaden dein Held einstecken kann.</text:p>
          <text:p text:style-name="P209">Erleidet dein Held Schaden, verliert er entsprechend viele LP. Sinken seine LP auf 0, wird er kampfunfähig.</text:p>
          <text:p text:style-name="P209">Eine Nachtruhe stellt <text:span text:style-name="T98">1</text:span> LP wieder her.</text:p>
          <text:p text:style-name="P210"/>
          <text:h text:style-name="Heading_20_3" text:outline-level="3">Erste Hilfe</text:h>
          <text:p text:style-name="P210">Hat ein Charakter <text:span text:style-name="T139">gerade erst</text:span> LP verloren, kann mit einer Probe auf Klugheit <text:span text:style-name="T139">einmalig </text:span>Erste Hilfe geleistet werden. Bei Erfolg stellt das Ziel <text:span text:style-name="T98">1</text:span> LP wieder her.</text:p>
          <text:p text:style-name="P207"/>
          <text:h text:style-name="P211" text:outline-level="2">SP</text:h>
          <text:p text:style-name="P212">SP (Schicksalspunkte) erlauben es dir, <text:span text:style-name="T140">eine Probe </text:span><text:span text:style-name="T98">erneut</text:span><text:span text:style-name="T140"> zu würfeln. Das neue Ergebnis ist dann </text:span><text:span text:style-name="T98">jedoch </text:span><text:span text:style-name="T140">bindend.</text:span></text:p>
          <text:p text:style-name="P212">Du beginnst jeden Spielabend mit allen deinen SP. Einmal ausgegebene SP können während des Spielabends nicht zurückgewonnen werden.</text:p>
          <text:h text:style-name="P213" text:outline-level="2">EP</text:h>
          <text:p text:style-name="P214">Du erhältst <text:span text:style-name="T8">10</text:span> EP (Erfahrungspunkt) pro Spielabend <text:span text:style-name="T8">und</text:span> <text:span text:style-name="T8">weitere 5 EP für </text:span>das Besiegen mächtiger Monster und das Abschließen von Quests.</text:p>
          <text:p text:style-name="P214">Nach etwa einer Woche Training können EP ausgegeben werden:</text:p>
          <text:list text:style-name="L4">
            <text:list-item>
              <text:p text:style-name="P215"><text:span text:style-name="T3">Fertigkeit</text:span> +1: Neuer Wert <text:span text:style-name="T6">*</text:span><text:span text:style-name="T8">2</text:span> EP</text:p>
            </text:list-item>
            <text:list-item>
              <text:p text:style-name="P215"><text:span text:style-name="T141">Neue </text:span><text:span text:style-name="T3">Spezialisierung</text:span>: <text:span text:style-name="T6">20</text:span> EP</text:p>
            </text:list-item>
            <text:list-item>
              <text:p text:style-name="P216"><text:span text:style-name="T3">Neues Talent</text:span>: <text:span text:style-name="T6">20</text:span> EP</text:p>
            </text:list-item>
          </text:list>
          <text:p text:style-name="P217"/>
          <text:h text:style-name="P218" text:outline-level="2">ST</text:h>
          <text:p text:style-name="P219"><text:span text:style-name="T142">Silberta</text:span>ler sind die Standardwährung des Spiels. Regeltechnisch werden nur Taler verwaltet, in der Spielwelt existieren jedoch verschiedene Münzen:</text:p>
          <text:list text:style-name="L5">
            <text:list-item>
              <text:p text:style-name="P220">1 Dukat</text:p>
            </text:list-item>
            <text:list-item>
              <text:p text:style-name="P220">10 Taler</text:p>
            </text:list-item>
            <text:list-item>
              <text:p text:style-name="P220">1<text:span text:style-name="T139">0</text:span>0 Heller</text:p>
            </text:list-item>
            <text:list-item>
              <text:p text:style-name="P220">1<text:span text:style-name="T139">00</text:span>0 Kreuzer</text:p>
            </text:list-item>
          </text:list>
          <text:p text:style-name="List_20_Paragraph"/>
          <text:p text:style-name="P219"><text:span text:style-name="T143">Hinweis</text:span><text:span text:style-name="T139">: </text:span>Kleinstausgaben, wie ein Bier in der Taverne oder ein Trinkgeld für einen Botenjungen, müssen nicht verwaltet werden.</text:p>
          <text:p text:style-name="P219"/>
          <text:p text:style-name="P219"/>
          <text:p text:style-name="P219"/>
        </text:section>
        <text:p text:style-name="P204"/>
        <text:p text:style-name="P204"/>
        <text:p text:style-name="P204"/>
        <text:p text:style-name="P221"><text:soft-page-break/>Kapitel <text:span text:style-name="T144">xx: </text:span><text:span text:style-name="T145">Ausrüstung</text:span></text:p>
        <text:section text:style-name="Sect3" text:name="Section4">
          <text:h text:style-name="P222" text:outline-level="2">Grundregeln</text:h>
          <text:p text:style-name="P223">Jeder Held verfügt über 10 Slots für Ausrüstung. Einen Gegenstand anzulegen, wegzustecken oder gegen einen anderen auszutauschen kostet eine Aktion.</text:p>
          <text:p text:style-name="P223"/>
          <text:h text:style-name="P224" text:outline-level="2">Vorräte</text:h>
          <text:p text:style-name="P225">Vorräte stehen für alle möglichen Kleinigkeiten, die ein Abenteurer dabeihaben könnte, etwa Proviant, Fackeln oder Seile.</text:p>
          <text:p text:style-name="P226">Eine Portion Vorräte kostet <text:span text:style-name="T3">1 Silber</text:span><text:span text:style-name="T76"> </text:span><text:span text:style-name="T146">und du kannst </text:span><text:span text:style-name="T147">3 Vorräte pro Slot</text:span><text:span text:style-name="T146"> transportieren.</text:span></text:p>
          <text:p text:style-name="P225">Du kannst jederzeit eine Portion Vorräte verbrauchen, um einen <text:span text:style-name="T148">alltäglichen Gegenstand aus dem Rucksack zu ziehen. </text:span>Dieser Gegenstand wird <text:span text:style-name="T148">aber durch die Nutzung verbraucht oder geht danach verloren.</text:span></text:p>
          <text:p text:style-name="P227"/>
          <text:h text:style-name="Heading_20_3" text:outline-level="3">Haltbare Ausrüstung</text:h>
          <text:p text:style-name="P226">Haltbare Gegenstände wie Dietriche, Zelte oder Brechstangen können gezielt gekauft werden. Ein solcher Gegenstand kostet 5 Silber, belegt einen Slot und wird durch die Benutzung nicht verbraucht.</text:p>
          <text:p text:style-name="P226"/>
          <text:h text:style-name="Heading_20_2" text:outline-level="2">Bewaffnung</text:h>
          <text:p text:style-name="P228">Bewaffnung umfasst die wichtigsten Ausrüstungsgegenstände eines Abenteurers: Waffen, Schilde, Rüstungen und Foki.</text:p>
          <text:p text:style-name="P228">Sie verleihen einen Bonus auf eine Fertigkeit (z. B. Kampf, Zähigkeit oder Zauberei) und besitzen oft einige Besonderheiten, die beim Einsatz beachtet werden müssen.</text:p>
          <text:p text:style-name="P228">Weiter unten findest du einige Beispiele.</text:p>
          <text:h text:style-name="P218" text:outline-level="2">Handwerk</text:h>
          <text:p text:style-name="P229">Einen Gegenstand herstellen erfordert eine Probe auf das passende Handwerk und die dazu Materialien im halben Wert des Gegenstands.</text:p>
          <text:p text:style-name="P229"/>
          <text:h text:style-name="Heading_20_3" text:outline-level="3">Extras</text:h>
          <text:p text:style-name="P229">Erfahrene Handwerker können Gegenstände mit Extras aufrüsten.</text:p>
          <text:p text:style-name="P229">Dies erfordert eine passende Spezialisierung und 200 ST pro Extra (1stes = 200 ST, 2tes = 400 ST, etc.)</text:p>
          <text:p text:style-name="P229">Außerdem wird die Handwerksprobe pro Extra um 3 erschwert (1stes = -3, 2tes Extra = -6, etc.)</text:p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p text:style-name="P230"/>
          <text:h text:style-name="Heading_20_2" text:outline-level="2"><text:span text:style-name="T149">Optional: </text:span>Handwerk</text:h>
          <text:p text:style-name="P230"><text:soft-page-break/>Um einen Gegenstand herzustellen, benötigst du Materialien im halben Wert des Gegenstands und musst eine Probe auf das entsprechende Handwerk ablegen.</text:p>
          <text:p text:style-name="P230"/>
          <text:h text:style-name="Heading_20_3" text:outline-level="3">Extras</text:h>
          <text:p text:style-name="P230">Erfahrene Handwerker können Gegenstände mit Extras aufwerten.</text:p>
          <text:p text:style-name="P230">Dies erfordert eine passende Spezialisierung. Jedes Extra kostet 200 ST und erhöht sowohl die Kosten als auch die Schwierigkeit weiterer Extras.</text:p>
          <text:p text:style-name="P231"/>
          <table:table table:name="Table4" table:style-name="Table4">
            <table:table-column table:style-name="Table4.A" table:number-columns-repeated="3"/>
            <table:table-row>
              <table:table-cell table:style-name="Table4.A1" office:value-type="string">
                <text:p text:style-name="P232">Extra</text:p>
              </table:table-cell>
              <table:table-cell table:style-name="Table4.A1" office:value-type="string">
                <text:p text:style-name="P232">Kosten</text:p>
              </table:table-cell>
              <table:table-cell table:style-name="Table4.A1" office:value-type="string">
                <text:p text:style-name="P232">Schwierigkeit</text:p>
              </table:table-cell>
            </table:table-row>
            <table:table-row>
              <table:table-cell table:style-name="Table4.A2" office:value-type="string">
                <text:p text:style-name="P233">1</text:p>
              </table:table-cell>
              <table:table-cell table:style-name="Table4.B2" office:value-type="string">
                <text:p text:style-name="P233">200 ST</text:p>
              </table:table-cell>
              <table:table-cell table:style-name="Table4.C2" office:value-type="string">
                <text:p text:style-name="P233">-3</text:p>
              </table:table-cell>
            </table:table-row>
            <table:table-row>
              <table:table-cell table:style-name="Table4.A2" office:value-type="string">
                <text:p text:style-name="P233">2</text:p>
              </table:table-cell>
              <table:table-cell table:style-name="Table4.B3" office:value-type="string">
                <text:p text:style-name="P233">400 ST</text:p>
              </table:table-cell>
              <table:table-cell table:style-name="Table4.C3" office:value-type="string">
                <text:p text:style-name="P233">-6</text:p>
              </table:table-cell>
            </table:table-row>
            <table:table-row>
              <table:table-cell table:style-name="Table4.A4" office:value-type="string">
                <text:p text:style-name="P233">3</text:p>
              </table:table-cell>
              <table:table-cell table:style-name="Table4.B4" office:value-type="string">
                <text:p text:style-name="P233">800 ST</text:p>
              </table:table-cell>
              <table:table-cell table:style-name="Table4.C4" office:value-type="string">
                <text:p text:style-name="P233">-9</text:p>
              </table:table-cell>
            </table:table-row>
          </table:table>
          <text:p text:style-name="P234"/>
          <text:h text:style-name="Heading_20_3" text:outline-level="3">Extras Liste</text:h>
          <text:list text:style-name="L6">
            <text:list-item>
              <text:p text:style-name="P235"><text:span text:style-name="T3">Apport</text:span>: Gegenstand belegt keinen Slot und erscheint auf Kommando in der Hand des Besitzers.</text:p>
            </text:list-item>
            <text:list-item>
              <text:p text:style-name="P235"><text:span text:style-name="T3">Bonus (+1 bis +3)</text:span>: Der Gegenstand verleiht einen (zusätzlichen) Bonus von +1 bis +3 auf eine bestimmte Fertigkeit.</text:p>
            </text:list-item>
            <text:list-item>
              <text:p text:style-name="P235"><text:span text:style-name="T3">Glücksbringer</text:span>: Der Träger kann einmalig eine Probe wiederholen <text:span text:style-name="T150">(zerbricht danach).</text:span></text:p>
            </text:list-item>
            <text:list-item>
              <text:p text:style-name="P235"><text:span text:style-name="T3">Heilend</text:span>: Gegenstand kann <text:span text:style-name="T150">3 LP speichern.</text:span></text:p>
            </text:list-item>
            <text:list-item>
              <text:p text:style-name="P236"><text:span text:style-name="T3">Lebensretter</text:span>: Der Gegenstand verhindert einmalig, dass sein Träger auf 0 LP sinkt <text:s/><text:span text:style-name="T150">(zerbricht danach).</text:span></text:p>
            </text:list-item>
            <text:list-item>
              <text:p text:style-name="P235"><text:span text:style-name="T3">Lumen</text:span>: Der Gegenstand leuchtet auf Kommando wie eine Fackel.</text:p>
            </text:list-item>
            <text:list-item>
              <text:p text:style-name="P235"><text:span text:style-name="T3">Luxuriös</text:span>: Der Gegenstand ist reich verziert und sichtbar wertvoll.</text:p>
            </text:list-item>
            <text:list-item>
              <text:p text:style-name="P235"><text:span text:style-name="T3">Magiespeicher</text:span>: Der Gegenstand kann bis zu 3 AP speichern.</text:p>
            </text:list-item>
            <text:list-item>
              <text:p text:style-name="P235"><text:span text:style-name="T3">Selbstreinigend</text:span>: Schmutz, Rost und Blut verschwinden von selbst.</text:p>
            </text:list-item>
            <text:list-item>
              <text:p text:style-name="P235"><text:span text:style-name="T3">Treu</text:span>: Niemand außer dem Besitzer kann den Gegenstand verwenden.</text:p>
            </text:list-item>
            <text:list-item>
              <text:p text:style-name="P235"><text:span text:style-name="T3">Unscheinbar</text:span>: Der Gegenstand ist leicht zu verbergen und schwer wiederzuerkennen.</text:p>
            </text:list-item>
            <text:list-item>
              <text:p text:style-name="P235"><text:span text:style-name="T3">Unzerbrechlich</text:span>: Der Gegenstand kann durch gewöhnliche Mittel nicht beschädigt werden.</text:p>
            </text:list-item>
          </text:list>
          <text:p text:style-name="List_20_Paragraph"/>
          <text:p text:style-name="List_20_Paragraph"/>
          <text:p text:style-name="List_20_Paragraph"/>
          <text:p text:style-name="List_20_Paragraph"/>
          <text:p text:style-name="P228"/>
        </text:section>
        <text:h text:style-name="P237" text:outline-level="3">Rüstung (Bonus <text:span text:style-name="T151">auf </text:span>Zähigkeit)</text:h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>
            <table:table-cell table:style-name="Table7.A1" office:value-type="string">
              <text:p text:style-name="P238">Name</text:p>
            </table:table-cell>
            <table:table-cell table:style-name="Table7.A1" office:value-type="string">
              <text:p text:style-name="P239">Preis</text:p>
            </table:table-cell>
            <table:table-cell table:style-name="Table7.A1" office:value-type="string">
              <text:p text:style-name="P240">BO</text:p>
            </table:table-cell>
            <table:table-cell table:style-name="Table7.A1" office:value-type="string">
              <text:p text:style-name="P241">Besonderheiten</text:p>
            </table:table-cell>
          </table:table-row>
          <table:table-row>
            <table:table-cell table:style-name="Table7.A2" office:value-type="string">
              <text:p text:style-name="P242">Leichte Rüstung</text:p>
            </table:table-cell>
            <table:table-cell table:style-name="Table7.B2" office:value-type="string">
              <text:p text:style-name="P243">100</text:p>
            </table:table-cell>
            <table:table-cell table:style-name="Table7.C2" office:value-type="string">
              <text:p text:style-name="P243">1</text:p>
            </table:table-cell>
            <table:table-cell table:style-name="Table7.D2" office:value-type="string">
              <text:p text:style-name="P242"><text:span text:style-name="T152">Nachteil auf Schwimmen, </text:span>2 Slots</text:p>
            </table:table-cell>
          </table:table-row>
          <table:table-row>
            <table:table-cell table:style-name="Table7.A2" office:value-type="string">
              <text:p text:style-name="P242">Schwere Rüstung</text:p>
            </table:table-cell>
            <table:table-cell table:style-name="Table7.B3" office:value-type="string">
              <text:p text:style-name="P243">300</text:p>
            </table:table-cell>
            <table:table-cell table:style-name="Table7.C3" office:value-type="string">
              <text:p text:style-name="P243">2</text:p>
            </table:table-cell>
            <table:table-cell table:style-name="Table7.D3" office:value-type="string">
              <text:p text:style-name="P242"><text:span text:style-name="T153">Nachteil auf </text:span>Schleichen, <text:span text:style-name="T153">Schwimmen unmöglich, </text:span>2 Slots</text:p>
            </table:table-cell>
          </table:table-row>
          <table:table-row>
            <table:table-cell table:style-name="Table7.A4" office:value-type="string">
              <text:p text:style-name="P242">Schild</text:p>
            </table:table-cell>
            <table:table-cell table:style-name="Table7.B4" office:value-type="string">
              <text:p text:style-name="P243">50</text:p>
            </table:table-cell>
            <table:table-cell table:style-name="Table7.C4" office:value-type="string">
              <text:p text:style-name="P244">1</text:p>
            </table:table-cell>
            <table:table-cell table:style-name="Table7.D4" office:value-type="string">
              <text:p text:style-name="P245"/>
            </table:table-cell>
          </table:table-row>
        </table:table>
        <text:p text:style-name="P246"/>
        <text:h text:style-name="Heading_20_3" text:outline-level="3">Einfache Waffen <text:span text:style-name="T154">(Bonus </text:span><text:span text:style-name="T151">auf </text:span><text:span text:style-name="T154">Kampf)</text:span>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>
            <table:table-cell table:style-name="Table6.A1" office:value-type="string">
              <text:p text:style-name="P238">Name</text:p>
            </table:table-cell>
            <table:table-cell table:style-name="Table6.A1" office:value-type="string">
              <text:p text:style-name="P239">Preis</text:p>
            </table:table-cell>
            <table:table-cell table:style-name="Table6.A1" office:value-type="string">
              <text:p text:style-name="P240">BO</text:p>
            </table:table-cell>
            <table:table-cell table:style-name="Table6.A1" office:value-type="string">
              <text:p text:style-name="P241">Besonderheiten</text:p>
            </table:table-cell>
          </table:table-row>
          <table:table-row>
            <table:table-cell table:style-name="Table6.A2" office:value-type="string">
              <text:p text:style-name="P247">Dolch</text:p>
            </table:table-cell>
            <table:table-cell table:style-name="Table6.B2" office:value-type="string">
              <text:p text:style-name="P248">45</text:p>
            </table:table-cell>
            <table:table-cell table:style-name="Table6.C2" office:value-type="string">
              <text:p text:style-name="P244">1</text:p>
            </table:table-cell>
            <table:table-cell table:style-name="Table6.D2" office:value-type="string">
              <text:p text:style-name="P249">Unauffällig, Wurf</text:p>
            </table:table-cell>
          </table:table-row>
          <table:table-row>
            <table:table-cell table:style-name="Table6.A2" office:value-type="string">
              <text:p text:style-name="P250">Schlagring</text:p>
            </table:table-cell>
            <table:table-cell table:style-name="Table6.B3" office:value-type="string">
              <text:p text:style-name="P248">25</text:p>
            </table:table-cell>
            <table:table-cell table:style-name="Table6.C3" office:value-type="string">
              <text:p text:style-name="P244">1</text:p>
            </table:table-cell>
            <table:table-cell table:style-name="Table6.D3" office:value-type="string">
              <text:p text:style-name="P251">Unauffällig</text:p>
            </table:table-cell>
          </table:table-row>
          <table:table-row>
            <table:table-cell table:style-name="Table6.A2" office:value-type="string">
              <text:p text:style-name="P247">Keule</text:p>
            </table:table-cell>
            <table:table-cell table:style-name="Table6.B4" office:value-type="string">
              <text:p text:style-name="P248">3</text:p>
            </table:table-cell>
            <table:table-cell table:style-name="Table6.C4" office:value-type="string">
              <text:p text:style-name="P244">1</text:p>
            </table:table-cell>
            <table:table-cell table:style-name="Table6.D4" office:value-type="string">
              <text:p text:style-name="P252"/>
            </table:table-cell>
          </table:table-row>
          <table:table-row>
            <table:table-cell table:style-name="Table6.A5" office:value-type="string">
              <text:p text:style-name="P247">Schleuder</text:p>
            </table:table-cell>
            <table:table-cell table:style-name="Table6.B5" office:value-type="string">
              <text:p text:style-name="P248">20</text:p>
            </table:table-cell>
            <table:table-cell table:style-name="Table6.C5" office:value-type="string">
              <text:p text:style-name="P244">1</text:p>
            </table:table-cell>
            <table:table-cell table:style-name="Table6.D5" office:value-type="string">
              <text:p text:style-name="P253">Fernkampf</text:p>
            </table:table-cell>
          </table:table-row>
          <table:table-row>
            <table:table-cell table:style-name="Table6.A2" office:value-type="string">
              <text:p text:style-name="P247">Jagdbogen</text:p>
            </table:table-cell>
            <table:table-cell table:style-name="Table6.B6" office:value-type="string">
              <text:p text:style-name="P248">45</text:p>
            </table:table-cell>
            <table:table-cell table:style-name="Table6.C6" office:value-type="string">
              <text:p text:style-name="P244">2</text:p>
            </table:table-cell>
            <table:table-cell table:style-name="Table6.D6" office:value-type="string">
              <text:p text:style-name="P247">Zweihändig, 2 Slots, Fernkampf</text:p>
            </table:table-cell>
          </table:table-row>
          <table:table-row>
            <table:table-cell table:style-name="Table6.A7" office:value-type="string">
              <text:p text:style-name="P247">Speer</text:p>
            </table:table-cell>
            <table:table-cell table:style-name="Table6.B7" office:value-type="string">
              <text:p text:style-name="P248">45</text:p>
            </table:table-cell>
            <table:table-cell table:style-name="Table6.C7" office:value-type="string">
              <text:p text:style-name="P244">2</text:p>
            </table:table-cell>
            <table:table-cell table:style-name="Table6.D7" office:value-type="string">
              <text:p text:style-name="P247">Zweihändig, 2 Slots, Wurf</text:p>
            </table:table-cell>
          </table:table-row>
          <table:table-row>
            <table:table-cell table:style-name="Table6.A8" office:value-type="string">
              <text:p text:style-name="P247">Kampfstab</text:p>
            </table:table-cell>
            <table:table-cell table:style-name="Table6.B8" office:value-type="string">
              <text:p text:style-name="P248">40</text:p>
            </table:table-cell>
            <table:table-cell table:style-name="Table6.C8" office:value-type="string">
              <text:p text:style-name="P244">2</text:p>
            </table:table-cell>
            <table:table-cell table:style-name="Table6.D8" office:value-type="string">
              <text:p text:style-name="P247">Zweihändig, 2 Slots</text:p>
            </table:table-cell>
          </table:table-row>
          <table:table-row>
            <table:table-cell table:style-name="Table6.A9" office:value-type="string">
              <text:p text:style-name="P247">Axt</text:p>
            </table:table-cell>
            <table:table-cell table:style-name="Table6.B9" office:value-type="string">
              <text:p text:style-name="P248">60</text:p>
            </table:table-cell>
            <table:table-cell table:style-name="Table6.C9" office:value-type="string">
              <text:p text:style-name="P244">2</text:p>
            </table:table-cell>
            <table:table-cell table:style-name="Table6.D9" office:value-type="string">
              <text:p text:style-name="P254">Zweihändig, 2 Slots</text:p>
            </table:table-cell>
          </table:table-row>
        </table:table>
        <text:p text:style-name="P246"/>
        <text:h text:style-name="Heading_20_3" text:outline-level="3">Kriegswaffen <text:span text:style-name="T154">(Bonus </text:span><text:span text:style-name="T151">auf </text:span><text:span text:style-name="T154">Kampf)</text:span></text:h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>
            <table:table-cell table:style-name="Table9.A1" office:value-type="string">
              <text:p text:style-name="P255">Name</text:p>
            </table:table-cell>
            <table:table-cell table:style-name="Table9.A1" office:value-type="string">
              <text:p text:style-name="P256">Preis</text:p>
            </table:table-cell>
            <table:table-cell table:style-name="Table9.A1" office:value-type="string">
              <text:p text:style-name="P240">BO</text:p>
            </table:table-cell>
            <table:table-cell table:style-name="Table9.A1" office:value-type="string">
              <text:p text:style-name="P241">Besonderheiten</text:p>
            </table:table-cell>
          </table:table-row>
          <table:table-row>
            <table:table-cell table:style-name="Table9.A2" office:value-type="string">
              <text:p text:style-name="P250">Kriegshammer</text:p>
            </table:table-cell>
            <table:table-cell table:style-name="Table9.B2" office:value-type="string">
              <text:p text:style-name="P248">105</text:p>
            </table:table-cell>
            <table:table-cell table:style-name="Table9.C2" office:value-type="string">
              <text:p text:style-name="P244">2</text:p>
            </table:table-cell>
            <table:table-cell table:style-name="Table9.D2" office:value-type="string">
              <text:p text:style-name="P257"/>
            </table:table-cell>
          </table:table-row>
          <table:table-row>
            <table:table-cell table:style-name="Table9.A2" office:value-type="string">
              <text:p text:style-name="P247">Schwer<text:span text:style-name="T155">t</text:span></text:p>
            </table:table-cell>
            <table:table-cell table:style-name="Table9.B3" office:value-type="string">
              <text:p text:style-name="P248">200</text:p>
            </table:table-cell>
            <table:table-cell table:style-name="Table9.C3" office:value-type="string">
              <text:p text:style-name="P244">2</text:p>
            </table:table-cell>
            <table:table-cell table:style-name="Table9.D3" office:value-type="string">
              <text:p text:style-name="P257"/>
            </table:table-cell>
          </table:table-row>
          <table:table-row>
            <table:table-cell table:style-name="Table9.A2" office:value-type="string">
              <text:p text:style-name="P250">Hellebarde</text:p>
            </table:table-cell>
            <table:table-cell table:style-name="Table9.B4" office:value-type="string">
              <text:p text:style-name="P248">160</text:p>
            </table:table-cell>
            <table:table-cell table:style-name="Table9.C4" office:value-type="string">
              <text:p text:style-name="P244">3</text:p>
            </table:table-cell>
            <table:table-cell table:style-name="Table9.D4" office:value-type="string">
              <text:p text:style-name="P251">Zweihändig, 2 Slots</text:p>
            </table:table-cell>
          </table:table-row>
          <table:table-row>
            <table:table-cell table:style-name="Table9.A2" office:value-type="string">
              <text:p text:style-name="P250">Kriegsaxt</text:p>
            </table:table-cell>
            <table:table-cell table:style-name="Table9.B5" office:value-type="string">
              <text:p text:style-name="P248">120</text:p>
            </table:table-cell>
            <table:table-cell table:style-name="Table9.C5" office:value-type="string">
              <text:p text:style-name="P244">3</text:p>
            </table:table-cell>
            <table:table-cell table:style-name="Table9.D5" office:value-type="string">
              <text:p text:style-name="P251">Zweihändig, 2 Slots</text:p>
            </table:table-cell>
          </table:table-row>
          <table:table-row>
            <table:table-cell table:style-name="Table9.A2" office:value-type="string">
              <text:p text:style-name="P247">Zweihänder</text:p>
            </table:table-cell>
            <table:table-cell table:style-name="Table9.B6" office:value-type="string">
              <text:p text:style-name="P248">320</text:p>
            </table:table-cell>
            <table:table-cell table:style-name="Table9.C6" office:value-type="string">
              <text:p text:style-name="P244">3</text:p>
            </table:table-cell>
            <table:table-cell table:style-name="Table9.D6" office:value-type="string">
              <text:p text:style-name="P249">Zweihändig, 2 Slots</text:p>
            </table:table-cell>
          </table:table-row>
          <table:table-row>
            <table:table-cell table:style-name="Table9.A7" office:value-type="string">
              <text:p text:style-name="P247">Langbogen</text:p>
            </table:table-cell>
            <table:table-cell table:style-name="Table9.B7" office:value-type="string">
              <text:p text:style-name="P248">80</text:p>
            </table:table-cell>
            <table:table-cell table:style-name="Table9.C7" office:value-type="string">
              <text:p text:style-name="P244">3</text:p>
            </table:table-cell>
            <table:table-cell table:style-name="Table9.D7" office:value-type="string">
              <text:p text:style-name="P249">Zweihändig, 2 Slots, Fernkampf</text:p>
            </table:table-cell>
          </table:table-row>
          <table:table-row>
            <table:table-cell table:style-name="Table9.A8" office:value-type="string">
              <text:p text:style-name="P257">Handarmbrust</text:p>
            </table:table-cell>
            <table:table-cell table:style-name="Table9.B8" office:value-type="string">
              <text:p text:style-name="P248">150</text:p>
            </table:table-cell>
            <table:table-cell table:style-name="Table9.C8" office:value-type="string">
              <text:p text:style-name="P244">2</text:p>
            </table:table-cell>
            <table:table-cell table:style-name="Table9.D8" office:value-type="string">
              <text:p text:style-name="P257">Fernkampf</text:p>
            </table:table-cell>
          </table:table-row>
          <table:table-row>
            <table:table-cell table:style-name="Table9.A9" office:value-type="string">
              <text:p text:style-name="P250">Armbrust</text:p>
            </table:table-cell>
            <table:table-cell table:style-name="Table9.B9" office:value-type="string">
              <text:p text:style-name="P248">210</text:p>
            </table:table-cell>
            <table:table-cell table:style-name="Table9.C9" office:value-type="string">
              <text:p text:style-name="P244">3</text:p>
            </table:table-cell>
            <table:table-cell table:style-name="Table9.D9" office:value-type="string">
              <text:p text:style-name="P251">Zweihändig, 2 Slots, Fernkampf, Aktion zum Nachladen</text:p>
            </table:table-cell>
          </table:table-row>
        </table:table>
        <text:p text:style-name="P258"/>
        <text:h text:style-name="Heading_20_3" text:outline-level="3">Fokus (Bonus <text:span text:style-name="T151">auf </text:span>Zauberei)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259">Name</text:p>
            </table:table-cell>
            <table:table-cell table:style-name="Table1.A1" office:value-type="string">
              <text:p text:style-name="P260">Preis</text:p>
            </table:table-cell>
            <table:table-cell table:style-name="Table1.A1" office:value-type="string">
              <text:p text:style-name="P240">BO</text:p>
            </table:table-cell>
            <table:table-cell table:style-name="Table1.A1" office:value-type="string">
              <text:p text:style-name="P241">Besonderheiten</text:p>
            </table:table-cell>
          </table:table-row>
          <table:table-row>
            <table:table-cell table:style-name="Table1.A2" office:value-type="string">
              <text:p text:style-name="P261">Ritualdolch</text:p>
            </table:table-cell>
            <table:table-cell table:style-name="Table1.B2" office:value-type="string">
              <text:p text:style-name="P262">80</text:p>
            </table:table-cell>
            <table:table-cell table:style-name="Table1.C2" office:value-type="string">
              <text:p text:style-name="P244">1</text:p>
            </table:table-cell>
            <table:table-cell table:style-name="Table1.D2" office:value-type="string">
              <text:p text:style-name="P263"/>
            </table:table-cell>
          </table:table-row>
          <table:table-row>
            <table:table-cell table:style-name="Table1.A2" office:value-type="string">
              <text:p text:style-name="P261">Zepter</text:p>
            </table:table-cell>
            <table:table-cell table:style-name="Table1.B2" office:value-type="string">
              <text:p text:style-name="P262">120</text:p>
            </table:table-cell>
            <table:table-cell table:style-name="Table1.C2" office:value-type="string">
              <text:p text:style-name="P244">2</text:p>
            </table:table-cell>
            <table:table-cell table:style-name="Table1.D2" office:value-type="string">
              <text:p text:style-name="P263"/>
            </table:table-cell>
          </table:table-row>
          <table:table-row>
            <table:table-cell table:style-name="Table1.A4" office:value-type="string">
              <text:p text:style-name="P261">Zauberstab</text:p>
            </table:table-cell>
            <table:table-cell table:style-name="Table1.B4" office:value-type="string">
              <text:p text:style-name="P262">250</text:p>
            </table:table-cell>
            <table:table-cell table:style-name="Table1.C4" office:value-type="string">
              <text:p text:style-name="P244">3</text:p>
            </table:table-cell>
            <table:table-cell table:style-name="Table1.D4" office:value-type="string">
              <text:p text:style-name="P264">Zweihändig, 2 Slots</text:p>
            </table:table-cell>
          </table:table-row>
        </table:table>
        <text:p text:style-name="P265"/>
        <text:p text:style-name="P266">Kapitel <text:span text:style-name="T18">x</text:span><text:span text:style-name="T156">x: </text:span><text:span text:style-name="T157">Vorteile</text:span></text:p>
        <text:p text:style-name="P267">Vorteile verkörpern besondere Personen, Beziehungen <text:span text:style-name="T158">oder </text:span>Ressourcen, auf die dein Charakter zurückgreifen kann.</text:p>
        <text:p text:style-name="P268"/>
        <text:section text:style-name="Sect2" text:name="Section3">
          <text:h text:style-name="P269" text:outline-level="2">Flexibilität</text:h>
          <text:p text:style-name="P268">Vorteile sind dynamisch und können sich im Laufe des Spiels verändern, verloren gehen oder neu gewonnen werden.</text:p>
          <text:p text:style-name="P268">So kann dein Held beispielsweise den Vorteil Reich erhalten, wenn er einen Schatz hebt.</text:p>
          <text:p text:style-name="P268">Besitzt er bereits fünf Vorteile, muss er dafür einen bestehenden Vorteil aufgeben, <text:span text:style-name="T158">z.B. </text:span>indem er seine Kontakte bei der Polizei vernachlässigt, um sein neues Luxusleben zu genießen.</text:p>
          <text:p text:style-name="P268"/>
          <text:h text:style-name="P269" text:outline-level="2"><text:span text:style-name="T159">Optional: </text:span><text:span text:style-name="T160">Erweiterter</text:span> Vorteil</text:h>
          <text:p text:style-name="P270">Bei Bedarf kannst du einen bestehenden Vorteil um eine besondere Eigenschaft erweitern.</text:p>
          <text:p text:style-name="P270">So könnte dein loyaler Jagdhund (Gefährte) beispielsweise telepathisch mit dir kommunizieren, oder dein Familienschwert teleportiert sich auf Kommando in deine Hand.</text:p>
          <text:p text:style-name="P270">Eine solche Erweiterung belegt allerdings einen eigenen Vorteilsslot.</text:p>
          <text:h text:style-name="P269" text:outline-level="2">Minions</text:h>
          <text:p text:style-name="P270">Minions sind NSCs, die deinem Helden loyal zur Seite stehen. Sie werden vom Erzähler kontrolliert, aber du legst die Proben für sie ab.</text:p>
          <text:p text:style-name="P270">Anstelle von Fertigkeiten besitzen sie ein Level, das deiner höchsten Fertigkeit entspricht.</text:p>
          <text:p text:style-name="P270">Proben, die der Minion besonders gut beherrscht, legt er mit seinem vollen Level ab. Für alle anderen Proben verwendet er sein halbes Level (aufrunden).</text:p>
          <text:p text:style-name="P270">Minions können Werkzeuge benutzen, um den üblichen Bonus von +2 zu erhalten, besitzen jedoch keine Spezialisierungen.</text:p>
          <text:p text:style-name="P270">Schwache Minions sind nicht besonders robust und gehen bereits nach einem Punkt Schaden zu Boden.</text:p>
          <text:p text:style-name="P270"/>
          <text:p text:style-name="P270"/>
          <text:p text:style-name="P270"/>
          <text:p text:style-name="P270"/>
        </text:section>
        <text:p text:style-name="P267"/>
        <text:h text:style-name="P271" text:outline-level="2">Beispiel <text:span text:style-name="T161">Vorteile</text:span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Header">Name</text:p>
            </table:table-cell>
            <table:table-cell table:style-name="Table3.A1" office:value-type="string">
              <text:p text:style-name="Table_20_Header">Beschreibung</text:p>
            </table:table-cell>
          </table:table-row>
          <table:table-row>
            <table:table-cell table:style-name="Table3.A2" office:value-type="string">
              <text:p text:style-name="Table_20_Contents">Gefährte</text:p>
            </table:table-cell>
            <table:table-cell table:style-name="Table3.B2" office:value-type="string">
              <text:p text:style-name="Table_20_Contents">Du hast einen kompetenten Minion der dir loyal zur Seite steht (z.B. Jagdhund oder Bodyguard).</text:p>
            </table:table-cell>
          </table:table-row>
          <table:table-row>
            <table:table-cell table:style-name="Table3.A2" office:value-type="string">
              <text:p text:style-name="Table_20_Contents">Fahrzeug</text:p>
            </table:table-cell>
            <table:table-cell table:style-name="Table3.B2" office:value-type="string">
              <text:p text:style-name="Table_20_Contents">Du besitzt ein <text:span text:style-name="T162">eigenes </text:span>Fahrzeug (z.B. <text:span text:style-name="T163">Kutsche, Pferd oder Schiff</text:span>).</text:p>
            </table:table-cell>
          </table:table-row>
          <table:table-row>
            <table:table-cell table:style-name="Table3.A4" office:value-type="string">
              <text:p text:style-name="Table_20_Contents">Kontakte</text:p>
            </table:table-cell>
            <table:table-cell table:style-name="Table3.B4" office:value-type="string">
              <text:p text:style-name="Table_20_Contents">Du hast Kontakte in einer Organisation (z.B. <text:span text:style-name="T163">Adel oder </text:span>Kirche), die dich mit Informationen und kleineren Gefallen unterstützen.</text:p>
            </table:table-cell>
          </table:table-row>
          <table:table-row>
            <table:table-cell table:style-name="Table3.A4" office:value-type="string">
              <text:p text:style-name="Table_20_Contents">Mentor</text:p>
            </table:table-cell>
            <table:table-cell table:style-name="Table3.B4" office:value-type="string">
              <text:p text:style-name="Table_20_Contents">Eine mächtige Person <text:span text:style-name="T162">(z.B. Adliger </text:span><text:span text:style-name="T163">oder Magier</text:span><text:span text:style-name="T162">) </text:span><text:span text:style-name="T164">steht mit Rat und Tat zur Seite.</text:span></text:p>
            </table:table-cell>
          </table:table-row>
          <table:table-row>
            <table:table-cell table:style-name="Table3.A6" office:value-type="string">
              <text:p text:style-name="Table_20_Contents">Personal</text:p>
            </table:table-cell>
            <table:table-cell table:style-name="Table3.B6" office:value-type="string">
              <text:p text:style-name="Table_20_Contents">Du befehligst eine Gruppe <text:span text:style-name="T158">schwacher</text:span> Minions (z.B. <text:span text:style-name="T163">Schläger</text:span>).</text:p>
            </table:table-cell>
          </table:table-row>
          <table:table-row>
            <table:table-cell table:style-name="Table3.A7" office:value-type="string">
              <text:p text:style-name="Table_20_Contents">Ruhm</text:p>
            </table:table-cell>
            <table:table-cell table:style-name="Table3.B7" office:value-type="string">
              <text:p text:style-name="Table_20_Contents">Du bist <text:span text:style-name="T163">berühmt als Abenteurer, Künstler oder dergleichen.</text:span></text:p>
            </table:table-cell>
          </table:table-row>
          <table:table-row>
            <table:table-cell table:style-name="Table3.A8" office:value-type="string">
              <text:p text:style-name="Table_20_Contents">Status</text:p>
            </table:table-cell>
            <table:table-cell table:style-name="Table3.B8" office:value-type="string">
              <text:p text:style-name="Table_20_Contents">Du bist ein angesehenes Mitglied einer wichtigen Organisation (z.B. Adel <text:span text:style-name="T163">oder Kirche</text:span>).</text:p>
            </table:table-cell>
          </table:table-row>
          <table:table-row>
            <table:table-cell table:style-name="Table3.A9" office:value-type="string">
              <text:p text:style-name="Table_20_Contents">Verbündeter</text:p>
            </table:table-cell>
            <table:table-cell table:style-name="Table3.B9" office:value-type="string">
              <text:p text:style-name="Table_20_Contents">Eine mächtige Person oder Organisation steht dir zur Seite.</text:p>
            </table:table-cell>
          </table:table-row>
          <table:table-row>
            <table:table-cell table:style-name="Table3.A10" office:value-type="string">
              <text:p text:style-name="Table_20_Contents">Zuflucht</text:p>
            </table:table-cell>
            <table:table-cell table:style-name="Table3.B10" office:value-type="string">
              <text:p text:style-name="Table_20_Contents">Du hast einen sicheren oder geheimen Rückzugsort <text:s/>(z.B. gesicherte Villa oder geheime Basis).</text:p>
            </table:table-cell>
          </table:table-row>
        </table:table>
        <text:p text:style-name="P30">Kapitel <text:span text:style-name="T165">XX: Regeln</text:span></text:p>
        <text:p text:style-name="P272"><text:span text:style-name="T166">Für den</text:span> Großteil des Spiels <text:span text:style-name="T166">erzählt ihr eine Geschichte. Die</text:span> Spieler übernehmen die Rolle <text:span text:style-name="T166">der</text:span> Helden <text:span text:style-name="T166">und</text:span> der Erzähler <text:span text:style-name="T167">übernimmt den Rest der Welt. </text:span>Für bestimmte Situationen gibt es jedoch Regeln, die den Ausgang der Geschichte bestimmen.</text:p>
        <text:p text:style-name="P272"/>
        <text:p text:style-name="P272"><text:span text:style-name="T3">Hinweis</text:span>: <text:span text:style-name="T168">Anderswelt ist ein spielerorientiertes System. </text:span><text:span text:style-name="T169">Das bedeutet, d</text:span><text:span text:style-name="T168">er Erzähler würfelt niemals. </text:span><text:span text:style-name="T169">A</text:span><text:span text:style-name="T168">lle Proben werden von den Spielern abgelegt.</text:span></text:p>
        <text:p text:style-name="P272"/>
        <text:section text:style-name="Sect3" text:name="Section9">
          <text:h text:style-name="P273" text:outline-level="2">Einfache Probe</text:h>
          <text:p text:style-name="P274">Der Spielleiter bestimmt die passende Fertigkeit und die Schwierigkeit der Probe. Würfle anschließend 1W20.</text:p>
          <text:p text:style-name="P274">Ist das Ergebnis kleiner oder gleich deiner Fertigkeit abzüglich der Schwierigkeit, gelingt die Probe.</text:p>
          <text:p text:style-name="P274">Eine natürliche 1 ist ein meisterlicher Erfolg, eine natürliche 20 immer ein Fehlschlag.</text:p>
          <text:p text:style-name="P275"/>
          <table:table table:name="Table5" table:style-name="Table5">
            <table:table-column table:style-name="Table5.A"/>
            <table:table-column table:style-name="Table5.B"/>
            <table:table-row>
              <table:table-cell table:style-name="Table5.A1" office:value-type="string">
                <text:p text:style-name="P276">Malus</text:p>
              </table:table-cell>
              <table:table-cell table:style-name="Table5.A1" office:value-type="string">
                <text:p text:style-name="Table_20_Header">Schwierigkeit</text:p>
              </table:table-cell>
            </table:table-row>
            <table:table-row>
              <table:table-cell table:style-name="Table5.A2" office:value-type="string">
                <text:p text:style-name="P277">-0</text:p>
              </table:table-cell>
              <table:table-cell table:style-name="Table5.B2" office:value-type="string">
                <text:p text:style-name="Table_20_Contents">Simpel</text:p>
              </table:table-cell>
            </table:table-row>
            <table:table-row>
              <table:table-cell table:style-name="Table5.A2" office:value-type="string">
                <text:p text:style-name="P278">-<text:span text:style-name="T170">3</text:span></text:p>
              </table:table-cell>
              <table:table-cell table:style-name="Table5.B3" office:value-type="string">
                <text:p text:style-name="Table_20_Contents">Normal</text:p>
              </table:table-cell>
            </table:table-row>
            <table:table-row>
              <table:table-cell table:style-name="Table5.A4" office:value-type="string">
                <text:p text:style-name="Table_20_Contents">-<text:span text:style-name="T170">6</text:span></text:p>
              </table:table-cell>
              <table:table-cell table:style-name="Table5.B4" office:value-type="string">
                <text:p text:style-name="Table_20_Contents">Schwer</text:p>
              </table:table-cell>
            </table:table-row>
            <table:table-row>
              <table:table-cell table:style-name="Table5.A4" office:value-type="string">
                <text:p text:style-name="P277">-9</text:p>
              </table:table-cell>
              <table:table-cell table:style-name="Table5.B5" office:value-type="string">
                <text:p text:style-name="Table_20_Contents">Sehr Schwer</text:p>
              </table:table-cell>
            </table:table-row>
            <table:table-row>
              <table:table-cell table:style-name="Table5.A6" office:value-type="string">
                <text:p text:style-name="Table_20_Contents">-<text:span text:style-name="T170">12</text:span></text:p>
              </table:table-cell>
              <table:table-cell table:style-name="Table5.B6" office:value-type="string">
                <text:p text:style-name="Table_20_Contents">Extrem</text:p>
              </table:table-cell>
            </table:table-row>
          </table:table>
          <text:p text:style-name="P279"/>
          <text:h text:style-name="Heading_20_3" text:outline-level="3">Vor- und Nachteile</text:h>
          <text:p text:style-name="P280">Talente und Umstände können Vor- und Nachteile verleihen.</text:p>
          <text:list text:style-name="L7">
            <text:list-item>
              <text:p text:style-name="P281">Überwiegen die Vorteile, würfel 2W20 und verwendest das bessere Ergebnis.</text:p>
            </text:list-item>
            <text:list-item>
              <text:p text:style-name="P281">Überwiegen die Nachteile, würfel 2W20 und verwende das schlechtere Ergebnis.</text:p>
            </text:list-item>
            <text:list-item>
              <text:p text:style-name="P281">Gleichen sich Vor- und Nachteile aus, würfle normal.</text:p>
            </text:list-item>
          </text:list>
          <text:h text:style-name="Heading_20_2" text:outline-level="2">Vergleich</text:h>
          <text:p text:style-name="P280">Wenn Spielercharaktere miteinander konkurrieren, wird ein Vergleich durchgeführt.</text:p>
          <text:p text:style-name="P280">Alle Beteiligten legen eine passende Probe ab.</text:p>
          <text:p text:style-name="P280">Besteht nur ein Charakter die Probe, gewinnt er den Vergleich.</text:p>
          <text:p text:style-name="P280">Bestehen mehrere Charaktere die Probe, gewinnt derjenige mit dem höchsten <text:span text:style-name="T3">erfolgreichen</text:span> Würfelergebnis.</text:p>
          <text:p text:style-name="P280">Bei Gleichstand endet der Vergleich unentschieden.</text:p>
          <text:p text:style-name="P280"/>
          <text:h text:style-name="P282" text:outline-level="2">Minions</text:h>
          <text:p text:style-name="P283">Verbündete, beschworene Kreaturen und ähnliche Begleiter werden als Minions bezeichnet.</text:p>
          <text:p text:style-name="P283">Minions werden vom zugehörigen Spieler gesteuert. Für Aufgaben, die sie gut beherrschen, verwenden sie den höchsten Fertigkeitswert ihres Spielers. Für alle anderen Proben besitzen sie einen Fertigkeitswert von 10.</text:p>
          <text:p text:style-name="P283">Minions verfügen über keine Talente oder Spezialisierungen und gehen mit 2 Schaden zu Boden.</text:p>
        </text:section>
      </text:section>
      <text:section text:style-name="Sect1" text:name="Section8">
        <text:p text:style-name="Standard"/>
        <text:p text:style-name="P30">Kapitel <text:span text:style-name="T165">X</text:span><text:span text:style-name="T171">X: Action</text:span></text:p>
        <text:p text:style-name="Standard">Action-Szenen wie Kämpfe, Verfolgungsjagden oder ähnliche Konflikte werden in Runden von jeweils 6 Sekunden abgehandelt. Bei Bedarf kann die <text:span text:style-name="T172">Umgebung die Position der Figuren auch</text:span> mit einer Skizze <text:span text:style-name="T172">verdeutlicht</text:span> werden.</text:p>
        <text:p text:style-name="Standard"/>
        <text:section text:style-name="Sect2" text:name="Section2">
          <text:h text:style-name="Heading_20_2" text:outline-level="2">Reihenfolge</text:h>
          <text:p text:style-name="Standard">Jeder Beteiligte handelt einmal pro Runde. Die Reihenfolge geht im Uhrzeigersinn. Der erste Zug gehört dem Spieler, der die Szene auslöst.</text:p>
          <text:p text:style-name="Standard"/>
          <text:h text:style-name="Heading_20_2" text:outline-level="2">Spielerzug</text:h>
          <text:p text:style-name="P284">In deinem Zug kannst du dich bewegen und eine Aktion ausführen.</text:p>
          <text:p text:style-name="P284">Menschen bewegen sich bis zu 9 Meter, sofern sie nicht durch schwieriges Gelände gebremst werden.</text:p>
          <text:p text:style-name="P284">Typische Aktionen sind:</text:p>
          <text:list text:style-name="L8">
            <text:list-item>
              <text:p text:style-name="P285">Attackieren</text:p>
            </text:list-item>
            <text:list-item>
              <text:p text:style-name="P285">Eine Waffe ziehen oder wechseln</text:p>
            </text:list-item>
            <text:list-item>
              <text:p text:style-name="P286">Gegenstand benutzen</text:p>
            </text:list-item>
            <text:list-item>
              <text:p text:style-name="P285">Sprinten (erneut bewegen)</text:p>
            </text:list-item>
          </text:list>
          <text:p text:style-name="P287">Kleine Handlungen, wie ein paar Worte zu sagen, <text:span text:style-name="T173">gelten als Nebensache und </text:span>erfordern keine Aktion.</text:p>
          <text:p text:style-name="P287"/>
          <text:p text:style-name="P288"><text:span text:style-name="T174">Hinweis, Minions</text:span><text:span text:style-name="T172">: </text:span><text:span text:style-name="T175">Minions</text:span><text:span text:style-name="T172"> handeln direkt nach ih</text:span><text:span text:style-name="T175">rem Spieler</text:span><text:span text:style-name="T172"> und benutzen die selben Regeln um sich zu Bewegen, Attackieren oder zu Verteidigen.</text:span></text:p>
          <text:p text:style-name="P289"/>
          <text:p text:style-name="P289"/>
          <text:p text:style-name="P289"/>
          <text:p text:style-name="P289"/>
          <text:h text:style-name="Heading_20_3" text:outline-level="3">Attacken</text:h>
          <text:p text:style-name="Standard">Um ein Ziel zu attackieren, legst du eine Probe auf Kämpfen ab.</text:p>
          <text:p text:style-name="Standard">Bei Erfolg erleidet das Ziel 1 Schaden (+1 Schaden bei einem meisterlichen Erfolg).</text:p>
          <text:p text:style-name="Standard"/>
          <text:p text:style-name="P290"><text:span text:style-name="T174">Hinweis, Fernkampf</text:span><text:span text:style-name="T172">: </text:span>Im Fernkampf erleidest du Nachteil, wenn das Ziel weit entfernt oder in Deckung ist.</text:p>
          <text:p text:style-name="Standard"/>
          <text:p text:style-name="P290"><text:span text:style-name="T174">Hinweis, Waffenlos</text:span><text:span text:style-name="T172">: </text:span>Im unbewaffneten Nahkampf kannst du statt Schaden anzurichten das Ziel festhalten oder ihm einen Gegenstand entreißen, sofern dies plausibel ist.</text:p>
          <text:p text:style-name="Standard"/>
          <text:h text:style-name="Heading_20_2" text:outline-level="2">Erzählerzug</text:h>
          <text:p text:style-name="Standard">Der Erzähler kontrolliert alle Figuren, die nicht von Spielern gesteuert werden.</text:p>
          <text:p text:style-name="Standard">Greift eine solche Figur einen Helden an, darf dieser eine Probe auf Zähigkeit (Parade) ablegen, um den Angriff abzuwehren.</text:p>
          <text:p text:style-name="Standard">Misslingt die Probe, erleidet das Ziel 1 Schaden.</text:p>
          <text:p text:style-name="Standard"/>
          <text:p text:style-name="P290"><text:span text:style-name="T3">Hinweis, </text:span><text:span text:style-name="T174">Multiparade</text:span>: Die meisten Figuren können <text:span text:style-name="T175">sich nur auf eine Parade pro Runde konzentrieren. </text:span>Jede weitere erleidet <text:span text:style-name="T172">einen</text:span> Nachteil.</text:p>
          <text:p text:style-name="P291"><text:span text:style-name="T176"/></text:p>
        </text:section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Bold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adornments="Regular" style:font-family-generic="roman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4.99pt" style:contextual-spacing="false" fo:line-height="100%" fo:text-align="left" style:justify-single-word="false" fo:keep-together="always" fo:orphans="2" fo:widows="2" style:writing-mode="lr-tb">
        <style:tab-stops/>
      </style:paragraph-properties>
      <style:text-properties fo:color="#10141f" loext:opacity="100%" style:font-name="Noto Serif" fo:font-family="'Noto Serif'" style:font-style-name="Regular" style:font-family-generic="roman" style:font-pitch="variable" fo:font-size="11pt" fo:font-weight="normal" style:font-size-asian="12pt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next-style-name="Standard" loext:linked-style-name="Überschrift_20_1_20_Zchn" style:default-outline-level="" style:list-style-name="" style:class="chapter" style:master-page-name="">
      <loext:graphic-properties draw:fill="solid" draw:fill-color="#10141f"/>
      <style:paragraph-properties fo:margin-left="0pt" fo:margin-top="0pt" fo:margin-bottom="20.01pt" style:contextual-spacing="false" fo:line-height="100%" fo:text-align="center" style:justify-single-word="false" fo:orphans="2" fo:widows="2" style:register-true="false" fo:text-indent="0pt" style:auto-text-indent="false" style:page-number="auto" fo:background-color="#10141f" fo:padding-left="0pt" fo:padding-right="0pt" fo:padding-top="15pt" fo:padding-bottom="15pt" fo:border="none" text:number-lines="true" text:line-number="0" style:snap-to-layout-grid="false" style:writing-mode="lr-tb" style:join-border="false">
        <style:tab-stops/>
        <style:drop-cap/>
      </style:paragraph-properties>
      <style:text-properties fo:font-variant="small-caps" fo:color="#ffffff" loext:opacity="100%" style:text-outline="false" style:font-name="Bangers" fo:font-family="Bangers" style:font-style-name="Bold" style:font-pitch="variable" fo:font-size="32pt" fo:letter-spacing="0.99pt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loext:graphic-properties draw:fill="none" draw:fill-color="#191919"/>
      <style:paragraph-properties fo:margin-top="0pt" fo:margin-bottom="3pt" style:contextual-spacing="false" fo:line-height="100%" fo:text-align="left" style:justify-single-word="false" fo:orphans="2" fo:widows="2" style:page-number="auto" fo:background-color="transparent" fo:padding-left="0pt" fo:padding-right="0pt" fo:padding-top="0pt" fo:padding-bottom="0.99pt" fo:border-left="none" fo:border-right="none" fo:border-top="none" fo:border-bottom="0.51pt solid #191919" style:writing-mode="lr-tb">
        <style:tab-stops/>
      </style:paragraph-properties>
      <style:text-properties fo:font-variant="small-caps" fo:color="#10141f" loext:opacity="100%" style:font-name="Bangers" fo:font-family="Bangers" style:font-style-name="Bold" style:font-pitch="variable" fo:font-size="22pt" fo:letter-spacing="0.99pt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loext:graphic-properties draw:fill="none" draw:fill-color="#000000"/>
      <style:paragraph-properties fo:margin-top="0pt" fo:margin-bottom="3pt" style:contextual-spacing="false" fo:line-height="100%" style:page-number="auto" fo:background-color="transparent"/>
      <style:text-properties fo:font-variant="normal" fo:text-transform="none" style:use-window-font-color="true" loext:opacity="0%" style:font-name="Bangers" fo:font-family="Bangers" style:font-style-name="Bold" style:font-pitch="variable" fo:font-size="14pt" fo:letter-spacing="1.19pt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pt" fo:margin-right="0pt" fo:margin-top="0pt" fo:margin-bottom="0pt" style:contextual-spacing="true" fo:text-align="center" style:justify-single-word="false" fo:orphans="0" fo:widows="0" fo:text-indent="0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TalentHeader" style:family="paragraph" style:parent-style-name="Heading_20_3" style:master-page-name="">
      <loext:graphic-properties draw:fill="solid" draw:fill-color="#10141f"/>
      <style:paragraph-properties fo:margin-left="4.99pt" fo:text-align="left" style:justify-single-word="false" fo:text-indent="0pt" style:auto-text-indent="false" style:page-number="auto" fo:background-color="#10141f" fo:padding-left="4.99pt" fo:padding-right="0pt" fo:padding-top="0.99pt" fo:padding-bottom="0.99pt" fo:border="none"/>
      <style:text-properties fo:color="#ffffff" loext:opacity="100%" style:font-name="Crimson Text" fo:font-family="'Crimson Text'" style:font-style-name="Bold" style:font-pitch="variable" fo:font-size="12pt" fo:font-weight="bold"/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right" style:justify-single-word="false"/>
    </style:style>
    <style:page-layout style:name="Mpm1">
      <style:page-layout-properties fo:page-width="595.3pt" fo:page-height="841.89pt" style:num-format="1" style:print-orientation="portrait" fo:margin-top="45.01pt" fo:margin-bottom="45.01pt" fo:margin-left="45.01pt" fo:margin-right="45.01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columns fo:column-count="1" fo:column-gap="0pt"/>
        <style:footnote-sep style:width="0.51pt" style:distance-before-sep="2.89pt" style:distance-after-sep="2.89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19.5pt" fo:page-height="595.3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95.3pt" fo:page-height="419.5pt" style:num-format="1" style:print-orientation="landscape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  <style:footer-left>
        <text:p text:style-name="MP1"><text:page-number text:select-page="current">22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717</meta:editing-cycles>
    <meta:creation-date>2020-04-16T07:43:00</meta:creation-date>
    <dc:date>2026-06-16T17:42:14.529698105</dc:date>
    <meta:generator>LibreOffice/26.2.3.2$Linux_X86_64 LibreOffice_project/70e089b17412e4cb7773e41413306b17a2328c34</meta:generator>
    <meta:editing-duration>P1DT12H5M54S</meta:editing-duration>
    <meta:print-date>2026-04-02T15:54:51.081337174</meta:print-date>
    <meta:document-statistic meta:table-count="9" meta:image-count="0" meta:object-count="0" meta:page-count="22" meta:paragraph-count="573" meta:word-count="3754" meta:character-count="24878" meta:non-whitespace-character-count="21757"/>
    <meta:template xlink:type="simple" xlink:actuate="onRequest" xlink:title="Normal" xlink:href=""/>
  </office:meta>
</office:document-meta>
</file>