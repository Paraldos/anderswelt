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1" style:family="table">
      <style:table-properties style:width="505.3pt" table:align="margins" style:writing-mode="lr-tb"/>
    </style:style>
    <style:style style:name="Table1.A" style:family="table-column">
      <style:table-column-properties style:column-width="161.2pt" style:rel-column-width="20905*"/>
    </style:style>
    <style:style style:name="Table1.B" style:family="table-column">
      <style:table-column-properties style:column-width="69.65pt" style:rel-column-width="9033*"/>
    </style:style>
    <style:style style:name="Table1.C" style:family="table-column">
      <style:table-column-properties style:column-width="274.45pt" style:rel-column-width="35597*"/>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C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none" fo:border-top="none" fo:border-bottom="0.5pt solid #000000"/>
    </style:style>
    <style:style style:name="Table1.C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none" fo:border-top="none" fo:border-bottom="0.5pt solid #000000"/>
    </style:style>
    <style:style style:name="Table1.C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none" fo:border-top="none" fo:border-bottom="0.5pt solid #000000"/>
    </style:style>
    <style:style style:name="Table1.C4" style:family="table-cell">
      <style:table-cell-properties fo:padding="2.75pt" fo:border-left="0.5pt solid #000000" fo:border-right="0.5pt solid #000000" fo:border-top="none" fo:border-bottom="0.5pt solid #000000"/>
    </style:style>
    <style:style style:name="Table1.A5" style:family="table-cell">
      <style:table-cell-properties fo:padding="2.75pt" fo:border-left="0.5pt solid #000000" fo:border-right="none" fo:border-top="none" fo:border-bottom="0.5pt solid #000000"/>
    </style:style>
    <style:style style:name="Table1.B5" style:family="table-cell">
      <style:table-cell-properties fo:padding="2.75pt" fo:border-left="0.5pt solid #000000" fo:border-right="none" fo:border-top="none" fo:border-bottom="0.5pt solid #000000"/>
    </style:style>
    <style:style style:name="Table1.C5" style:family="table-cell">
      <style:table-cell-properties fo:padding="2.75pt" fo:border-left="0.5pt solid #000000" fo:border-right="0.5pt solid #000000" fo:border-top="none" fo:border-bottom="0.5pt solid #000000"/>
    </style:style>
    <style:style style:name="Table1.A6" style:family="table-cell">
      <style:table-cell-properties fo:padding="2.75pt" fo:border-left="0.5pt solid #000000" fo:border-right="none" fo:border-top="none" fo:border-bottom="0.5pt solid #000000"/>
    </style:style>
    <style:style style:name="Table1.B6" style:family="table-cell">
      <style:table-cell-properties fo:padding="2.75pt" fo:border-left="0.5pt solid #000000" fo:border-right="none" fo:border-top="none" fo:border-bottom="0.5pt solid #000000"/>
    </style:style>
    <style:style style:name="Table1.C6" style:family="table-cell">
      <style:table-cell-properties fo:padding="2.75pt" fo:border-left="0.5pt solid #000000" fo:border-right="0.5pt solid #000000" fo:border-top="none" fo:border-bottom="0.5pt solid #000000"/>
    </style:style>
    <style:style style:name="Table1.A7" style:family="table-cell">
      <style:table-cell-properties fo:padding="2.75pt" fo:border-left="0.5pt solid #000000" fo:border-right="none" fo:border-top="none" fo:border-bottom="0.5pt solid #000000"/>
    </style:style>
    <style:style style:name="Table1.B7" style:family="table-cell">
      <style:table-cell-properties fo:padding="2.75pt" fo:border-left="0.5pt solid #000000" fo:border-right="none" fo:border-top="none" fo:border-bottom="0.5pt solid #000000"/>
    </style:style>
    <style:style style:name="Table1.C7" style:family="table-cell">
      <style:table-cell-properties fo:padding="2.75pt" fo:border-left="0.5pt solid #000000" fo:border-right="0.5pt solid #000000" fo:border-top="none" fo:border-bottom="0.5pt solid #000000"/>
    </style:style>
    <style:style style:name="Table3" style:family="table">
      <style:table-properties style:width="502.3pt" table:align="margins" style:shadow="#e8e8e8 3pt 3pt" style:writing-mode="lr-tb"/>
    </style:style>
    <style:style style:name="Table3.A" style:family="table-column">
      <style:table-column-properties style:column-width="108.4pt" style:rel-column-width="14144*"/>
    </style:style>
    <style:style style:name="Table3.B" style:family="table-column">
      <style:table-column-properties style:column-width="393.9pt" style:rel-column-width="51391*"/>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B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0.5pt solid #000000" fo:border-top="none" fo:border-bottom="0.5pt solid #000000"/>
    </style:style>
    <style:style style:name="Table8" style:family="table">
      <style:table-properties style:width="242.15pt" table:align="margins" style:shadow="#e8e8e8 3pt 3pt" style:writing-mode="lr-tb"/>
    </style:style>
    <style:style style:name="Table8.A" style:family="table-column">
      <style:table-column-properties style:column-width="52.25pt" style:rel-column-width="14144*"/>
    </style:style>
    <style:style style:name="Table8.B" style:family="table-column">
      <style:table-column-properties style:column-width="189.9pt" style:rel-column-width="51391*"/>
    </style:style>
    <style:style style:name="Table8.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8.B1" style:family="table-cell">
      <style:table-cell-properties fo:background-color="#000000" fo:padding-left="2pt" fo:padding-right="2pt" fo:padding-top="1pt" fo:padding-bottom="1pt" fo:border="0.5pt solid #000000">
        <style:background-image/>
      </style:table-cell-properties>
    </style:style>
    <style:style style:name="Table8.A2" style:family="table-cell">
      <style:table-cell-properties fo:padding-left="2pt" fo:padding-right="2pt" fo:padding-top="1pt" fo:padding-bottom="1pt" fo:border-left="0.5pt solid #000000" fo:border-right="none" fo:border-top="none" fo:border-bottom="0.5pt solid #000000"/>
    </style:style>
    <style:style style:name="Table8.B2" style:family="table-cell">
      <style:table-cell-properties fo:padding-left="2pt" fo:padding-right="2pt" fo:padding-top="1pt" fo:padding-bottom="1pt" fo:border-left="0.5pt solid #000000" fo:border-right="0.5pt solid #000000" fo:border-top="none" fo:border-bottom="0.5pt solid #000000"/>
    </style:style>
    <style:style style:name="Table8.A3" style:family="table-cell">
      <style:table-cell-properties fo:padding-left="2pt" fo:padding-right="2pt" fo:padding-top="1pt" fo:padding-bottom="1pt" fo:border-left="0.5pt solid #000000" fo:border-right="none" fo:border-top="none" fo:border-bottom="0.5pt solid #000000"/>
    </style:style>
    <style:style style:name="Table8.B3" style:family="table-cell">
      <style:table-cell-properties fo:padding-left="2pt" fo:padding-right="2pt" fo:padding-top="1pt" fo:padding-bottom="1pt" fo:border-left="0.5pt solid #000000" fo:border-right="0.5pt solid #000000" fo:border-top="none" fo:border-bottom="0.5pt solid #000000"/>
    </style:style>
    <style:style style:name="Table8.A4" style:family="table-cell">
      <style:table-cell-properties fo:padding-left="2pt" fo:padding-right="2pt" fo:padding-top="1pt" fo:padding-bottom="1pt" fo:border-left="0.5pt solid #000000" fo:border-right="none" fo:border-top="none" fo:border-bottom="0.5pt solid #000000"/>
    </style:style>
    <style:style style:name="Table8.B4" style:family="table-cell">
      <style:table-cell-properties fo:padding-left="2pt" fo:padding-right="2pt" fo:padding-top="1pt" fo:padding-bottom="1pt" fo:border-left="0.5pt solid #000000" fo:border-right="0.5pt solid #000000" fo:border-top="none" fo:border-bottom="0.5pt solid #000000"/>
    </style:style>
    <style:style style:name="Table8.A5" style:family="table-cell">
      <style:table-cell-properties fo:padding-left="2pt" fo:padding-right="2pt" fo:padding-top="1pt" fo:padding-bottom="1pt" fo:border-left="0.5pt solid #000000" fo:border-right="none" fo:border-top="none" fo:border-bottom="0.5pt solid #000000"/>
    </style:style>
    <style:style style:name="Table8.B5" style:family="table-cell">
      <style:table-cell-properties fo:padding-left="2pt" fo:padding-right="2pt" fo:padding-top="1pt" fo:padding-bottom="1pt" fo:border-left="0.5pt solid #000000" fo:border-right="0.5pt solid #000000" fo:border-top="none" fo:border-bottom="0.5pt solid #000000"/>
    </style:style>
    <style:style style:name="Table8.A6" style:family="table-cell">
      <style:table-cell-properties fo:padding-left="2pt" fo:padding-right="2pt" fo:padding-top="1pt" fo:padding-bottom="1pt" fo:border-left="0.5pt solid #000000" fo:border-right="none" fo:border-top="none" fo:border-bottom="0.5pt solid #000000"/>
    </style:style>
    <style:style style:name="Table8.B6"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105c84a" officeooo:paragraph-rsid="0105c84a"/>
    </style:style>
    <style:style style:name="P3" style:family="paragraph" style:parent-style-name="Standard">
      <style:text-properties officeooo:paragraph-rsid="0105c84a"/>
    </style:style>
    <style:style style:name="P4" style:family="paragraph" style:parent-style-name="Standard" style:list-style-name="L1">
      <style:text-properties officeooo:paragraph-rsid="00f7eed7"/>
    </style:style>
    <style:style style:name="P5" style:family="paragraph" style:parent-style-name="Standard" style:list-style-name="L1">
      <style:text-properties officeooo:rsid="0105c84a" officeooo:paragraph-rsid="0105c84a"/>
    </style:style>
    <style:style style:name="P6" style:family="paragraph" style:parent-style-name="Standard" style:list-style-name="L1">
      <style:text-properties officeooo:paragraph-rsid="0139dde3"/>
    </style:style>
    <style:style style:name="P7" style:family="paragraph" style:parent-style-name="List_20_Paragraph" style:list-style-name="L2">
      <style:text-properties officeooo:rsid="011b3104" officeooo:paragraph-rsid="0139dde3"/>
    </style:style>
    <style:style style:name="P8" style:family="paragraph" style:parent-style-name="List_20_Paragraph" style:list-style-name="L2">
      <style:text-properties officeooo:rsid="01537011" officeooo:paragraph-rsid="01537011"/>
    </style:style>
    <style:style style:name="P9" style:family="paragraph" style:parent-style-name="Standard" style:list-style-name="L1">
      <style:text-properties officeooo:rsid="00fbd6a4" officeooo:paragraph-rsid="00fbd6a4"/>
    </style:style>
    <style:style style:name="P10" style:family="paragraph" style:parent-style-name="Standard" style:list-style-name="L1"/>
    <style:style style:name="P11" style:family="paragraph" style:parent-style-name="Standard" style:list-style-name="L1">
      <style:text-properties officeooo:paragraph-rsid="006cb291"/>
    </style:style>
    <style:style style:name="P12" style:family="paragraph" style:parent-style-name="Heading_20_1">
      <style:paragraph-properties fo:break-before="page"/>
      <style:text-properties officeooo:paragraph-rsid="003f62b7"/>
    </style:style>
    <style:style style:name="P13" style:family="paragraph" style:parent-style-name="Heading_20_1">
      <style:text-properties officeooo:rsid="0104135c" officeooo:paragraph-rsid="0104135c"/>
    </style:style>
    <style:style style:name="P14" style:family="paragraph" style:parent-style-name="Standard">
      <style:text-properties officeooo:paragraph-rsid="00d323f9"/>
    </style:style>
    <style:style style:name="P15" style:family="paragraph" style:parent-style-name="Heading_20_2">
      <style:text-properties officeooo:rsid="00ca99e7" officeooo:paragraph-rsid="00d323f9"/>
    </style:style>
    <style:style style:name="P16" style:family="paragraph" style:parent-style-name="Standard">
      <style:text-properties officeooo:rsid="00ca99e7" officeooo:paragraph-rsid="00d323f9"/>
    </style:style>
    <style:style style:name="P17" style:family="paragraph" style:parent-style-name="Standard">
      <style:text-properties officeooo:rsid="00c95a39" officeooo:paragraph-rsid="00d323f9"/>
    </style:style>
    <style:style style:name="P18" style:family="paragraph" style:parent-style-name="Heading_20_2">
      <style:text-properties officeooo:paragraph-rsid="0127a33f"/>
    </style:style>
    <style:style style:name="P19" style:family="paragraph" style:parent-style-name="Heading_20_3">
      <style:text-properties officeooo:paragraph-rsid="0127a33f"/>
    </style:style>
    <style:style style:name="P20" style:family="paragraph" style:parent-style-name="Standard">
      <style:text-properties officeooo:rsid="0127a33f" officeooo:paragraph-rsid="0127a33f"/>
    </style:style>
    <style:style style:name="P21" style:family="paragraph" style:parent-style-name="Standard">
      <style:text-properties officeooo:paragraph-rsid="0127a33f"/>
    </style:style>
    <style:style style:name="P22" style:family="paragraph" style:parent-style-name="Standard">
      <style:text-properties fo:font-weight="bold" officeooo:rsid="0127a33f" officeooo:paragraph-rsid="0127a33f" style:font-weight-asian="bold" style:font-weight-complex="bold"/>
    </style:style>
    <style:style style:name="P23" style:family="paragraph" style:parent-style-name="List_20_Paragraph" style:list-style-name="L3"/>
    <style:style style:name="P24" style:family="paragraph" style:parent-style-name="Standard">
      <style:text-properties officeooo:rsid="0127a33f" officeooo:paragraph-rsid="01297e03"/>
    </style:style>
    <style:style style:name="P25" style:family="paragraph" style:parent-style-name="Standard">
      <style:text-properties officeooo:paragraph-rsid="01297e03"/>
    </style:style>
    <style:style style:name="P26" style:family="paragraph" style:parent-style-name="Heading_20_3">
      <style:text-properties officeooo:rsid="012b3e17" officeooo:paragraph-rsid="012b3e17"/>
    </style:style>
    <style:style style:name="P27" style:family="paragraph" style:parent-style-name="Heading_20_3">
      <style:text-properties officeooo:rsid="01297e03" officeooo:paragraph-rsid="01297e03"/>
    </style:style>
    <style:style style:name="P28" style:family="paragraph" style:parent-style-name="List_20_Paragraph" style:list-style-name="L4"/>
    <style:style style:name="P29" style:family="paragraph" style:parent-style-name="List_20_Paragraph" style:list-style-name="L4">
      <style:text-properties officeooo:rsid="0127a33f" officeooo:paragraph-rsid="0127a33f"/>
    </style:style>
    <style:style style:name="P30" style:family="paragraph" style:parent-style-name="List_20_Paragraph" style:list-style-name="L4">
      <style:text-properties officeooo:rsid="01297e03" officeooo:paragraph-rsid="01297e03"/>
    </style:style>
    <style:style style:name="P31" style:family="paragraph" style:parent-style-name="Standard">
      <style:text-properties officeooo:rsid="0127a33f" officeooo:paragraph-rsid="01314709"/>
    </style:style>
    <style:style style:name="P32" style:family="paragraph" style:parent-style-name="Standard">
      <style:text-properties officeooo:paragraph-rsid="0132e82a"/>
    </style:style>
    <style:style style:name="P33" style:family="paragraph" style:parent-style-name="Standard">
      <style:text-properties officeooo:rsid="0127a33f" officeooo:paragraph-rsid="013558ad"/>
    </style:style>
    <style:style style:name="P34" style:family="paragraph" style:parent-style-name="List_20_Paragraph" style:list-style-name="L4">
      <style:text-properties officeooo:paragraph-rsid="013558ad"/>
    </style:style>
    <style:style style:name="P35" style:family="paragraph" style:parent-style-name="List_20_Paragraph">
      <style:text-properties officeooo:paragraph-rsid="013558ad"/>
    </style:style>
    <style:style style:name="P36" style:family="paragraph" style:parent-style-name="List_20_Paragraph" style:list-style-name="L4">
      <style:text-properties officeooo:paragraph-rsid="0137a58a"/>
    </style:style>
    <style:style style:name="P37" style:family="paragraph" style:parent-style-name="List_20_Paragraph" style:list-style-name="L4">
      <style:text-properties officeooo:paragraph-rsid="01380cb9"/>
    </style:style>
    <style:style style:name="P38" style:family="paragraph" style:parent-style-name="Standard">
      <style:text-properties officeooo:rsid="0127a33f" officeooo:paragraph-rsid="0132e82a"/>
    </style:style>
    <style:style style:name="P39" style:family="paragraph" style:parent-style-name="Table_20_Contents">
      <style:paragraph-properties fo:text-align="left" style:justify-single-word="false"/>
      <style:text-properties officeooo:rsid="00f7eed7" officeooo:paragraph-rsid="012e8789"/>
    </style:style>
    <style:style style:name="P40" style:family="paragraph" style:parent-style-name="Standard">
      <style:text-properties officeooo:rsid="00ccde7a"/>
    </style:style>
    <style:style style:name="P41" style:family="paragraph" style:parent-style-name="Heading_20_1">
      <style:paragraph-properties fo:break-before="page"/>
      <style:text-properties officeooo:paragraph-rsid="0149ceb2"/>
    </style:style>
    <style:style style:name="P42" style:family="paragraph" style:parent-style-name="Heading_20_2">
      <style:text-properties officeooo:paragraph-rsid="015530ac"/>
    </style:style>
    <style:style style:name="P43" style:family="paragraph" style:parent-style-name="TalentHeader">
      <style:text-properties officeooo:paragraph-rsid="0159bb1a"/>
    </style:style>
    <style:style style:name="P44" style:family="paragraph" style:parent-style-name="Standard">
      <style:text-properties officeooo:rsid="014b6f77" officeooo:paragraph-rsid="0159bb1a"/>
    </style:style>
    <style:style style:name="P45" style:family="paragraph" style:parent-style-name="TalentHeader">
      <style:text-properties officeooo:rsid="01503b34" officeooo:paragraph-rsid="0159bb1a"/>
    </style:style>
    <style:style style:name="P46" style:family="paragraph" style:parent-style-name="Standard">
      <style:text-properties officeooo:rsid="015530ac" officeooo:paragraph-rsid="0159bb1a"/>
    </style:style>
    <style:style style:name="P47" style:family="paragraph" style:parent-style-name="Standard">
      <style:text-properties officeooo:rsid="014b6f77" officeooo:paragraph-rsid="014b6f77"/>
    </style:style>
    <style:style style:name="P48" style:family="paragraph" style:parent-style-name="Heading_20_2">
      <style:paragraph-properties fo:break-before="page"/>
      <style:text-properties officeooo:rsid="0149ceb2" officeooo:paragraph-rsid="0149ceb2"/>
    </style:style>
    <style:style style:name="P49" style:family="paragraph" style:parent-style-name="Standard">
      <style:text-properties officeooo:rsid="013cfc33" officeooo:paragraph-rsid="0157ba6e"/>
    </style:style>
    <style:style style:name="P50" style:family="paragraph" style:parent-style-name="Standard">
      <style:text-properties officeooo:paragraph-rsid="013cfc33"/>
    </style:style>
    <style:style style:name="P51" style:family="paragraph" style:parent-style-name="Standard">
      <style:text-properties officeooo:rsid="013cfc33" officeooo:paragraph-rsid="013cfc33"/>
    </style:style>
    <style:style style:name="P52" style:family="paragraph" style:parent-style-name="Standard">
      <style:text-properties officeooo:rsid="013cfc33" officeooo:paragraph-rsid="01405cf9"/>
    </style:style>
    <style:style style:name="P53" style:family="paragraph" style:parent-style-name="Standard">
      <style:text-properties fo:font-weight="bold" officeooo:rsid="0144037e" officeooo:paragraph-rsid="0144037e" style:font-weight-asian="bold" style:font-weight-complex="bold"/>
    </style:style>
    <style:style style:name="P54" style:family="paragraph" style:parent-style-name="Standard">
      <style:text-properties officeooo:rsid="01405cf9" officeooo:paragraph-rsid="01405cf9"/>
    </style:style>
    <style:style style:name="P55" style:family="paragraph" style:parent-style-name="Standard">
      <style:text-properties officeooo:rsid="013c6743" officeooo:paragraph-rsid="013cfc33"/>
    </style:style>
    <style:style style:name="P56" style:family="paragraph" style:parent-style-name="Standard">
      <style:text-properties officeooo:rsid="013cfc33" officeooo:paragraph-rsid="014145a3"/>
    </style:style>
    <style:style style:name="P57" style:family="paragraph" style:parent-style-name="TalentHeader">
      <style:text-properties officeooo:rsid="0157ba6e" officeooo:paragraph-rsid="0157ba6e"/>
    </style:style>
    <style:style style:name="P58" style:family="paragraph" style:parent-style-name="Standard">
      <style:text-properties officeooo:rsid="013cfc33" officeooo:paragraph-rsid="013f71ff"/>
    </style:style>
    <style:style style:name="P59" style:family="paragraph" style:parent-style-name="Standard">
      <style:text-properties officeooo:rsid="014145a3" officeooo:paragraph-rsid="013cfc33"/>
    </style:style>
    <style:style style:name="P60" style:family="paragraph" style:parent-style-name="Standard">
      <style:text-properties officeooo:rsid="013cfc33" officeooo:paragraph-rsid="013c6743"/>
    </style:style>
    <style:style style:name="P61" style:family="paragraph" style:parent-style-name="Standard">
      <style:text-properties officeooo:rsid="013c6743" officeooo:paragraph-rsid="013dbb60"/>
    </style:style>
    <style:style style:name="P62" style:family="paragraph" style:parent-style-name="Heading_20_2">
      <style:paragraph-properties fo:break-before="page"/>
      <style:text-properties officeooo:rsid="01766d40" officeooo:paragraph-rsid="01766d40"/>
    </style:style>
    <style:style style:name="P63" style:family="paragraph" style:parent-style-name="Standard">
      <style:text-properties officeooo:rsid="01766d40" officeooo:paragraph-rsid="01766d40"/>
    </style:style>
    <style:style style:name="P64" style:family="paragraph" style:parent-style-name="TalentHeader">
      <style:text-properties officeooo:rsid="015e34d3" officeooo:paragraph-rsid="015e34d3"/>
    </style:style>
    <style:style style:name="P65" style:family="paragraph" style:parent-style-name="Standard">
      <style:text-properties officeooo:rsid="0159f948" officeooo:paragraph-rsid="015e34d3"/>
    </style:style>
    <style:style style:name="P66" style:family="paragraph" style:parent-style-name="Standard">
      <style:text-properties officeooo:rsid="015b2edc" officeooo:paragraph-rsid="015e34d3"/>
    </style:style>
    <style:style style:name="P67" style:family="paragraph" style:parent-style-name="Standard">
      <style:text-properties officeooo:rsid="015c1384" officeooo:paragraph-rsid="015e34d3"/>
    </style:style>
    <style:style style:name="P68" style:family="paragraph" style:parent-style-name="List_20_Paragraph" style:list-style-name="L5">
      <style:text-properties officeooo:rsid="015e34d3" officeooo:paragraph-rsid="0170ba8a"/>
    </style:style>
    <style:style style:name="P69" style:family="paragraph" style:parent-style-name="List_20_Paragraph">
      <style:text-properties officeooo:rsid="015e34d3" officeooo:paragraph-rsid="015e34d3"/>
    </style:style>
    <style:style style:name="P70" style:family="paragraph" style:parent-style-name="Standard">
      <style:text-properties officeooo:rsid="0159f948" officeooo:paragraph-rsid="01633829"/>
    </style:style>
    <style:style style:name="P71" style:family="paragraph" style:parent-style-name="Standard">
      <style:text-properties officeooo:rsid="015b2edc" officeooo:paragraph-rsid="01633829"/>
    </style:style>
    <style:style style:name="P72" style:family="paragraph" style:parent-style-name="Standard">
      <style:text-properties officeooo:rsid="01633829" officeooo:paragraph-rsid="01633829"/>
    </style:style>
    <style:style style:name="P73" style:family="paragraph" style:parent-style-name="Standard">
      <style:text-properties officeooo:rsid="015b2edc" officeooo:paragraph-rsid="0177c544"/>
    </style:style>
    <style:style style:name="P74" style:family="paragraph" style:parent-style-name="List_20_Paragraph" style:list-style-name="L5">
      <style:text-properties officeooo:rsid="01633829" officeooo:paragraph-rsid="01633829"/>
    </style:style>
    <style:style style:name="P75" style:family="paragraph" style:parent-style-name="List_20_Paragraph">
      <style:text-properties officeooo:rsid="015c1384" officeooo:paragraph-rsid="015e34d3"/>
    </style:style>
    <style:style style:name="P76" style:family="paragraph" style:parent-style-name="TalentHeader">
      <style:text-properties officeooo:rsid="015c1384" officeooo:paragraph-rsid="015c1384"/>
    </style:style>
    <style:style style:name="P77" style:family="paragraph" style:parent-style-name="Standard">
      <style:text-properties officeooo:rsid="0159f948" officeooo:paragraph-rsid="015c1384"/>
    </style:style>
    <style:style style:name="P78" style:family="paragraph" style:parent-style-name="Standard">
      <style:text-properties officeooo:rsid="015b2edc" officeooo:paragraph-rsid="015c1384"/>
    </style:style>
    <style:style style:name="P79" style:family="paragraph" style:parent-style-name="Standard">
      <style:text-properties officeooo:rsid="015c1384" officeooo:paragraph-rsid="015c1384"/>
    </style:style>
    <style:style style:name="P80" style:family="paragraph" style:parent-style-name="List_20_Paragraph" style:list-style-name="L5">
      <style:text-properties officeooo:rsid="01608c61" officeooo:paragraph-rsid="01608c61"/>
    </style:style>
    <style:style style:name="P81" style:family="paragraph" style:parent-style-name="List_20_Paragraph" style:list-style-name="L5">
      <style:text-properties officeooo:rsid="015c1384" officeooo:paragraph-rsid="015c1384"/>
    </style:style>
    <style:style style:name="P82" style:family="paragraph" style:parent-style-name="List_20_Paragraph" style:list-style-name="L5">
      <style:text-properties officeooo:rsid="01611b20" officeooo:paragraph-rsid="01611b20"/>
    </style:style>
    <style:style style:name="P83" style:family="paragraph" style:parent-style-name="List_20_Paragraph">
      <style:text-properties officeooo:rsid="015c1384" officeooo:paragraph-rsid="015c1384"/>
    </style:style>
    <style:style style:name="P84" style:family="paragraph" style:parent-style-name="TalentHeader">
      <style:text-properties officeooo:rsid="015b2edc" officeooo:paragraph-rsid="015b2edc"/>
    </style:style>
    <style:style style:name="P85" style:family="paragraph" style:parent-style-name="Standard">
      <style:text-properties officeooo:rsid="0159f948" officeooo:paragraph-rsid="015b2edc"/>
    </style:style>
    <style:style style:name="P86" style:family="paragraph" style:parent-style-name="Standard">
      <style:text-properties officeooo:rsid="015b2edc" officeooo:paragraph-rsid="015b2edc"/>
    </style:style>
    <style:style style:name="P87" style:family="paragraph" style:parent-style-name="Standard">
      <style:text-properties officeooo:rsid="015bf31d" officeooo:paragraph-rsid="015bf31d"/>
    </style:style>
    <style:style style:name="P88" style:family="paragraph" style:parent-style-name="List_20_Paragraph" style:list-style-name="L5">
      <style:text-properties officeooo:paragraph-rsid="015b2edc"/>
    </style:style>
    <style:style style:name="P89" style:family="paragraph" style:parent-style-name="List_20_Paragraph" style:list-style-name="L5">
      <style:text-properties officeooo:rsid="015b2edc" officeooo:paragraph-rsid="01633829"/>
    </style:style>
    <style:style style:name="P90" style:family="paragraph" style:parent-style-name="Standard">
      <style:text-properties officeooo:rsid="0159f948" officeooo:paragraph-rsid="0159f948"/>
    </style:style>
    <style:style style:name="P91" style:family="paragraph" style:parent-style-name="Standard">
      <style:text-properties officeooo:rsid="0159f948" officeooo:paragraph-rsid="015e0bb9"/>
    </style:style>
    <style:style style:name="P92" style:family="paragraph" style:parent-style-name="Standard">
      <style:text-properties officeooo:paragraph-rsid="013c6743"/>
    </style:style>
    <style:style style:name="P93" style:family="paragraph" style:parent-style-name="TalentHeader">
      <style:text-properties officeooo:rsid="01738eff" officeooo:paragraph-rsid="01738eff"/>
    </style:style>
    <style:style style:name="P94" style:family="paragraph" style:parent-style-name="Standard">
      <style:text-properties officeooo:rsid="0159f948" officeooo:paragraph-rsid="01738eff"/>
    </style:style>
    <style:style style:name="P95" style:family="paragraph" style:parent-style-name="Standard">
      <style:text-properties officeooo:rsid="015b2edc" officeooo:paragraph-rsid="01738eff"/>
    </style:style>
    <style:style style:name="P96" style:family="paragraph" style:parent-style-name="Standard">
      <style:text-properties officeooo:rsid="0174db33" officeooo:paragraph-rsid="0174db33"/>
    </style:style>
    <style:style style:name="P97" style:family="paragraph" style:parent-style-name="Standard">
      <style:text-properties officeooo:rsid="013c6743" officeooo:paragraph-rsid="013c6743"/>
    </style:style>
    <style:style style:name="P98" style:family="paragraph" style:parent-style-name="TalentHeader">
      <style:text-properties officeooo:rsid="015e0bb9" officeooo:paragraph-rsid="015e0bb9"/>
    </style:style>
    <style:style style:name="P99" style:family="paragraph" style:parent-style-name="Standard">
      <style:text-properties officeooo:rsid="015b2edc" officeooo:paragraph-rsid="016dddb2"/>
    </style:style>
    <style:style style:name="P100" style:family="paragraph" style:parent-style-name="Standard">
      <style:text-properties officeooo:rsid="015bf31d" officeooo:paragraph-rsid="015e0bb9"/>
    </style:style>
    <style:style style:name="P101" style:family="paragraph" style:parent-style-name="Standard">
      <style:text-properties officeooo:rsid="015e0bb9" officeooo:paragraph-rsid="015e0bb9"/>
    </style:style>
    <style:style style:name="P102" style:family="paragraph" style:parent-style-name="List_20_Paragraph" style:list-style-name="L5">
      <style:text-properties officeooo:rsid="015c1384" officeooo:paragraph-rsid="016e3d94"/>
    </style:style>
    <style:style style:name="P103" style:family="paragraph" style:parent-style-name="List_20_Paragraph" style:list-style-name="L5">
      <style:text-properties officeooo:rsid="015e0bb9" officeooo:paragraph-rsid="015e0bb9"/>
    </style:style>
    <style:style style:name="P104" style:family="paragraph" style:parent-style-name="Standard">
      <style:text-properties officeooo:rsid="013c6743" officeooo:paragraph-rsid="015e0bb9"/>
    </style:style>
    <style:style style:name="P105" style:family="paragraph" style:parent-style-name="Standard">
      <style:text-properties officeooo:rsid="0159f948" officeooo:paragraph-rsid="015bf31d"/>
    </style:style>
    <style:style style:name="P106" style:family="paragraph" style:parent-style-name="Standard">
      <style:text-properties officeooo:rsid="015b2edc" officeooo:paragraph-rsid="015bf31d"/>
    </style:style>
    <style:style style:name="P107" style:family="paragraph" style:parent-style-name="Standard">
      <style:text-properties officeooo:rsid="013c6743" officeooo:paragraph-rsid="01675787"/>
    </style:style>
    <style:style style:name="P108" style:family="paragraph" style:parent-style-name="TalentHeader">
      <style:text-properties officeooo:rsid="016849bf" officeooo:paragraph-rsid="016849bf"/>
    </style:style>
    <style:style style:name="P109" style:family="paragraph" style:parent-style-name="Standard">
      <style:text-properties officeooo:rsid="0159f948" officeooo:paragraph-rsid="01675787"/>
    </style:style>
    <style:style style:name="P110" style:family="paragraph" style:parent-style-name="Standard">
      <style:text-properties officeooo:rsid="015b2edc" officeooo:paragraph-rsid="01675787"/>
    </style:style>
    <style:style style:name="P111" style:family="paragraph" style:parent-style-name="List_20_Paragraph" style:list-style-name="L5">
      <style:text-properties officeooo:rsid="015c1384" officeooo:paragraph-rsid="01675787"/>
    </style:style>
    <style:style style:name="P112" style:family="paragraph" style:parent-style-name="List_20_Paragraph" style:list-style-name="L5">
      <style:text-properties officeooo:rsid="016bdffd" officeooo:paragraph-rsid="016bdffd"/>
    </style:style>
    <style:style style:name="P113" style:family="paragraph" style:parent-style-name="List_20_Paragraph">
      <style:text-properties officeooo:rsid="016bdffd" officeooo:paragraph-rsid="016bdffd"/>
    </style:style>
    <style:style style:name="P114" style:family="paragraph" style:parent-style-name="TalentHeader">
      <style:text-properties officeooo:rsid="016fb640" officeooo:paragraph-rsid="016fb640"/>
    </style:style>
    <style:style style:name="P115" style:family="paragraph" style:parent-style-name="Standard">
      <style:text-properties officeooo:rsid="0159f948" officeooo:paragraph-rsid="016fb640"/>
    </style:style>
    <style:style style:name="P116" style:family="paragraph" style:parent-style-name="Standard">
      <style:text-properties officeooo:rsid="015b2edc" officeooo:paragraph-rsid="016fb640"/>
    </style:style>
    <style:style style:name="P117" style:family="paragraph" style:parent-style-name="Standard">
      <style:text-properties officeooo:rsid="0170ba8a" officeooo:paragraph-rsid="0170ba8a"/>
    </style:style>
    <style:style style:name="P118" style:family="paragraph" style:parent-style-name="Standard">
      <style:text-properties officeooo:rsid="0170ba8a" officeooo:paragraph-rsid="01738eff"/>
    </style:style>
    <style:style style:name="P119" style:family="paragraph" style:parent-style-name="List_20_Paragraph" style:list-style-name="L5">
      <style:text-properties officeooo:rsid="0170ba8a" officeooo:paragraph-rsid="0170ba8a"/>
    </style:style>
    <style:style style:name="P120" style:family="paragraph" style:parent-style-name="Standard">
      <style:text-properties officeooo:rsid="016bdffd" officeooo:paragraph-rsid="01675787"/>
    </style:style>
    <style:style style:name="P121" style:family="paragraph" style:parent-style-name="TalentHeader">
      <style:text-properties officeooo:rsid="017155ad" officeooo:paragraph-rsid="017155ad"/>
    </style:style>
    <style:style style:name="P122" style:family="paragraph" style:parent-style-name="Standard">
      <style:text-properties officeooo:rsid="0159f948" officeooo:paragraph-rsid="017155ad"/>
    </style:style>
    <style:style style:name="P123" style:family="paragraph" style:parent-style-name="Standard">
      <style:text-properties officeooo:rsid="015b2edc" officeooo:paragraph-rsid="017155ad"/>
    </style:style>
    <style:style style:name="P124" style:family="paragraph" style:parent-style-name="Standard">
      <style:text-properties officeooo:rsid="01716fea" officeooo:paragraph-rsid="01716fea"/>
    </style:style>
    <style:style style:name="P125" style:family="paragraph" style:parent-style-name="List_20_Paragraph" style:list-style-name="L5">
      <style:text-properties officeooo:rsid="01716fea" officeooo:paragraph-rsid="01716fea"/>
    </style:style>
    <style:style style:name="P126" style:family="paragraph" style:parent-style-name="Standard">
      <style:text-properties officeooo:paragraph-rsid="01675787"/>
    </style:style>
    <style:style style:name="P127" style:family="paragraph" style:parent-style-name="Heading_20_1">
      <style:paragraph-properties fo:break-before="page"/>
      <style:text-properties officeooo:paragraph-rsid="01192e68"/>
    </style:style>
    <style:style style:name="P128" style:family="paragraph" style:parent-style-name="Heading_20_1">
      <style:text-properties officeooo:paragraph-rsid="01192e68"/>
    </style:style>
    <style:style style:name="P129" style:family="paragraph" style:parent-style-name="Standard">
      <style:text-properties officeooo:paragraph-rsid="01192e68"/>
    </style:style>
    <style:style style:name="P130" style:family="paragraph" style:parent-style-name="Heading_20_2">
      <style:text-properties officeooo:rsid="01127a28" officeooo:paragraph-rsid="01212211"/>
    </style:style>
    <style:style style:name="P131" style:family="paragraph" style:parent-style-name="Standard">
      <style:text-properties officeooo:rsid="01192e68" officeooo:paragraph-rsid="01212211"/>
    </style:style>
    <style:style style:name="P132" style:family="paragraph" style:parent-style-name="List_20_Paragraph" style:list-style-name="L6"/>
    <style:style style:name="P133" style:family="paragraph" style:parent-style-name="List_20_Paragraph" style:list-style-name="L6">
      <style:text-properties officeooo:rsid="0124f932"/>
    </style:style>
    <style:style style:name="P134" style:family="paragraph" style:parent-style-name="Standard">
      <style:text-properties officeooo:rsid="01127a28" officeooo:paragraph-rsid="01212211"/>
    </style:style>
    <style:style style:name="P135" style:family="paragraph" style:parent-style-name="Standard">
      <style:text-properties officeooo:rsid="0114a605" officeooo:paragraph-rsid="01192e68"/>
    </style:style>
    <style:style style:name="P136" style:family="paragraph" style:parent-style-name="Heading_20_2">
      <style:text-properties officeooo:rsid="01127a28" officeooo:paragraph-rsid="01192e68"/>
    </style:style>
    <style:style style:name="P137" style:family="paragraph" style:parent-style-name="Standard">
      <style:text-properties officeooo:rsid="01192e68" officeooo:paragraph-rsid="01192e68"/>
    </style:style>
    <style:style style:name="P138" style:family="paragraph" style:parent-style-name="Standard">
      <style:text-properties officeooo:rsid="01127a28" officeooo:paragraph-rsid="01192e68"/>
    </style:style>
    <style:style style:name="P139" style:family="paragraph" style:parent-style-name="Heading_20_2">
      <style:text-properties officeooo:rsid="00c34092" officeooo:paragraph-rsid="01212211"/>
    </style:style>
    <style:style style:name="P140" style:family="paragraph" style:parent-style-name="List_20_Paragraph" style:list-style-name="L7"/>
    <style:style style:name="P141" style:family="paragraph" style:parent-style-name="Standard">
      <style:text-properties officeooo:rsid="0114a605" officeooo:paragraph-rsid="01212211"/>
    </style:style>
    <style:style style:name="P142" style:family="paragraph" style:parent-style-name="Heading_20_2">
      <style:text-properties officeooo:rsid="0124f932" officeooo:paragraph-rsid="0124f932"/>
    </style:style>
    <style:style style:name="P143" style:family="paragraph" style:parent-style-name="Standard">
      <style:text-properties officeooo:rsid="011a8ea4" officeooo:paragraph-rsid="011a8ea4"/>
    </style:style>
    <style:style style:name="P144" style:family="paragraph" style:parent-style-name="List_20_Paragraph" style:list-style-name="L8"/>
    <style:style style:name="P145" style:family="paragraph" style:parent-style-name="Heading_20_1">
      <style:paragraph-properties fo:break-before="page"/>
      <style:text-properties officeooo:paragraph-rsid="0091342b"/>
    </style:style>
    <style:style style:name="P146" style:family="paragraph" style:parent-style-name="Heading_20_1">
      <style:text-properties officeooo:rsid="011d1ff8" officeooo:paragraph-rsid="011d1ff8"/>
    </style:style>
    <style:style style:name="P147" style:family="paragraph" style:parent-style-name="Heading_20_2">
      <style:text-properties officeooo:rsid="011b3104" officeooo:paragraph-rsid="011b3104"/>
    </style:style>
    <style:style style:name="P148" style:family="paragraph" style:parent-style-name="Standard">
      <style:text-properties officeooo:rsid="011b3104" officeooo:paragraph-rsid="011b3104"/>
    </style:style>
    <style:style style:name="P149" style:family="paragraph" style:parent-style-name="Heading_20_2">
      <style:text-properties officeooo:paragraph-rsid="01212211"/>
    </style:style>
    <style:style style:name="P150" style:family="paragraph" style:parent-style-name="Standard">
      <style:text-properties officeooo:rsid="011e0b29" officeooo:paragraph-rsid="01212211"/>
    </style:style>
    <style:style style:name="P151" style:family="paragraph" style:parent-style-name="Standard">
      <style:text-properties officeooo:rsid="011b3104" officeooo:paragraph-rsid="01212211"/>
    </style:style>
    <style:style style:name="P152" style:family="paragraph" style:parent-style-name="Table_20_Header">
      <style:paragraph-properties fo:text-align="center" style:justify-single-word="false"/>
      <style:text-properties officeooo:rsid="011d1ff8" officeooo:paragraph-rsid="011d1ff8"/>
    </style:style>
    <style:style style:name="P153" style:family="paragraph" style:parent-style-name="Table_20_Header">
      <style:text-properties officeooo:rsid="011d1ff8" officeooo:paragraph-rsid="011d1ff8"/>
    </style:style>
    <style:style style:name="P154" style:family="paragraph" style:parent-style-name="Table_20_Contents">
      <style:text-properties officeooo:rsid="011d1ff8" officeooo:paragraph-rsid="011d1ff8"/>
    </style:style>
    <style:style style:name="P155" style:family="paragraph" style:parent-style-name="Table_20_Contents">
      <style:paragraph-properties fo:text-align="center" style:justify-single-word="false"/>
      <style:text-properties officeooo:rsid="011d1ff8" officeooo:paragraph-rsid="011d1ff8"/>
    </style:style>
    <style:style style:name="P156" style:family="paragraph" style:parent-style-name="Table_20_Contents">
      <style:paragraph-properties fo:text-align="center" style:justify-single-word="false"/>
      <style:text-properties officeooo:rsid="011d1ff8" officeooo:paragraph-rsid="011e0b29"/>
    </style:style>
    <style:style style:name="P157" style:family="paragraph" style:parent-style-name="Standard">
      <style:text-properties officeooo:rsid="011e0b29" officeooo:paragraph-rsid="011b3104"/>
    </style:style>
    <style:style style:name="P158" style:family="paragraph" style:parent-style-name="Heading_20_1">
      <style:paragraph-properties fo:break-before="page"/>
      <style:text-properties officeooo:paragraph-rsid="012789ed"/>
    </style:style>
    <style:style style:name="P159" style:family="paragraph" style:parent-style-name="Heading_20_1">
      <style:text-properties officeooo:rsid="0108eef9" officeooo:paragraph-rsid="012789ed"/>
    </style:style>
    <style:style style:name="P160" style:family="paragraph" style:parent-style-name="Standard">
      <style:text-properties officeooo:rsid="00e9bb14" officeooo:paragraph-rsid="012789ed"/>
    </style:style>
    <style:style style:name="P161" style:family="paragraph" style:parent-style-name="Standard">
      <style:text-properties officeooo:rsid="00f22a02" officeooo:paragraph-rsid="012789ed"/>
    </style:style>
    <style:style style:name="P162" style:family="paragraph" style:parent-style-name="Heading_20_2">
      <style:text-properties officeooo:paragraph-rsid="012789ed"/>
    </style:style>
    <style:style style:name="P163" style:family="paragraph" style:parent-style-name="Standard">
      <style:text-properties officeooo:rsid="00f2865b" officeooo:paragraph-rsid="012789ed"/>
    </style:style>
    <style:style style:name="P164" style:family="paragraph" style:parent-style-name="Heading_20_2">
      <style:paragraph-properties fo:break-before="page"/>
      <style:text-properties officeooo:paragraph-rsid="012789ed"/>
    </style:style>
    <style:style style:name="P165"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66"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67" style:family="paragraph" style:parent-style-name="Standard">
      <style:text-properties officeooo:paragraph-rsid="012789ed"/>
    </style:style>
    <style:style style:name="P168" style:family="paragraph" style:parent-style-name="Heading_20_1">
      <style:paragraph-properties fo:margin-top="0pt" fo:margin-bottom="4.99pt" style:contextual-spacing="false" fo:break-before="page"/>
      <style:text-properties officeooo:paragraph-rsid="0049c165"/>
    </style:style>
    <style:style style:name="P169" style:family="paragraph" style:parent-style-name="Heading_20_1">
      <style:text-properties officeooo:rsid="0049c165" officeooo:paragraph-rsid="0049c165"/>
    </style:style>
    <style:style style:name="P170" style:family="paragraph" style:parent-style-name="Standard">
      <style:text-properties officeooo:paragraph-rsid="0104f98a"/>
    </style:style>
    <style:style style:name="P171" style:family="paragraph" style:parent-style-name="Standard">
      <style:text-properties officeooo:rsid="0049c165" officeooo:paragraph-rsid="0049c165"/>
    </style:style>
    <style:style style:name="P172" style:family="paragraph" style:parent-style-name="Heading_20_2">
      <style:text-properties officeooo:paragraph-rsid="0049c165"/>
    </style:style>
    <style:style style:name="P173" style:family="paragraph" style:parent-style-name="Standard">
      <style:text-properties officeooo:paragraph-rsid="01216c14"/>
    </style:style>
    <style:style style:name="P174" style:family="paragraph" style:parent-style-name="Standard">
      <style:text-properties officeooo:paragraph-rsid="0049c165"/>
    </style:style>
    <style:style style:name="P175"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216c14" style:font-size-asian="12pt" style:font-name-complex="Arial1" style:font-size-complex="12pt"/>
    </style:style>
    <style:style style:name="P176"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2243b4" style:font-size-asian="12pt" style:font-name-complex="Arial1" style:font-size-complex="12pt"/>
    </style:style>
    <style:style style:name="P177"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216c14" style:font-size-asian="12pt" style:font-name-complex="Arial1" style:font-size-complex="12pt"/>
    </style:style>
    <style:style style:name="P178"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24c7dc" style:font-size-asian="12pt" style:font-name-complex="Arial1" style:font-size-complex="12pt"/>
    </style:style>
    <style:style style:name="P179" style:family="paragraph" style:parent-style-name="Standard">
      <style:text-properties officeooo:rsid="01216c14" officeooo:paragraph-rsid="0049c165"/>
    </style:style>
    <style:style style:name="P180" style:family="paragraph" style:parent-style-name="Standard">
      <style:text-properties officeooo:paragraph-rsid="005029ae"/>
    </style:style>
    <style:style style:name="P181" style:family="paragraph" style:parent-style-name="Standard">
      <style:text-properties officeooo:rsid="0080b0f7" officeooo:paragraph-rsid="005029ae"/>
    </style:style>
    <style:style style:name="P182" style:family="paragraph" style:parent-style-name="Standard">
      <style:text-properties officeooo:rsid="0080b0f7"/>
    </style:style>
    <style:style style:name="P183" style:family="paragraph" style:parent-style-name="Heading_20_1">
      <style:paragraph-properties fo:margin-top="0pt" fo:margin-bottom="4.99pt" style:contextual-spacing="false" fo:break-before="page"/>
      <style:text-properties officeooo:paragraph-rsid="012243b4"/>
    </style:style>
    <style:style style:name="P184" style:family="paragraph" style:parent-style-name="Heading_20_1">
      <style:paragraph-properties fo:margin-top="0pt" fo:margin-bottom="4.99pt" style:contextual-spacing="false"/>
      <style:text-properties officeooo:rsid="012243b4" officeooo:paragraph-rsid="012243b4"/>
    </style:style>
    <style:style style:name="P185" style:family="paragraph" style:parent-style-name="List_20_Paragraph" style:list-style-name="L9"/>
    <style:style style:name="P186" style:family="paragraph" style:parent-style-name="Standard">
      <style:text-properties officeooo:paragraph-rsid="0123ce0b"/>
    </style:style>
    <style:style style:name="T1" style:family="text">
      <style:text-properties officeooo:rsid="0071b42a"/>
    </style:style>
    <style:style style:name="T2" style:family="text">
      <style:text-properties fo:font-weight="bold" officeooo:rsid="0104135c" style:font-weight-asian="bold" style:font-weight-complex="bold"/>
    </style:style>
    <style:style style:name="T3" style:family="text">
      <style:text-properties officeooo:rsid="00f7eed7"/>
    </style:style>
    <style:style style:name="T4" style:family="text">
      <style:text-properties officeooo:rsid="0104135c"/>
    </style:style>
    <style:style style:name="T5" style:family="text">
      <style:text-properties fo:font-weight="bold" style:font-weight-asian="bold" style:font-weight-complex="bold"/>
    </style:style>
    <style:style style:name="T6" style:family="text">
      <style:text-properties fo:font-weight="bold" officeooo:rsid="00a87f7e" style:font-weight-asian="bold" style:font-weight-complex="bold"/>
    </style:style>
    <style:style style:name="T7" style:family="text">
      <style:text-properties officeooo:rsid="0126f58a"/>
    </style:style>
    <style:style style:name="T8" style:family="text">
      <style:text-properties officeooo:rsid="0139dde3"/>
    </style:style>
    <style:style style:name="T9" style:family="text">
      <style:text-properties officeooo:rsid="00fb7ddf"/>
    </style:style>
    <style:style style:name="T10" style:family="text">
      <style:text-properties officeooo:rsid="006d553f"/>
    </style:style>
    <style:style style:name="T11" style:family="text">
      <style:text-properties officeooo:rsid="00921ee3"/>
    </style:style>
    <style:style style:name="T12" style:family="text">
      <style:text-properties officeooo:rsid="011b3104"/>
    </style:style>
    <style:style style:name="T13" style:family="text">
      <style:text-properties officeooo:rsid="004170e7"/>
    </style:style>
    <style:style style:name="T14" style:family="text">
      <style:text-properties officeooo:rsid="00c6b19a"/>
    </style:style>
    <style:style style:name="T15" style:family="text">
      <style:text-properties officeooo:rsid="00b8c62e"/>
    </style:style>
    <style:style style:name="T16" style:family="text">
      <style:text-properties officeooo:rsid="00d00e52"/>
    </style:style>
    <style:style style:name="T17" style:family="text">
      <style:text-properties officeooo:rsid="00d1899e"/>
    </style:style>
    <style:style style:name="T18" style:family="text">
      <style:text-properties officeooo:rsid="0110a74e"/>
    </style:style>
    <style:style style:name="T19" style:family="text">
      <style:text-properties officeooo:rsid="00ca99e7"/>
    </style:style>
    <style:style style:name="T20" style:family="text">
      <style:text-properties fo:font-weight="bold" officeooo:rsid="0127a33f" style:font-weight-asian="bold" style:font-weight-complex="bold"/>
    </style:style>
    <style:style style:name="T21" style:family="text">
      <style:text-properties officeooo:rsid="0127a33f"/>
    </style:style>
    <style:style style:name="T22" style:family="text">
      <style:text-properties officeooo:rsid="01297e03"/>
    </style:style>
    <style:style style:name="T23" style:family="text">
      <style:text-properties officeooo:rsid="012b3e17"/>
    </style:style>
    <style:style style:name="T24" style:family="text">
      <style:text-properties fo:font-weight="bold" officeooo:rsid="01297e03" style:font-weight-asian="bold" style:font-weight-complex="bold"/>
    </style:style>
    <style:style style:name="T25" style:family="text">
      <style:text-properties officeooo:rsid="00b3bc3d"/>
    </style:style>
    <style:style style:name="T26" style:family="text">
      <style:text-properties officeooo:rsid="01072a7f"/>
    </style:style>
    <style:style style:name="T27" style:family="text">
      <style:text-properties officeooo:rsid="005d2daa"/>
    </style:style>
    <style:style style:name="T28" style:family="text">
      <style:text-properties officeooo:rsid="00ce2b17"/>
    </style:style>
    <style:style style:name="T29" style:family="text">
      <style:text-properties officeooo:rsid="00ccc4aa"/>
    </style:style>
    <style:style style:name="T30" style:family="text">
      <style:text-properties officeooo:rsid="00b565f7"/>
    </style:style>
    <style:style style:name="T31" style:family="text">
      <style:text-properties officeooo:rsid="006bacdb"/>
    </style:style>
    <style:style style:name="T32" style:family="text">
      <style:text-properties officeooo:rsid="00e9bb14"/>
    </style:style>
    <style:style style:name="T33" style:family="text">
      <style:text-properties officeooo:rsid="01314709"/>
    </style:style>
    <style:style style:name="T34" style:family="text">
      <style:text-properties officeooo:rsid="00fc94ab"/>
    </style:style>
    <style:style style:name="T35" style:family="text">
      <style:text-properties fo:font-weight="bold" officeooo:rsid="013558ad" style:font-weight-asian="bold" style:font-weight-complex="bold"/>
    </style:style>
    <style:style style:name="T36" style:family="text">
      <style:text-properties officeooo:rsid="013558ad"/>
    </style:style>
    <style:style style:name="T37" style:family="text">
      <style:text-properties officeooo:rsid="0134c913"/>
    </style:style>
    <style:style style:name="T38" style:family="text">
      <style:text-properties fo:font-weight="bold" officeooo:rsid="0137a58a" style:font-weight-asian="bold" style:font-weight-complex="bold"/>
    </style:style>
    <style:style style:name="T39" style:family="text">
      <style:text-properties fo:font-weight="bold" officeooo:rsid="01380cb9" style:font-weight-asian="bold" style:font-weight-complex="bold"/>
    </style:style>
    <style:style style:name="T40" style:family="text">
      <style:text-properties fo:font-weight="bold" officeooo:rsid="01372172" style:font-weight-asian="bold" style:font-weight-complex="bold"/>
    </style:style>
    <style:style style:name="T41" style:family="text">
      <style:text-properties officeooo:rsid="00d49c35"/>
    </style:style>
    <style:style style:name="T42" style:family="text">
      <style:text-properties officeooo:rsid="013b6146"/>
    </style:style>
    <style:style style:name="T43" style:family="text">
      <style:text-properties officeooo:rsid="014b6f77"/>
    </style:style>
    <style:style style:name="T44" style:family="text">
      <style:text-properties officeooo:rsid="015530ac"/>
    </style:style>
    <style:style style:name="T45" style:family="text">
      <style:text-properties officeooo:rsid="014f1221"/>
    </style:style>
    <style:style style:name="T46" style:family="text">
      <style:text-properties officeooo:rsid="014db02a"/>
    </style:style>
    <style:style style:name="T47" style:family="text">
      <style:text-properties officeooo:rsid="014f9401"/>
    </style:style>
    <style:style style:name="T48" style:family="text">
      <style:text-properties officeooo:rsid="01503b34"/>
    </style:style>
    <style:style style:name="T49" style:family="text">
      <style:text-properties officeooo:rsid="0151ddad"/>
    </style:style>
    <style:style style:name="T50" style:family="text">
      <style:text-properties officeooo:rsid="01766d40"/>
    </style:style>
    <style:style style:name="T51" style:family="text">
      <style:text-properties fo:font-weight="bold" officeooo:rsid="0157ba6e" style:font-weight-asian="bold" style:font-weight-complex="bold"/>
    </style:style>
    <style:style style:name="T52" style:family="text">
      <style:text-properties officeooo:rsid="0148ac44"/>
    </style:style>
    <style:style style:name="T53" style:family="text">
      <style:text-properties fo:font-weight="bold" officeooo:rsid="013cfc33" style:font-weight-asian="bold" style:font-weight-complex="bold"/>
    </style:style>
    <style:style style:name="T54" style:family="text">
      <style:text-properties officeooo:rsid="013cfc33"/>
    </style:style>
    <style:style style:name="T55" style:family="text">
      <style:text-properties officeooo:rsid="01589f9e"/>
    </style:style>
    <style:style style:name="T56" style:family="text">
      <style:text-properties officeooo:rsid="0144037e"/>
    </style:style>
    <style:style style:name="T57" style:family="text">
      <style:text-properties officeooo:rsid="01434c57"/>
    </style:style>
    <style:style style:name="T58" style:family="text">
      <style:text-properties fo:font-weight="normal" style:font-weight-asian="normal" style:font-weight-complex="normal"/>
    </style:style>
    <style:style style:name="T59" style:family="text">
      <style:text-properties officeooo:rsid="013dbb60"/>
    </style:style>
    <style:style style:name="T60" style:family="text">
      <style:text-properties officeooo:rsid="014145a3"/>
    </style:style>
    <style:style style:name="T61" style:family="text">
      <style:text-properties officeooo:rsid="0141de6b"/>
    </style:style>
    <style:style style:name="T62" style:family="text">
      <style:text-properties officeooo:rsid="0157ba6e"/>
    </style:style>
    <style:style style:name="T63" style:family="text">
      <style:text-properties officeooo:rsid="013f71ff"/>
    </style:style>
    <style:style style:name="T64" style:family="text">
      <style:text-properties officeooo:rsid="01405cf9"/>
    </style:style>
    <style:style style:name="T65" style:family="text">
      <style:text-properties officeooo:rsid="015e34d3"/>
    </style:style>
    <style:style style:name="T66" style:family="text">
      <style:text-properties fo:font-weight="bold" officeooo:rsid="01633829" style:font-weight-asian="bold" style:font-weight-complex="bold"/>
    </style:style>
    <style:style style:name="T67" style:family="text">
      <style:text-properties fo:font-weight="bold" officeooo:rsid="0177c544" style:font-weight-asian="bold" style:font-weight-complex="bold"/>
    </style:style>
    <style:style style:name="T68" style:family="text">
      <style:text-properties officeooo:rsid="01633829"/>
    </style:style>
    <style:style style:name="T69" style:family="text">
      <style:text-properties officeooo:rsid="01783f57"/>
    </style:style>
    <style:style style:name="T70" style:family="text">
      <style:text-properties officeooo:rsid="01608c61"/>
    </style:style>
    <style:style style:name="T71" style:family="text">
      <style:text-properties officeooo:rsid="015c1384"/>
    </style:style>
    <style:style style:name="T72" style:family="text">
      <style:text-properties officeooo:rsid="015bf31d"/>
    </style:style>
    <style:style style:name="T73" style:family="text">
      <style:text-properties officeooo:rsid="015b2edc"/>
    </style:style>
    <style:style style:name="T74" style:family="text">
      <style:text-properties fo:font-weight="bold" officeooo:rsid="015e0bb9" style:font-weight-asian="bold" style:font-weight-complex="bold"/>
    </style:style>
    <style:style style:name="T75" style:family="text">
      <style:text-properties fo:font-weight="bold" officeooo:rsid="01637c57" style:font-weight-asian="bold" style:font-weight-complex="bold"/>
    </style:style>
    <style:style style:name="T76" style:family="text">
      <style:text-properties officeooo:rsid="0174db33"/>
    </style:style>
    <style:style style:name="T77" style:family="text">
      <style:text-properties officeooo:rsid="01738eff"/>
    </style:style>
    <style:style style:name="T78" style:family="text">
      <style:text-properties officeooo:rsid="017834a9"/>
    </style:style>
    <style:style style:name="T79" style:family="text">
      <style:text-properties officeooo:rsid="015e0bb9"/>
    </style:style>
    <style:style style:name="T80" style:family="text">
      <style:text-properties fo:font-weight="bold" officeooo:rsid="01657580" style:font-weight-asian="bold" style:font-weight-complex="bold"/>
    </style:style>
    <style:style style:name="T81" style:family="text">
      <style:text-properties officeooo:rsid="016a31e5"/>
    </style:style>
    <style:style style:name="T82" style:family="text">
      <style:text-properties officeooo:rsid="016849bf"/>
    </style:style>
    <style:style style:name="T83" style:family="text">
      <style:text-properties officeooo:rsid="016fb640"/>
    </style:style>
    <style:style style:name="T84" style:family="text">
      <style:text-properties officeooo:rsid="016a996d"/>
    </style:style>
    <style:style style:name="T85" style:family="text">
      <style:text-properties officeooo:rsid="016bdffd"/>
    </style:style>
    <style:style style:name="T86" style:family="text">
      <style:text-properties officeooo:rsid="0170ba8a"/>
    </style:style>
    <style:style style:name="T87" style:family="text">
      <style:text-properties officeooo:rsid="01716fea"/>
    </style:style>
    <style:style style:name="T88" style:family="text">
      <style:text-properties officeooo:rsid="01734875"/>
    </style:style>
    <style:style style:name="T89" style:family="text">
      <style:text-properties officeooo:rsid="017155ad"/>
    </style:style>
    <style:style style:name="T90" style:family="text">
      <style:text-properties officeooo:rsid="0124f932"/>
    </style:style>
    <style:style style:name="T91" style:family="text">
      <style:text-properties officeooo:rsid="01192e68"/>
    </style:style>
    <style:style style:name="T92" style:family="text">
      <style:text-properties fo:font-weight="bold" officeooo:rsid="01173f79" style:font-weight-asian="bold" style:font-weight-complex="bold"/>
    </style:style>
    <style:style style:name="T93" style:family="text">
      <style:text-properties fo:font-weight="bold" officeooo:rsid="0124f932" style:font-weight-asian="bold" style:font-weight-complex="bold"/>
    </style:style>
    <style:style style:name="T94" style:family="text">
      <style:text-properties officeooo:rsid="0124ef49"/>
    </style:style>
    <style:style style:name="T95" style:family="text">
      <style:text-properties officeooo:rsid="011e22e1"/>
    </style:style>
    <style:style style:name="T96" style:family="text">
      <style:text-properties officeooo:rsid="01212211"/>
    </style:style>
    <style:style style:name="T97" style:family="text">
      <style:text-properties officeooo:rsid="012789ed"/>
    </style:style>
    <style:style style:name="T98" style:family="text">
      <style:text-properties officeooo:rsid="010d918c"/>
    </style:style>
    <style:style style:name="T99" style:family="text">
      <style:text-properties officeooo:rsid="00f2865b"/>
    </style:style>
    <style:style style:name="T100" style:family="text">
      <style:text-properties officeooo:rsid="00f44568"/>
    </style:style>
    <style:style style:name="T101" style:family="text">
      <style:text-properties officeooo:rsid="00ee0f78"/>
    </style:style>
    <style:style style:name="T102" style:family="text">
      <style:text-properties officeooo:rsid="010d7baa"/>
    </style:style>
    <style:style style:name="T103" style:family="text">
      <style:text-properties officeooo:rsid="01380cb9"/>
    </style:style>
    <style:style style:name="T104" style:family="text">
      <style:text-properties officeooo:rsid="010c03e8"/>
    </style:style>
    <style:style style:name="T105" style:family="text">
      <style:text-properties officeooo:rsid="0049c165"/>
    </style:style>
    <style:style style:name="T106" style:family="text">
      <style:text-properties officeooo:rsid="0104f98a"/>
    </style:style>
    <style:style style:name="T107" style:family="text">
      <style:text-properties officeooo:rsid="0105c84a"/>
    </style:style>
    <style:style style:name="T108" style:family="text">
      <style:text-properties officeooo:rsid="0123ce0b"/>
    </style:style>
    <style:style style:name="T109" style:family="text">
      <style:text-properties officeooo:rsid="01216c14"/>
    </style:style>
    <style:style style:name="T110" style:family="text">
      <style:text-properties officeooo:rsid="012243b4"/>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Charakter Generier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1922387144" text:style-name="L1">
                <text:list-item>
                  <text:p text:style-name="P4"><text:span text:style-name="T2">Fertigkeiten</text:span>: <text:span text:style-name="T3">Verteile 20 Punkte auf deine </text:span><text:span text:style-name="T4">Fertigkeiten</text:span><text:span text:style-name="T3">. Keine darf mehr als 4 Punkte erhalten.</text:span></text:p>
                </text:list-item>
                <text:list-item>
                  <text:p text:style-name="P5"><text:span text:style-name="T5">Spezialisierungen</text:span>: Wähle 3 Spezialisierungen.</text:p>
                </text:list-item>
                <text:list-item>
                  <text:p text:style-name="P6"><text:span text:style-name="T6">Merkmale</text:span>: Du startest mit:</text:p>
                </text:list-item>
              </text:list>
              <text:list text:style-name="L2">
                <text:list-item>
                  <text:list>
                    <text:list-item>
                      <text:p text:style-name="P7">AP: 7</text:p>
                    </text:list-item>
                    <text:list-item>
                      <text:p text:style-name="P7">LP: <text:span text:style-name="T7">5</text:span></text:p>
                    </text:list-item>
                    <text:list-item>
                      <text:p text:style-name="P8">SP: 1</text:p>
                    </text:list-item>
                    <text:list-item>
                      <text:p text:style-name="P7">EP: 0</text:p>
                    </text:list-item>
                    <text:list-item>
                      <text:p text:style-name="P7">Taler: 0</text:p>
                    </text:list-item>
                  </text:list>
                </text:list-item>
              </text:list>
              <text:list text:continue-list="list1922387144" text:style-name="L1">
                <text:list-item>
                  <text:p text:style-name="P9"><text:span text:style-name="T5">Optional, Vorteil</text:span>: <text:span text:style-name="T8">Wähle einen Vorteil.</text:span></text:p>
                </text:list-item>
                <text:list-item>
                  <text:p text:style-name="P10"><text:span text:style-name="T6">Inventar</text:span>: Du startest mit leichtem Gepäck <text:span text:style-name="T9">(3 Vorräte)</text:span>, es sei den der Erzähler bestimmt etwas anderes.</text:p>
                </text:list-item>
                <text:list-item>
                  <text:p text:style-name="P11"><text:span text:style-name="T6">Details</text:span>: <text:span text:style-name="T10">Gib deinem Charakter einen Namen, leg fest wo er herkommt, was ihn motiviert und beschreibe ein paar Details zu ihm (z.B. Geschlecht, Haarfarbe, </text:span><text:span text:style-name="T11">oder </text:span><text:span text:style-name="T10">Alter).</text:span></text:p>
                </text:list-item>
              </text:list>
            </table:table-cell>
          </table:table-row>
        </table:table>
        <text:p text:style-name="Standard"/>
        <text:p text:style-name="Standard"/>
        <text:h text:style-name="P12" text:outline-level="1">Kapitel <text:span text:style-name="T12">x</text:span></text:h>
        <text:h text:style-name="P13" text:outline-level="1">Fertigkeiten</text:h>
        <text:p text:style-name="P14"><text:span text:style-name="T4">Fertigkeiten</text:span><text:span text:style-name="T13"> verkörpern die Fähigkeiten deines Helden. </text:span><text:span text:style-name="T14">Sie zeigen was er kann und</text:span><text:span text:style-name="T13"> bilden die Basis für alle </text:span><text:span text:style-name="T15">seine </text:span><text:span text:style-name="T13">Proben.</text:span></text:p>
        <text:p text:style-name="P14"/>
        <text:section text:style-name="Sect2" text:name="Section5">
          <text:h text:style-name="P15" text:outline-level="2"><text:span text:style-name="T16">S</text:span>pezialisierungen</text:h>
          <text:p text:style-name="P16">Spezialisierungen verkörpern <text:span text:style-name="T17">Training in einem</text:span> bestimmten <text:span text:style-name="T18">Fachb</text:span>ereich <text:span text:style-name="T14">eine</text:span><text:span text:style-name="T4">r Fertigkeit</text:span><text:span text:style-name="T14">.</text:span></text:p>
          <text:p text:style-name="P17">Du erhältst +2 auf alle Proben, für die dein Held wenigstens eine passende <text:span text:style-name="T19">Spezialisierung</text:span> hat.</text:p>
          <text:p text:style-name="P17"/>
          <text:h text:style-name="P18" text:outline-level="2">Standard Fertigkeiten</text:h>
          <text:h text:style-name="P19" text:outline-level="3">Charisma</text:h>
          <text:p text:style-name="P20"><text:span text:style-name="T5">Spezialisierungen</text:span>: Etikette, Singen, Tanzen, Überreden, Verführen</text:p>
          <text:p text:style-name="P21"><text:span text:style-name="T20">Beschreibung</text:span><text:span text:style-name="T21">: </text:span>Charisma steht für Auftreten, Überzeugungskraft und den geschickten Umgang mit anderen Menschen.</text:p>
          <text:p text:style-name="P22">Stunts <text:span text:style-name="T22">(1 AP):</text:span></text:p>
          <text:list text:style-name="L3">
            <text:list-item>
              <text:p text:style-name="P23"><text:span text:style-name="T5">Ablenken</text:span>: Ein Ziel erhält Nachteil auf seine nächste Probe.</text:p>
            </text:list-item>
            <text:list-item>
              <text:p text:style-name="P23"><text:span text:style-name="T5">Anfeuern</text:span>: Ein Verbündeter <text:span text:style-name="T23">erhält Vorteil auf seine nächste Probe.</text:span></text:p>
            </text:list-item>
            <text:list-item>
              <text:p text:style-name="P23"><text:span text:style-name="T24">Beeindrucken</text:span><text:span text:style-name="T22">: </text:span>Vorteil auf Charisma Probe.</text:p>
            </text:list-item>
          </text:list>
          <text:p text:style-name="P20"/>
          <text:h text:style-name="Heading_20_3" text:outline-level="3">Gerissenheit</text:h>
          <text:p text:style-name="P24"><text:span text:style-name="T5">Spezialisierungen</text:span>: <text:span text:style-name="T25">Fälschen, </text:span>Gassenwissen, Schleichen, <text:span text:style-name="T26">Schlösser</text:span><text:span text:style-name="T1"> knacken</text:span>, <text:span text:style-name="T25">Taschendiebstahl, Verkleiden</text:span></text:p>
          <text:p text:style-name="P25"><text:span text:style-name="T20">Beschreibung</text:span><text:span text:style-name="T21">: Gerissenheit steht für List, Heimlichkeit und die Fähigkeit, Hindernisse mit unkonventionellen Methoden zu überwinden.</text:span></text:p>
          <text:p text:style-name="P24"/>
          <text:p text:style-name="P24"/>
          <text:p text:style-name="P24"/>
          <text:p text:style-name="P24"/>
          <text:p text:style-name="P24"/>
          <text:h text:style-name="Heading_20_3" text:outline-level="3">Geschick</text:h>
          <text:p text:style-name="P24"><text:span text:style-name="T5">Spezialisierungen</text:span>: <text:span text:style-name="T27">Akrobatik, </text:span><text:span text:style-name="T25">Klettern, </text:span><text:span text:style-name="T14">Laufen, Springen, </text:span><text:span text:style-name="T28">Reiten</text:span></text:p>
          <text:p text:style-name="P24">Beschreibung: Geschick steht für Körperbeherrschung, Koordination und präzise Bewegungen.</text:p>
          <text:p text:style-name="P24"/>
          <text:h text:style-name="P26" text:outline-level="3">Intuition</text:h>
          <text:p text:style-name="P24"><text:span text:style-name="T5">Spezialisierungen</text:span>: <text:span text:style-name="T29">Empathie, Ermitteln, Gefahreninstinkt, Wahrnehmung</text:span></text:p>
          <text:p text:style-name="P24"><text:span text:style-name="T5">Beschreibung</text:span>: Intuition steht für Aufmerksamkeit, Menschenkenntnis und die Fähigkeit, Zusammenhänge und Gefahren zu erkennen.</text:p>
          <text:p text:style-name="P24"/>
          <text:h text:style-name="P27" text:outline-level="3">Kampf</text:h>
          <text:p text:style-name="P20"><text:span text:style-name="T5">Spezialisierungen</text:span>: <text:span text:style-name="T4">Axt</text:span><text:span text:style-name="T25">, </text:span>Armbrust, Bogen, Schwert, Degen, Waffenlos, <text:span text:style-name="T25">Geschütze</text:span></text:p>
          <text:p text:style-name="P20"><text:span text:style-name="T5">Beschreibung</text:span>: Kampf steht für den Umgang mit Waffen und die Fähigkeit, Gegner im Gefecht zu besiegen.</text:p>
          <text:p text:style-name="P20"><text:span text:style-name="T5">Stunts (1 AP)</text:span>:</text:p>
          <text:list text:style-name="L4">
            <text:list-item>
              <text:p text:style-name="P28"><text:span text:style-name="T24">Blattschuss / </text:span><text:span text:style-name="T5">Wuchtschl</text:span><text:span text:style-name="T20">a</text:span><text:span text:style-name="T5">g</text:span>: +1 Schaden <text:span text:style-name="T21">bei Erfolg</text:span></text:p>
            </text:list-item>
            <text:list-item>
              <text:p text:style-name="P29"><text:span text:style-name="T5">Finte</text:span>: Vorteil auf Attacke</text:p>
            </text:list-item>
            <text:list-item>
              <text:p text:style-name="P29"><text:span text:style-name="T5">Sturmangriff</text:span>: <text:span text:style-name="T22">Extra Bewegung </text:span>+ Attacke</text:p>
            </text:list-item>
            <text:list-item>
              <text:p text:style-name="P30"><text:span text:style-name="T5">Zielen</text:span>: Keine Nachteil bei Attacken auf große Distanz</text:p>
            </text:list-item>
            <text:list-item>
              <text:p text:style-name="P30"><text:soft-page-break/><text:span text:style-name="T5">Schnellziehen</text:span>: Waffe ziehen kostet keine Aktion.</text:p>
            </text:list-item>
          </text:list>
          <text:p text:style-name="P20"/>
          <text:p text:style-name="P20"/>
          <text:p text:style-name="P20"/>
          <text:h text:style-name="Heading_20_3" text:outline-level="3">Klugheit</text:h>
          <text:p text:style-name="P24"><text:span text:style-name="T5">Spezialisierungen</text:span>: <text:span text:style-name="T23">Heraldik, </text:span><text:span text:style-name="T14">Geschichte, <text:s/>Jura, </text:span>Medizin, <text:span text:style-name="T23">Magiekunde</text:span></text:p>
          <text:p text:style-name="P24"><text:span text:style-name="T5">Beschreibung</text:span>: Klugheit steht für Wissen, Bildung und die Fähigkeit, Probleme durch Nachdenken und Fachkenntnis zu lösen.</text:p>
          <text:p text:style-name="P24"/>
          <text:h text:style-name="Heading_20_3" text:outline-level="3">Kraft</text:h>
          <text:p text:style-name="P24"><text:span text:style-name="T5">Spezialisierungen</text:span>: <text:span text:style-name="T30">Ausdauer, <text:s/></text:span><text:span text:style-name="T31">Einschüchtern, </text:span><text:span text:style-name="T23">Kraftakte, </text:span><text:span text:style-name="T32">Schwimmen</text:span></text:p>
          <text:p text:style-name="P24"><text:span text:style-name="T5">Beschreibung</text:span>: Kraft steht für körperliche Stärke, Ausdauer und die Fähigkeit, Hindernisse mit Muskelkraft zu überwinden.</text:p>
          <text:p text:style-name="P24"/>
          <text:h text:style-name="Heading_20_3" text:outline-level="3">Zähigkeit</text:h>
          <text:p text:style-name="P24"><text:span text:style-name="T5">Spezialisierungen</text:span>: <text:span text:style-name="T22">Schild, Kettenhemd, Ohne Rüstung, </text:span>Mut, Willenskraft</text:p>
          <text:p text:style-name="P24"><text:span text:style-name="T5">Beschreibung</text:span>: Zähigkeit steht für Widerstandskraft, Mut und die Fähigkeit, körperlichen oder geistigen Belastungen standzuhalten.</text:p>
          <text:p text:style-name="Standard"/>
          <text:h text:style-name="Heading_20_2" text:outline-level="2">Zauber Fertigkeiten</text:h>
          <text:h text:style-name="Heading_20_3" text:outline-level="3">Alchemie</text:h>
          <text:p text:style-name="P31"><text:span text:style-name="T5">Spezialisierungen</text:span>: <text:span text:style-name="T33">A</text:span><text:span text:style-name="T34">nalyse, Artefakte, Gifte, </text:span><text:span text:style-name="T3">Hellsicht, </text:span><text:span text:style-name="T34">Tränke</text:span></text:p>
          <text:p text:style-name="P32"><text:span text:style-name="T20">Beschreibung</text:span><text:span text:style-name="T21">: </text:span>Steht für magische Tränke, Artefakte und das Wissen um die verborgenen Kräfte der Welt.</text:p>
          <text:p text:style-name="P33"><text:span text:style-name="T5">Stunts (1 AP)</text:span>:</text:p>
          <text:list text:continue-numbering="true" text:style-name="L4">
            <text:list-item>
              <text:p text:style-name="P34"><text:span text:style-name="T35">Name</text:span>: <text:span text:style-name="T36">Beschreibung</text:span></text:p>
            </text:list-item>
          </text:list>
          <text:p text:style-name="P35"/>
          <text:h text:style-name="Heading_20_3" text:outline-level="3">Blaue Magie</text:h>
          <text:p text:style-name="P31"><text:span text:style-name="T5">Spezialisierungen</text:span>: <text:span text:style-name="T34">Luft, </text:span><text:span text:style-name="T3">Wasser, </text:span><text:span text:style-name="T34">Levitation, </text:span><text:span text:style-name="T3">Telekinese, Teleport</text:span></text:p>
          <text:p text:style-name="P32"><text:span text:style-name="T20">Beschreibung</text:span><text:span text:style-name="T21">: </text:span>Steht für Bewegung, Distanz und die Beherrschung von Luft, Wasser und magischen Kräften.</text:p>
          <text:p text:style-name="P33"><text:span text:style-name="T5">Stunts (1 AP)</text:span>:</text:p>
          <text:list text:continue-numbering="true" text:style-name="L4">
            <text:list-item>
              <text:p text:style-name="P34"><text:span text:style-name="T35">Name</text:span>: <text:span text:style-name="T36">Beschreibung</text:span></text:p>
            </text:list-item>
          </text:list>
          <text:p text:style-name="P35"/>
          <text:p text:style-name="P35"/>
          <text:p text:style-name="P35"/>
          <text:p text:style-name="P35"/>
          <text:p text:style-name="P35"/>
          <text:p text:style-name="P35"/>
          <text:p text:style-name="P35"/>
          <text:p text:style-name="P35"/>
          <text:h text:style-name="Heading_20_3" text:outline-level="3"><text:span text:style-name="T37">Violette</text:span> Magie</text:h>
          <text:p text:style-name="P31"><text:span text:style-name="T5">Spezialisierungen</text:span>: <text:span text:style-name="T3">Emotionen, Gedanken, Illusionen</text:span></text:p>
          <text:p text:style-name="P32"><text:span text:style-name="T20">Beschreibung</text:span><text:span text:style-name="T21">: </text:span>Steht für Gedanken, Emotionen und die Manipulation von Wahrnehmung und Geist.</text:p>
          <text:p text:style-name="P33"><text:span text:style-name="T5">Stunts (1 AP)</text:span>:</text:p>
          <text:list text:continue-numbering="true" text:style-name="L4">
            <text:list-item>
              <text:p text:style-name="P36"><text:span text:style-name="T38">Bannbaladin</text:span>: <text:span text:style-name="T36">Beschreibung</text:span></text:p>
            </text:list-item>
            <text:list-item>
              <text:p text:style-name="P36"><text:span text:style-name="T38">Blitz dich find</text:span>: <text:span text:style-name="T36">Beschreibung</text:span></text:p>
            </text:list-item>
            <text:list-item>
              <text:p text:style-name="P37"><text:span text:style-name="T39">Horriphobos</text:span>: <text:span text:style-name="T36">Beschreibung</text:span></text:p>
            </text:list-item>
            <text:list-item>
              <text:p text:style-name="P37"><text:span text:style-name="T40">Ignorantia</text:span>: <text:span text:style-name="T36">Beschreibung</text:span></text:p>
            </text:list-item>
          </text:list>
          <text:p text:style-name="P38"/>
          <text:h text:style-name="Heading_20_3" text:outline-level="3">Grüne Magie</text:h>
          <text:p text:style-name="P31"><text:span text:style-name="T5">Spezialisierungen</text:span>: <text:span text:style-name="T3">Erde, </text:span><text:span text:style-name="T41">Pflanzen, </text:span><text:span text:style-name="T34">Regeneration, </text:span><text:span text:style-name="T41">Tiere, Verwandlung</text:span></text:p>
          <text:p text:style-name="P32"><text:span text:style-name="T20">Beschreibung</text:span><text:span text:style-name="T21">: </text:span>Steht für Natur, Wachstum und die Verwandlung von Lebewesen.</text:p>
          <text:p text:style-name="P33"><text:span text:style-name="T5">Stunts (1 AP)</text:span>:</text:p>
          <text:list text:continue-numbering="true" text:style-name="L4">
            <text:list-item>
              <text:p text:style-name="P34"><text:span text:style-name="T39">Adlerschwinge</text:span>: <text:span text:style-name="T36">Beschreibung</text:span></text:p>
            </text:list-item>
            <text:list-item>
              <text:p text:style-name="P37"><text:span text:style-name="T39">Hexenkrallen</text:span>: <text:span text:style-name="T36">Beschreibung</text:span></text:p>
            </text:list-item>
            <text:list-item>
              <text:p text:style-name="P37"><text:span text:style-name="T39">Katzenaugen</text:span>: <text:span text:style-name="T36">Beschreibung</text:span></text:p>
            </text:list-item>
            <text:list-item>
              <text:p text:style-name="P37"><text:span text:style-name="T39">Salander Mutander</text:span>: <text:span text:style-name="T36">Beschreibung</text:span></text:p>
            </text:list-item>
          </text:list>
          <text:p text:style-name="P38"/>
          <text:p text:style-name="P38"/>
          <text:h text:style-name="Heading_20_3" text:outline-level="3">Rote Magie</text:h>
          <text:p text:style-name="P31"><text:span text:style-name="T5">Spezialisierungen</text:span>: <text:span text:style-name="T34">Elektrizität, </text:span><text:span text:style-name="T3">Feuer, </text:span><text:span text:style-name="T34">Hitze, </text:span><text:span text:style-name="T3">Zerstörung</text:span></text:p>
          <text:p text:style-name="P32"><text:span text:style-name="T20">Beschreibung</text:span><text:span text:style-name="T21">: </text:span>Steht für Feuer, Energie und zerstörerische magische Kräfte.</text:p>
          <text:p text:style-name="P38"><text:soft-page-break/></text:p>
          <text:h text:style-name="Heading_20_3" text:outline-level="3">Schwarze Magie</text:h>
          <text:p text:style-name="P31"><text:span text:style-name="T5">Spezialisierungen</text:span>: <text:span text:style-name="T3">Dämonen, Flüche, Untote</text:span></text:p>
          <text:p text:style-name="P32"><text:span text:style-name="T20">Beschreibung</text:span><text:span text:style-name="T21">: </text:span>Steht für Flüche, Dämonen und die Macht über Tod und Untote.</text:p>
          <text:p text:style-name="P33"><text:span text:style-name="T5">Stunts (1 AP)</text:span>:</text:p>
          <text:list text:continue-numbering="true" text:style-name="L4">
            <text:list-item>
              <text:p text:style-name="P34"><text:span text:style-name="T35">Name</text:span>: <text:span text:style-name="T36">Beschreibung</text:span></text:p>
            </text:list-item>
          </text:list>
          <text:p text:style-name="P35"/>
          <text:h text:style-name="Heading_20_3" text:outline-level="3">Weiße Magie</text:h>
          <text:p text:style-name="P31"><text:span text:style-name="T5">Spezialisierungen</text:span>: <text:span text:style-name="T3">Bannen, Heilen, Licht, </text:span><text:span text:style-name="T34">Schutz</text:span></text:p>
          <text:p text:style-name="P32"><text:span text:style-name="T20">Beschreibung</text:span><text:span text:style-name="T21">: </text:span>Steht für Heilung, Schutz und die Abwehr übernatürlicher Gefahren.</text:p>
          <text:p text:style-name="P33"><text:span text:style-name="T5">Stunts (1 AP)</text:span>:</text:p>
          <text:list text:continue-numbering="true" text:style-name="L4">
            <text:list-item>
              <text:p text:style-name="P34"><text:span text:style-name="T35">Name</text:span>: <text:span text:style-name="T36">Beschreibung</text:span></text:p>
            </text:list-item>
          </text:list>
          <text:p text:style-name="P35"/>
          <text:p text:style-name="P39"/>
        </text:section>
        <text:p text:style-name="P40"/>
        <text:h text:style-name="P41" text:outline-level="1">Kapitel <text:span text:style-name="T12">x: </text:span><text:span text:style-name="T42">Talente</text:span></text:h>
        <text:h text:style-name="P42" text:outline-level="2"><text:span text:style-name="T43">Allgemeine Talent</text:span><text:span text:style-name="T44">e</text:span></text:h>
        <text:section text:style-name="Sect3" text:name="Section7">
          <text:h text:style-name="P43" text:outline-level="3">Ausdauernd I - III</text:h>
          <text:p text:style-name="P44"><text:span text:style-name="T5">Wirkung</text:span>: Du hast <text:span text:style-name="T45">9</text:span>/<text:span text:style-name="T45">11</text:span>/<text:span text:style-name="T46">1</text:span><text:span text:style-name="T47">3</text:span> maximale AP.</text:p>
          <text:p text:style-name="P44"/>
          <text:h text:style-name="P45" text:outline-level="3">Glück I - II</text:h>
          <text:p text:style-name="P44"><text:span text:style-name="T5">Wirkung</text:span>: <text:span text:style-name="T48">Du hast 2/3 </text:span><text:span text:style-name="T49">maximale </text:span><text:span text:style-name="T48">SP.</text:span></text:p>
          <text:p text:style-name="P44"/>
          <text:h text:style-name="P43" text:outline-level="3">Sprache <text:span text:style-name="T44">I - V</text:span></text:h>
          <text:p text:style-name="P44"><text:span text:style-name="T5">Wirkung</text:span>: <text:span text:style-name="T44">Für jede Stufe erlernst du zwei neue Sprachen.</text:span></text:p>
          <text:p text:style-name="P46"/>
          <text:h text:style-name="P43" text:outline-level="3">Zäh I - III</text:h>
          <text:p text:style-name="P44"><text:span text:style-name="T5">Wirkung</text:span>: Du hast 4/5/6 maximale LP.</text:p>
        </text:section>
        <text:p text:style-name="P47"/>
        <text:h text:style-name="P48" text:outline-level="2">Kampf <text:span text:style-name="T50">Talente</text:span></text:h>
        <text:section text:style-name="Sect2" text:name="Section6">
          <text:h text:style-name="TalentHeader" text:outline-level="3">Ausweichen I - III</text:h>
          <text:p text:style-name="P49"><text:span text:style-name="T51">Einsatz</text:span>: <text:span text:style-name="T52">Nah- oder Fernkampf Verteidigung, 1 AP</text:span></text:p>
          <text:p text:style-name="P50"><text:span text:style-name="T53">Wirkung</text:span><text:span text:style-name="T54">: Du erhältst +1/+2/+3 auf deine Verteidigung.</text:span></text:p>
          <text:p text:style-name="P51"/>
          <text:h text:style-name="TalentHeader" text:outline-level="3">Binden</text:h>
          <text:p text:style-name="P49"><text:span text:style-name="T51">Einsatz</text:span>: <text:span text:style-name="T52">Nahkampf Verteidigung, 1 AP</text:span></text:p>
          <text:p text:style-name="Standard"><text:span text:style-name="T5">Wirkung</text:span>: -2 auf Verteidigung. Attacke auf den Gegner sind f<text:span text:style-name="T55">ür eine Runde um 2 erleichtert.</text:span></text:p>
          <text:p text:style-name="Standard"/>
          <text:h text:style-name="TalentHeader" text:outline-level="3">Blattschuss I - II</text:h>
          <text:p text:style-name="P49"><text:span text:style-name="T51">Einsatz</text:span>: <text:span text:style-name="T56">Fernkampf Attacke</text:span><text:span text:style-name="T57">, 1 AP</text:span></text:p>
          <text:p text:style-name="P52"><text:span text:style-name="T5">Wirkung</text:span>: Du verursachst +1/+2 extra Schaden.</text:p>
          <text:p text:style-name="P51"/>
          <text:h text:style-name="TalentHeader" text:outline-level="3">Blutrausch</text:h>
          <text:p text:style-name="P53">Limits<text:span text:style-name="T58">: Nach Töten eines Gegners</text:span></text:p>
          <text:p text:style-name="P54"><text:span text:style-name="T5">Wirkung</text:span>: Führ sofort noch eine Attacke aus.</text:p>
          <text:p text:style-name="P51"/>
          <text:h text:style-name="TalentHeader" text:outline-level="3">Entwaffnen</text:h>
          <text:p text:style-name="P49"><text:span text:style-name="T51">Einsatz</text:span>: <text:span text:style-name="T56">Nahkampf Verteidigung, 1 AP</text:span></text:p>
          <text:p text:style-name="P51"><text:span text:style-name="T5">Wirkung</text:span>: -2 auf <text:span text:style-name="T59">Verteidigung</text:span>. Bei Erfolg entreißt du dem Gegner seine Waffe.</text:p>
          <text:p text:style-name="P55"/>
          <text:h text:style-name="TalentHeader" text:outline-level="3">Finte <text:span text:style-name="T54">I - III</text:span></text:h>
          <text:p text:style-name="P49"><text:span text:style-name="T51">Einsatz</text:span>: Nahkampf <text:span text:style-name="T57">Attacke, 1 AP</text:span></text:p>
          <text:p text:style-name="P51"><text:span text:style-name="T5">Wirkung</text:span>: Du erhältst +1/+2/+3 auf deine Attacke.</text:p>
          <text:p text:style-name="P51"/>
          <text:h text:style-name="TalentHeader" text:outline-level="3">Kampfsinn I - II</text:h>
          <text:p text:style-name="P49"><text:span text:style-name="T51">Einsatz</text:span>: <text:span text:style-name="T60">Verteidigung</text:span></text:p>
          <text:p text:style-name="P56"><text:span text:style-name="T5">Wirkung</text:span>: <text:span text:style-name="T60">Du erleidest </text:span><text:span text:style-name="T61">erst ab der 3ten / 4ten Parade einen Malus.</text:span></text:p>
          <text:h text:style-name="TalentHeader" text:outline-level="3">Kernschuss</text:h>
          <text:p text:style-name="P49"><text:span text:style-name="T51">Einsatz</text:span>: <text:span text:style-name="T56">Fernkampf Attacke</text:span></text:p>
          <text:p text:style-name="P56"><text:span text:style-name="T5">Wirkung</text:span>: <text:span text:style-name="T60">Du erleidest keinen Malus, wen du in einen Nahkampf hinein feuerst.</text:span></text:p>
          <text:p text:style-name="P56"/>
          <text:h text:style-name="P57" text:outline-level="3">Kommandos I - II</text:h>
          <text:p text:style-name="P49"><text:span text:style-name="T51">Einsatz</text:span>: <text:span text:style-name="T62">Aktion, 1 AP</text:span></text:p>
          <text:p text:style-name="P49"><text:span text:style-name="T5">Wirkung</text:span>: <text:span text:style-name="T62">Verbündete erhalten +1/+2 auf ihre nächste Attacke oder Parade.</text:span></text:p>
          <text:p text:style-name="P56"/>
          <text:h text:style-name="TalentHeader" text:outline-level="3">Konter</text:h>
          <text:p text:style-name="P49"><text:span text:style-name="T51">Einsatz</text:span>: <text:span text:style-name="T56">Nahkampf Verteidigung, 1 AP</text:span></text:p>
          <text:p text:style-name="P58"><text:span text:style-name="T5">Wirkung</text:span>: -2 auf <text:span text:style-name="T59">Verteidigung</text:span>. Bei Erfolg <text:span text:style-name="T63">erleidet das Ziel 1 Schaden.</text:span></text:p>
          <text:p text:style-name="P59"/>
          <text:h text:style-name="TalentHeader" text:outline-level="3">Rundumschlag</text:h>
          <text:p text:style-name="P49"><text:span text:style-name="T51">Einsatz</text:span>: <text:span text:style-name="T56">Nah- oder Fernkampf Attacke, 1 AP</text:span></text:p>
          <text:p text:style-name="P58"><text:span text:style-name="T5">Wirkung</text:span>: <text:span text:style-name="T63">Attackiere bis zu 3 Ziele mit einem Malus von 2.</text:span></text:p>
          <text:p text:style-name="P51"/>
          <text:h text:style-name="TalentHeader" text:outline-level="3">S<text:span text:style-name="T57">t</text:span>urmangriff</text:h>
          <text:p text:style-name="P49"><text:span text:style-name="T51">Einsatz</text:span>: <text:span text:style-name="T56">Nah- oder Fernkampf Attacke, 1 AP</text:span></text:p>
          <text:p text:style-name="P52"><text:span text:style-name="T5">Wirkung</text:span>: <text:span text:style-name="T64">Führ eine extra Bewegung aus und attackiere danach.</text:span></text:p>
          <text:p text:style-name="P51"/>
          <text:h text:style-name="TalentHeader" text:outline-level="3">Wuchtschlag <text:span text:style-name="T54">I - II</text:span></text:h>
          <text:p text:style-name="P49"><text:span text:style-name="T51">Einsatz</text:span>: Nahkampf <text:span text:style-name="T57">Attacke, 1 AP</text:span></text:p>
          <text:p text:style-name="P51"><text:span text:style-name="T5">Wirkung</text:span>: Du verursachst +1/+2 extra Schaden.</text:p>
          <text:p text:style-name="P60"/>
          <text:h text:style-name="TalentHeader" text:outline-level="3">Zielen I - III</text:h>
          <text:p text:style-name="P49"><text:span text:style-name="T51">Einsatz</text:span>: <text:span text:style-name="T57">Fernkampf Attacke, 1 AP</text:span></text:p>
          <text:p text:style-name="P52"><text:span text:style-name="T5">Wirkung</text:span>: Du erhältst +1/+2/+3 auf deine Attacke.</text:p>
        </text:section>
        <text:p text:style-name="P61"/>
        <text:h text:style-name="P62" text:outline-level="2">Zauber</text:h>
        <text:p text:style-name="P63"/>
        <text:h text:style-name="P64" text:outline-level="3">Axxeleratus</text:h>
        <text:p text:style-name="P65"><text:span text:style-name="T5">Einsatz</text:span>: <text:span text:style-name="T65">Aktion, 1 AP</text:span></text:p>
        <text:p text:style-name="P66"><text:span text:style-name="T5">Limits</text:span>: <text:span text:style-name="T65">Berührung, 3 Runde</text:span></text:p>
        <text:p text:style-name="P65"><text:span text:style-name="T5">Wirkung</text:span>: <text:span text:style-name="T65">Deine Bewegung wird verdoppelt und du erhältst +2 auf Zähigkeit (Ausweichen).</text:span></text:p>
        <text:p text:style-name="P67"><text:span text:style-name="T5">Alternativ, </text:span><text:span text:style-name="T66">Dauerlauf</text:span>: <text:span text:style-name="T65">Du kannst für bis zu 3 Stunden Laufen ohne müde oder schlapp zu werden.</text:span></text:p>
        <text:p text:style-name="P66"><text:span text:style-name="T5">Extra (</text:span><text:span text:style-name="T67">pro AP</text:span><text:span text:style-name="T5">)</text:span>:</text:p>
        <text:list text:style-name="L5">
          <text:list-item>
            <text:p text:style-name="P68">+3 Runden <text:span text:style-name="T68">Wirkungsdauer</text:span></text:p>
          </text:list-item>
        </text:list>
        <text:p text:style-name="P69"/>
        <text:h text:style-name="TalentHeader" text:outline-level="3">Armatrutz</text:h>
        <text:p text:style-name="P70"><text:span text:style-name="T5">Einsatz</text:span>: <text:span text:style-name="T68">Aktion, 1 AP</text:span></text:p>
        <text:p text:style-name="P71"><text:span text:style-name="T5">Limits</text:span>: <text:span text:style-name="T68">Selbst, 5 Minuten</text:span></text:p>
        <text:p text:style-name="P70"><text:span text:style-name="T5">Wirkung</text:span>: <text:span text:style-name="T68">Du kannst </text:span><text:span text:style-name="T69">die Fertigkeit </text:span><text:span text:style-name="T68">Zauberei verwenden, um dich gegen physische Angriffe zu Verteidigen.</text:span></text:p>
        <text:p text:style-name="P72"><text:span text:style-name="T5">Alternativ, Harte Schale</text:span>: Du erhältst +2 auf Zähigkeit gegen physische Angriffe.</text:p>
        <text:p text:style-name="P73"><text:span text:style-name="T5">Extra (</text:span><text:span text:style-name="T67">pro AP</text:span><text:span text:style-name="T5">)</text:span>:</text:p>
        <text:list text:continue-numbering="true" text:style-name="L5">
          <text:list-item>
            <text:p text:style-name="P74">Reichweite Berührung</text:p>
          </text:list-item>
          <text:list-item>
            <text:p text:style-name="P74">+5 Minuten Wirkungsdauer</text:p>
          </text:list-item>
        </text:list>
        <text:p text:style-name="P75"/>
        <text:h text:style-name="P76" text:outline-level="3">Balsam Salabunde</text:h>
        <text:p text:style-name="P77"><text:span text:style-name="T5">Einsatz</text:span>: <text:span text:style-name="T70">1 Minute</text:span>, 1 AP</text:p>
        <text:p text:style-name="P78"><text:span text:style-name="T5">Limits</text:span>: <text:span text:style-name="T71">Berührung,</text:span> <text:span text:style-name="T72">1 Lebewesen</text:span></text:p>
        <text:p text:style-name="P77"><text:span text:style-name="T5">Wirkung</text:span>: <text:span text:style-name="T69">Magische Heilung. </text:span><text:span text:style-name="T71">Ziel erhält 1 LP zurück.</text:span></text:p>
        <text:p text:style-name="P79"><text:span text:style-name="T5">Alternativ, </text:span><text:span text:style-name="T66">Klarum Purum</text:span>: Ziel erholt sich von einer Krankheit oder einem Gift (SG hängt vom Gift / Krankheit ab).</text:p>
        <text:p text:style-name="P73"><text:span text:style-name="T5">Extra (</text:span><text:span text:style-name="T67">pro AP</text:span><text:span text:style-name="T5">)</text:span>:</text:p>
        <text:list text:continue-numbering="true" text:style-name="L5">
          <text:list-item>
            <text:p text:style-name="P80">Mit nur einer Aktion wirken</text:p>
          </text:list-item>
          <text:list-item>
            <text:p text:style-name="P81">+1 LP</text:p>
          </text:list-item>
          <text:list-item>
            <text:p text:style-name="P82">+1 Lebewesen</text:p>
          </text:list-item>
          <text:list-item>
            <text:p text:style-name="P81">+9m Reichweite</text:p>
          </text:list-item>
        </text:list>
        <text:p text:style-name="P83"/>
        <text:h text:style-name="P84" text:outline-level="3">Banballadin</text:h>
        <text:p text:style-name="P85"><text:span text:style-name="T5">Einsatz</text:span>: Aktion, 1 AP</text:p>
        <text:p text:style-name="P86"><text:span text:style-name="T5">Limits</text:span>: 15m, 1 Stunde, <text:span text:style-name="T72">1 Person</text:span></text:p>
        <text:p text:style-name="P87"><text:span text:style-name="T5">Probe</text:span>: Zauberei vs. Zähigkeit</text:p>
        <text:p text:style-name="P85"><text:span text:style-name="T5">Wirkung</text:span>: <text:span text:style-name="T73">Das Opfer möchte dein Freund sein und glaubt dir fast alles.</text:span></text:p>
        <text:p text:style-name="P73"><text:soft-page-break/><text:span text:style-name="T5">Extra (</text:span><text:span text:style-name="T67">pro AP</text:span><text:span text:style-name="T5">)</text:span>:</text:p>
        <text:list text:continue-numbering="true" text:style-name="L5">
          <text:list-item>
            <text:p text:style-name="P88"><text:span text:style-name="T73">+1 Person</text:span></text:p>
          </text:list-item>
          <text:list-item>
            <text:p text:style-name="P89">+3 Stunden <text:span text:style-name="T68">Wirkungsdauer</text:span></text:p>
          </text:list-item>
        </text:list>
        <text:p text:style-name="Standard"/>
        <text:h text:style-name="TalentHeader" text:outline-level="3">Botschaft</text:h>
        <text:p text:style-name="P90"><text:span text:style-name="T5">Einsatz</text:span>: Aktion, 1 AP</text:p>
        <text:p text:style-name="P86"><text:span text:style-name="T5">Limits</text:span>: Unbegrenzt, <text:span text:style-name="T72">1 Person</text:span></text:p>
        <text:p text:style-name="P90"><text:span text:style-name="T5">Wirkung</text:span>: Du sprichst ein paar Wörter (2 bis 3 Sätze), welche die Zielperson als Stimme in ihrem Kopf hört.</text:p>
        <text:p text:style-name="P91"><text:span text:style-name="T74">Alternativ, </text:span><text:span text:style-name="T75">Audienz</text:span>: Du erscheinst dem Ziel in einem Traum (den du kontrollierst). Dort könnt ihr euch ungestört für mehrere Stunden unterhalten. Beide Teilnehmer können die Kommunikation jederzeit und ohne Probe beenden.</text:p>
        <text:p text:style-name="P73"><text:span text:style-name="T5">Extra (</text:span><text:span text:style-name="T67">pro AP</text:span><text:span text:style-name="T5">)</text:span>:</text:p>
        <text:list text:continue-numbering="true" text:style-name="L5">
          <text:list-item>
            <text:p text:style-name="P88"><text:span text:style-name="T73">+1 Person</text:span></text:p>
          </text:list-item>
        </text:list>
        <text:p text:style-name="P92"/>
        <text:h text:style-name="P93" text:outline-level="3">Foramen</text:h>
        <text:p text:style-name="P94"><text:span text:style-name="T5">Einsatz</text:span>: <text:span text:style-name="T76">Aktion</text:span>, 1 AP</text:p>
        <text:p text:style-name="P95"><text:span text:style-name="T5">Limits</text:span>: <text:span text:style-name="T77">Berührung, </text:span><text:span text:style-name="T76">1 </text:span><text:span text:style-name="T77">Objekt</text:span></text:p>
        <text:p text:style-name="P96"><text:span text:style-name="T5">Probe</text:span>: Zauberei</text:p>
        <text:p text:style-name="P94"><text:span text:style-name="T5">Wirkung</text:span>: <text:span text:style-name="T76">Du öffnest ein schloss oder einen Riegel mittels Magie. SG hängt von der Qualität des Schlosses ab.</text:span></text:p>
        <text:p text:style-name="P97"/>
        <text:h text:style-name="P98" text:outline-level="3">Fulminictus</text:h>
        <text:p text:style-name="P91"><text:span text:style-name="T5">Einsatz</text:span>: Aktion</text:p>
        <text:p text:style-name="P99"><text:span text:style-name="T5">Limits</text:span>: <text:span text:style-name="T71">15m,</text:span> <text:span text:style-name="T72">1 Lebewesen</text:span></text:p>
        <text:p text:style-name="P100"><text:span text:style-name="T5">Probe</text:span>: Zauberei vs. Zähigkeit</text:p>
        <text:p text:style-name="P91"><text:span text:style-name="T5">Wirkung</text:span>: <text:span text:style-name="T78">Magisches Geschoss. </text:span><text:span text:style-name="T71">Ziel erleidet 1 Punkt </text:span><text:span text:style-name="T79">Zauberschaden</text:span><text:span text:style-name="T71">.</text:span></text:p>
        <text:p text:style-name="P101"><text:span text:style-name="T5">Alternativ, </text:span><text:span text:style-name="T80">Reinigung</text:span>: Töte alle Insekten und Kleintiere in 30m Radius.</text:p>
        <text:p text:style-name="P73"><text:span text:style-name="T5">Extra (</text:span><text:span text:style-name="T67">pro AP</text:span><text:span text:style-name="T5">)</text:span>:</text:p>
        <text:list text:continue-numbering="true" text:style-name="L5">
          <text:list-item>
            <text:p text:style-name="P102">+15m Reichweite</text:p>
          </text:list-item>
          <text:list-item>
            <text:p text:style-name="P103">+2 Würfel</text:p>
          </text:list-item>
          <text:list-item>
            <text:p text:style-name="P103">+1 Schaden</text:p>
          </text:list-item>
        </text:list>
        <text:p text:style-name="P104"/>
        <text:h text:style-name="TalentHeader" text:outline-level="3">Ignifaxius</text:h>
        <text:p text:style-name="P105"><text:span text:style-name="T5">Einsatz</text:span>: Aktion</text:p>
        <text:p text:style-name="P106"><text:span text:style-name="T5">Limits</text:span>: <text:span text:style-name="T71">15m,</text:span> <text:span text:style-name="T72">1 Lebewesen</text:span></text:p>
        <text:p text:style-name="P87"><text:span text:style-name="T5">Probe</text:span>: Zauberei vs. Zähigkeit</text:p>
        <text:p text:style-name="P105"><text:span text:style-name="T5">Wirkung</text:span>: <text:span text:style-name="T78">Feuerlanze. </text:span><text:span text:style-name="T71">Ziel erleidet </text:span><text:span text:style-name="T79">1</text:span><text:span text:style-name="T71"> Punkt Feuerschaden.</text:span></text:p>
        <text:p text:style-name="P73"><text:soft-page-break/><text:span text:style-name="T5">Extra (</text:span><text:span text:style-name="T67">pro AP</text:span><text:span text:style-name="T5">)</text:span>:</text:p>
        <text:list text:continue-numbering="true" text:style-name="L5">
          <text:list-item>
            <text:p text:style-name="P81">+15m Reichweite</text:p>
          </text:list-item>
          <text:list-item>
            <text:p text:style-name="P103">+2 Würfel</text:p>
          </text:list-item>
          <text:list-item>
            <text:p text:style-name="P103">+1 Schaden</text:p>
          </text:list-item>
        </text:list>
        <text:p text:style-name="P107"/>
        <text:h text:style-name="P108" text:outline-level="3">Motoricus</text:h>
        <text:p text:style-name="P109"><text:span text:style-name="T5">Einsatz</text:span>: Aktion</text:p>
        <text:p text:style-name="P110"><text:span text:style-name="T5">Limits</text:span>: <text:span text:style-name="T81">7m,</text:span> <text:span text:style-name="T72">1 </text:span><text:span text:style-name="T82">Objekt </text:span><text:span text:style-name="T83">(25kg)</text:span><text:span text:style-name="T82">, 5 Minuten</text:span></text:p>
        <text:p text:style-name="P109"><text:span text:style-name="T5">Wirkung</text:span>: <text:span text:style-name="T82">Du kannst </text:span><text:span text:style-name="T84">ein Objekt mit </text:span><text:span text:style-name="T82">Gedankenkraft langsam heben und bewegen. </text:span><text:span text:style-name="T83">Möchtest du mit dem Objekt etwas tun dass eine Probe erfordert, wird diese auf Zauberei gewürfelt.</text:span></text:p>
        <text:p text:style-name="P73"><text:span text:style-name="T5">Extra (</text:span><text:span text:style-name="T67">pro AP</text:span><text:span text:style-name="T5">)</text:span>:</text:p>
        <text:list text:continue-numbering="true" text:style-name="L5">
          <text:list-item>
            <text:p text:style-name="P111">+<text:span text:style-name="T85">25kg</text:span></text:p>
          </text:list-item>
          <text:list-item>
            <text:p text:style-name="P112">+7m Reichweite</text:p>
          </text:list-item>
          <text:list-item>
            <text:p text:style-name="P112">+1 Objekt (Gesamtgewicht zählt)</text:p>
          </text:list-item>
        </text:list>
        <text:p text:style-name="P113"/>
        <text:h text:style-name="P114" text:outline-level="3">Odem Arcanum</text:h>
        <text:p text:style-name="P115"><text:span text:style-name="T5">Einsatz</text:span>: Aktion, <text:span text:style-name="T83">1 AP</text:span></text:p>
        <text:p text:style-name="P116"><text:span text:style-name="T5">Limits</text:span>: <text:span text:style-name="T83">Selbst / </text:span><text:span text:style-name="T86">7m</text:span><text:span text:style-name="T83">, </text:span><text:span text:style-name="T86">1 Minute</text:span></text:p>
        <text:p text:style-name="P115"><text:span text:style-name="T5">Wirkung</text:span>: <text:span text:style-name="T86">Du kannst Illusionen durchschauen und erkennst Magie in der Nähe (Wesen, Objekte, Phänomene). </text:span><text:span text:style-name="T87">Extreme Magie kann den Anwender kurzzeitig Blenden (Teclador Effekt).</text:span></text:p>
        <text:p text:style-name="P117"><text:span text:style-name="T5">Alternativ, <text:s/>Blick aufs Wesen</text:span>: Der Erzähler beantwortet dir 3 Ja/Nein Fragen zu etwas magischen.</text:p>
        <text:p text:style-name="P118"><text:span text:style-name="T5">Alternativ, Analys Arcanstruktur</text:span>: <text:span text:style-name="T77">Du ergründest die Details zu etwas magischen</text:span>. Je nach Komplexität des Objekt <text:span text:style-name="T88">kann die Analyse Minuten, Stunden, Tage oder sogar Wochen dauern.</text:span></text:p>
        <text:p text:style-name="P73"><text:span text:style-name="T5">Extra (</text:span><text:span text:style-name="T67">pro AP</text:span><text:span text:style-name="T5">)</text:span>:</text:p>
        <text:list text:continue-numbering="true" text:style-name="L5">
          <text:list-item>
            <text:p text:style-name="P119">+7m</text:p>
          </text:list-item>
          <text:list-item>
            <text:p text:style-name="P119">+1 Minute <text:span text:style-name="T68">Wirkungsdauer</text:span></text:p>
          </text:list-item>
        </text:list>
        <text:p text:style-name="P120"/>
        <text:h text:style-name="P121" text:outline-level="3">Transversalis</text:h>
        <text:p text:style-name="P122"><text:span text:style-name="T5">Einsatz</text:span>: Aktion, <text:span text:style-name="T89">1 </text:span><text:span text:style-name="T83">AP</text:span></text:p>
        <text:p text:style-name="P123"><text:span text:style-name="T5">Limits</text:span>: <text:span text:style-name="T83">Selbst, </text:span><text:span text:style-name="T87">50</text:span><text:span text:style-name="T89"> Meilen</text:span></text:p>
        <text:p text:style-name="P124"><text:span text:style-name="T5">Probe</text:span>: Zauberei</text:p>
        <text:p text:style-name="P122"><text:span text:style-name="T5">Wirkung</text:span>: <text:span text:style-name="T89">Du teleportierst dich an einen </text:span><text:span text:style-name="T87">anderen Ort. SG hängt davon ab wie gut du das Ziel kennst: 1 = Sichtkontakt, 2 = Gut Bekannt, 3 = Schlecht Bekannt, 4 = Beschreibung.</text:span></text:p>
        <text:p text:style-name="P73"><text:span text:style-name="T5">Extra (</text:span><text:span text:style-name="T67">pro AP</text:span><text:span text:style-name="T5">)</text:span>:</text:p>
        <text:list text:continue-numbering="true" text:style-name="L5">
          <text:list-item>
            <text:p text:style-name="P125">+50 Meilen</text:p>
          </text:list-item>
          <text:list-item>
            <text:p text:style-name="P125">+1 Person Mitnehmen (erfordert Berührung)</text:p>
          </text:list-item>
          <text:list-item>
            <text:p text:style-name="P125">+100kg Objekt mitnehmen (erfordert Berührung)</text:p>
          </text:list-item>
        </text:list>
        <text:p text:style-name="P126"/>
        <text:h text:style-name="P127" text:outline-level="1">Kapitel <text:span text:style-name="T12">x</text:span></text:h>
        <text:h text:style-name="P128" text:outline-level="1">Merkmale</text:h>
        <text:p text:style-name="P129">Merkmale beschreiben die passiven Eigenschaften deines Helden, etwa wie viel Schaden er einstecken kann oder wie erschöpft er ist.</text:p>
        <text:p text:style-name="P129"/>
        <text:section text:style-name="Sect2" text:name="Section1">
          <text:h text:style-name="P130" text:outline-level="2">AP</text:h>
          <text:p text:style-name="P131">AP (Ausdauerpunkte) können eingesetzt werden, um besondere Fähigkeiten zu aktivieren.</text:p>
          <text:list text:style-name="L6">
            <text:list-item>
              <text:p text:style-name="P132">Vorteil auf Probe</text:p>
            </text:list-item>
            <text:list-item>
              <text:p text:style-name="P132"><text:span text:style-name="T90">A</text:span>ndere Fertigkeit für Probe verwenden (z.B. <text:span text:style-name="T90">Attacke mit </text:span>Gerissenhei<text:span text:style-name="T90">t</text:span>)</text:p>
            </text:list-item>
            <text:list-item>
              <text:p text:style-name="P133">Einen besonderen Effekt einer Fertigkeit benutzen</text:p>
            </text:list-item>
          </text:list>
          <text:p text:style-name="P134">Eine Nachtruhe stellt W6 AP wieder her.</text:p>
          <text:p text:style-name="P135"/>
          <text:h text:style-name="P136" text:outline-level="2">LP</text:h>
          <text:p text:style-name="P137">LP (Lebenspunkte) geben an, wie viel Schaden dein Held einstecken kann.</text:p>
          <text:p text:style-name="P137">Erleidet dein Held Schaden, verliert er entsprechend viele LP. Sinken seine LP auf 0, wird er kampfunfähig.</text:p>
          <text:p text:style-name="P137">Eine Nachtruhe stellt 1 LP wieder her.</text:p>
          <text:p text:style-name="P138"/>
          <text:h text:style-name="Heading_20_3" text:outline-level="3">Erste Hilfe</text:h>
          <text:p text:style-name="P138">Hat ein Charakter <text:span text:style-name="T90">gerade erst</text:span> LP verloren, kann mit einer Probe auf Klugheit <text:span text:style-name="T90">einmalig </text:span>Erste Hilfe geleistet werden. Bei Erfolg stellt das Ziel 1 LP wieder her.</text:p>
          <text:h text:style-name="P139" text:outline-level="2">EP</text:h>
          <text:p text:style-name="P131">Du erhältst 1 EP (Erfahrungspunkt) pro Spielabend sowie für das Besiegen mächtiger Monster und das Abschließen von Quests.</text:p>
          <text:p text:style-name="P131">Nach etwa einer Woche Training können EP ausgegeben werden:</text:p>
          <text:list text:style-name="L7">
            <text:list-item>
              <text:p text:style-name="P140"><text:span text:style-name="T5">Fertigkeit +1</text:span>: Neuer Wert <text:span text:style-name="T91">in</text:span> EP</text:p>
            </text:list-item>
            <text:list-item>
              <text:p text:style-name="P140"><text:span text:style-name="T92">Neue </text:span><text:span text:style-name="T5">Spezialisierung</text:span>: 5 EP</text:p>
            </text:list-item>
          </text:list>
          <text:p text:style-name="P141"/>
          <text:h text:style-name="P142" text:outline-level="2">Taler</text:h>
          <text:p text:style-name="P143">Taler sind die Standardwährung des Spiels. Regeltechnisch werden nur Taler verwaltet, in der Spielwelt existieren jedoch verschiedene Münzen:</text:p>
          <text:list text:style-name="L8">
            <text:list-item>
              <text:p text:style-name="P144">1 Dukat</text:p>
            </text:list-item>
            <text:list-item>
              <text:p text:style-name="P144">10 Taler</text:p>
            </text:list-item>
            <text:list-item>
              <text:p text:style-name="P144">1<text:span text:style-name="T90">0</text:span>0 Heller</text:p>
            </text:list-item>
            <text:list-item>
              <text:p text:style-name="P144">1<text:span text:style-name="T90">00</text:span>0 Kreuzer</text:p>
            </text:list-item>
          </text:list>
          <text:p text:style-name="P143"><text:span text:style-name="T93">Hinweis</text:span><text:span text:style-name="T90">: </text:span>Kleinstausgaben, wie ein Bier in der Taverne oder ein Trinkgeld für einen Botenjungen, müssen nicht verwaltet werden.</text:p>
          <text:p text:style-name="P143"/>
        </text:section>
        <text:p text:style-name="P129"/>
        <text:h text:style-name="P145" text:outline-level="1">Kapitel <text:span text:style-name="T94">xx</text:span></text:h>
        <text:h text:style-name="P146" text:outline-level="1">Ausrüstung</text:h>
        <text:h text:style-name="P147" text:outline-level="2">Grundregeln</text:h>
        <text:p text:style-name="P148">Jeder Held hat genau 10 Slots für Gegenstände, die er mit sich tragen kann. Handgegenstände anzulegen oder zu tauschen kostet eine Aktion.</text:p>
        <text:p text:style-name="P148"/>
        <text:h text:style-name="P149" text:outline-level="2">Vorräte</text:h>
        <text:p text:style-name="P150">Vorräte verkörpern alle möglichen Kleinigkeiten, die ein Abenteurer dabei haben könnte, wie z.B. Proviant, <text:span text:style-name="T95">ein </text:span>Seil<text:span text:style-name="T95">e</text:span>, <text:span text:style-name="T95">kleines </text:span>Werkzeug <text:span text:style-name="T95">(Axt, </text:span><text:span text:style-name="T96">Brechstange</text:span><text:span text:style-name="T95">)</text:span>, <text:span text:style-name="T95">eine </text:span>Fackel, Kletterausrüstung, Dietriche, etc.</text:p>
        <text:p text:style-name="P150"><text:span text:style-name="T95">Möchtest du</text:span> so einen alltäglichen Gegenstand benutzen, musst du einfach nur 1 Punkt Vorräte ausgeben. Es ist also keine kleinteilige Verwaltung nötig.</text:p>
        <text:p text:style-name="P150">Vorräte geben keinen Bonus, sondern sind Voraussetzung um bestimmte Dinge zu tun (z.B. Dietrich zum Schloss knacken). Außerdem sind sie nach der Nutzung verbraucht (Fackeln und Laternen halten für eine Stunde, ein Dietrich kann genau für eine Probe benutzt werden, etc.).</text:p>
        <text:p text:style-name="P150">Vorräte kosten <text:span text:style-name="T5">1 Silber pro Portion</text:span> und du kannst <text:span text:style-name="T5">3 Vorräte pro Slot</text:span> transportieren.</text:p>
        <text:p text:style-name="P151"/>
        <text:p text:style-name="P150"><text:span text:style-name="T5">Optional</text:span>: Du kannst haltbare Vorratsgegenstände (wie z.B. <text:span text:style-name="T95">Dietriche, ein </text:span>Zelt oder <text:span text:style-name="T95">eine </text:span>Brechstange) für ein <text:span text:style-name="T95">5 Silber</text:span> <text:span text:style-name="T95">gezielt </text:span>kaufen. So ein Gegenstand wird durch die Nutzung nicht verbraucht, belegt aber auch einen ganzen Slot in deinem Inventar.</text:p>
        <text:p text:style-name="P150"/>
        <text:h text:style-name="Heading_20_2" text:outline-level="2">Marker</text:h>
        <table:table table:name="Table1" table:style-name="Table1">
          <table:table-column table:style-name="Table1.A"/>
          <table:table-column table:style-name="Table1.B"/>
          <table:table-column table:style-name="Table1.C"/>
          <table:table-row>
            <table:table-cell table:style-name="Table1.A1" office:value-type="string">
              <text:p text:style-name="Table_20_Header">Name</text:p>
            </table:table-cell>
            <table:table-cell table:style-name="Table1.A1" office:value-type="string">
              <text:p text:style-name="P152">Preis</text:p>
            </table:table-cell>
            <table:table-cell table:style-name="Table1.C1" office:value-type="string">
              <text:p text:style-name="P153">Wirkung</text:p>
            </table:table-cell>
          </table:table-row>
          <table:table-row>
            <table:table-cell table:style-name="Table1.A2" office:value-type="string">
              <text:p text:style-name="P154">Dolch, Rapier, Schwert</text:p>
            </table:table-cell>
            <table:table-cell table:style-name="Table1.B2" office:value-type="string">
              <text:p text:style-name="P155">10</text:p>
            </table:table-cell>
            <table:table-cell table:style-name="Table1.C2" office:value-type="string">
              <text:p text:style-name="P154">Attacke +1, Nahkampf, Hand</text:p>
            </table:table-cell>
          </table:table-row>
          <table:table-row>
            <table:table-cell table:style-name="Table1.A2" office:value-type="string">
              <text:p text:style-name="P154">Axt, Zweihänder</text:p>
            </table:table-cell>
            <table:table-cell table:style-name="Table1.B3" office:value-type="string">
              <text:p text:style-name="P156">15</text:p>
            </table:table-cell>
            <table:table-cell table:style-name="Table1.C3" office:value-type="string">
              <text:p text:style-name="P154">Attacke +2, Nahkampf, 2 Hände</text:p>
            </table:table-cell>
          </table:table-row>
          <table:table-row>
            <table:table-cell table:style-name="Table1.A4" office:value-type="string">
              <text:p text:style-name="P154">Armbrust, Bogen</text:p>
            </table:table-cell>
            <table:table-cell table:style-name="Table1.B4" office:value-type="string">
              <text:p text:style-name="P155">10</text:p>
            </table:table-cell>
            <table:table-cell table:style-name="Table1.C4" office:value-type="string">
              <text:p text:style-name="P154">Attacke +2, Fernkampf, 2 Hände</text:p>
            </table:table-cell>
          </table:table-row>
          <table:table-row>
            <table:table-cell table:style-name="Table1.A2" office:value-type="string">
              <text:p text:style-name="P154">Zauberstab</text:p>
            </table:table-cell>
            <table:table-cell table:style-name="Table1.B5" office:value-type="string">
              <text:p text:style-name="P155">15</text:p>
            </table:table-cell>
            <table:table-cell table:style-name="Table1.C5" office:value-type="string">
              <text:p text:style-name="P154">Zauber +1, 2 Hände</text:p>
            </table:table-cell>
          </table:table-row>
          <table:table-row>
            <table:table-cell table:style-name="Table1.A6" office:value-type="string">
              <text:p text:style-name="Table_20_Contents">Rüstung</text:p>
            </table:table-cell>
            <table:table-cell table:style-name="Table1.B6" office:value-type="string">
              <text:p text:style-name="P155">50</text:p>
            </table:table-cell>
            <table:table-cell table:style-name="Table1.C6" office:value-type="string">
              <text:p text:style-name="P154">Parade +1, Rüstung</text:p>
            </table:table-cell>
          </table:table-row>
          <table:table-row>
            <table:table-cell table:style-name="Table1.A6" office:value-type="string">
              <text:p text:style-name="P154">Schild</text:p>
            </table:table-cell>
            <table:table-cell table:style-name="Table1.B6" office:value-type="string">
              <text:p text:style-name="P155">10</text:p>
            </table:table-cell>
            <table:table-cell table:style-name="Table1.C6" office:value-type="string">
              <text:p text:style-name="P154">Parade +1, Hand</text:p>
            </table:table-cell>
          </table:table-row>
        </table:table>
        <text:p text:style-name="P157"/>
        <text:p text:style-name="P157"/>
        <text:h text:style-name="P158" text:outline-level="1">Kapitel <text:span text:style-name="T12">x</text:span><text:span text:style-name="T97">x</text:span></text:h>
        <text:h text:style-name="P159" text:outline-level="1">Vorteile</text:h>
        <text:p text:style-name="P160">Vorteile verkörpern besondere Personen, Beziehungen <text:span text:style-name="T98">oder </text:span>Ressourcen, auf die dein Charakter zurückgreifen kann.</text:p>
        <text:p text:style-name="P161"/>
        <text:section text:style-name="Sect2" text:name="Section3">
          <text:h text:style-name="P162" text:outline-level="2">Flexibilität</text:h>
          <text:p text:style-name="P161">Vorteile sind dynamisch und können sich im Laufe des Spiels verändern, verloren gehen oder neu gewonnen werden.</text:p>
          <text:p text:style-name="P161">So kann dein Held beispielsweise den Vorteil Reich erhalten, wenn er einen Schatz hebt.</text:p>
          <text:p text:style-name="P161">Besitzt er bereits fünf Vorteile, muss er dafür einen bestehenden Vorteil aufgeben, <text:span text:style-name="T98">z.B. </text:span>indem er seine Kontakte bei der Polizei vernachlässigt, um sein neues Luxusleben zu genießen.</text:p>
          <text:p text:style-name="P161"/>
          <text:h text:style-name="P162" text:outline-level="2"><text:span text:style-name="T99">Optional: </text:span><text:span text:style-name="T100">Erweiterter</text:span> Vorteil</text:h>
          <text:p text:style-name="P163">Bei Bedarf kannst du einen bestehenden Vorteil um eine besondere Eigenschaft erweitern.</text:p>
          <text:p text:style-name="P163">So könnte dein loyaler Jagdhund (Gefährte) beispielsweise telepathisch mit dir kommunizieren, oder dein Familienschwert teleportiert sich auf Kommando in deine Hand.</text:p>
          <text:p text:style-name="P163">Eine solche Erweiterung belegt allerdings einen eigenen Vorteilsslot.</text:p>
          <text:h text:style-name="P162" text:outline-level="2">Minions</text:h>
          <text:p text:style-name="P163">Minions sind NSCs, die deinem Helden loyal zur Seite stehen. Sie werden vom Erzähler kontrolliert, aber du legst die Proben für sie ab.</text:p>
          <text:p text:style-name="P163">Anstelle von Fertigkeiten besitzen sie ein Level, das deiner höchsten Fertigkeit entspricht.</text:p>
          <text:p text:style-name="P163">Proben, die der Minion besonders gut beherrscht, legt er mit seinem vollen Level ab. Für alle anderen Proben verwendet er sein halbes Level (aufrunden).</text:p>
          <text:p text:style-name="P163">Minions können Werkzeuge benutzen, um den üblichen Bonus von +2 zu erhalten, besitzen jedoch keine Spezialisierungen.</text:p>
          <text:p text:style-name="P163">Schwache Minions sind nicht besonders robust und gehen bereits nach einem Punkt Schaden zu Boden.</text:p>
          <text:p text:style-name="P163"/>
          <text:p text:style-name="P163"/>
          <text:p text:style-name="P163"/>
          <text:p text:style-name="P163"/>
        </text:section>
        <text:p text:style-name="P160"/>
        <text:h text:style-name="P164" text:outline-level="2">Beispiel <text:span text:style-name="T101">Vorteile</text:span></text:h>
        <table:table table:name="Table3" table:style-name="Table3">
          <table:table-column table:style-name="Table3.A"/>
          <table:table-column table:style-name="Table3.B"/>
          <table:table-row>
            <table:table-cell table:style-name="Table3.A1" office:value-type="string">
              <text:p text:style-name="P165">Name</text:p>
            </table:table-cell>
            <table:table-cell table:style-name="Table3.B1" office:value-type="string">
              <text:p text:style-name="P165">Beschreibung</text:p>
            </table:table-cell>
          </table:table-row>
          <table:table-row>
            <table:table-cell table:style-name="Table3.A2" office:value-type="string">
              <text:p text:style-name="P166">Gefährte</text:p>
            </table:table-cell>
            <table:table-cell table:style-name="Table3.B2" office:value-type="string">
              <text:p text:style-name="P166">Du hast einen kompetenten Minion der dir loyal zur Seite steht (z.B. Jagdhund oder Bodyguard).</text:p>
            </table:table-cell>
          </table:table-row>
          <table:table-row>
            <table:table-cell table:style-name="Table3.A2" office:value-type="string">
              <text:p text:style-name="P166">Fahrzeug</text:p>
            </table:table-cell>
            <table:table-cell table:style-name="Table3.B2" office:value-type="string">
              <text:p text:style-name="P166">Du besitzt ein <text:span text:style-name="T102">eigenes </text:span>Fahrzeug (z.B. <text:span text:style-name="T103">Kutsche, Pferd oder Schiff</text:span>).</text:p>
            </table:table-cell>
          </table:table-row>
          <table:table-row>
            <table:table-cell table:style-name="Table3.A4" office:value-type="string">
              <text:p text:style-name="P166">Kontakte</text:p>
            </table:table-cell>
            <table:table-cell table:style-name="Table3.B4" office:value-type="string">
              <text:p text:style-name="P166">Du hast Kontakte in einer Organisation (z.B. <text:span text:style-name="T103">Adel oder </text:span>Kirche), die dich mit Informationen und kleineren Gefallen unterstützen.</text:p>
            </table:table-cell>
          </table:table-row>
          <table:table-row>
            <table:table-cell table:style-name="Table3.A4" office:value-type="string">
              <text:p text:style-name="P166">Mentor</text:p>
            </table:table-cell>
            <table:table-cell table:style-name="Table3.B4" office:value-type="string">
              <text:p text:style-name="P166">Eine mächtige Person <text:span text:style-name="T102">(z.B. Adliger </text:span><text:span text:style-name="T103">oder Magier</text:span><text:span text:style-name="T102">) </text:span><text:span text:style-name="T104">steht mit Rat und Tat zur Seite.</text:span></text:p>
            </table:table-cell>
          </table:table-row>
          <table:table-row>
            <table:table-cell table:style-name="Table3.A6" office:value-type="string">
              <text:p text:style-name="P166">Personal</text:p>
            </table:table-cell>
            <table:table-cell table:style-name="Table3.B6" office:value-type="string">
              <text:p text:style-name="P166">Du befehligst eine Gruppe <text:span text:style-name="T98">schwacher</text:span> Minions (z.B. <text:span text:style-name="T103">Schläger</text:span>).</text:p>
            </table:table-cell>
          </table:table-row>
          <table:table-row>
            <table:table-cell table:style-name="Table3.A7" office:value-type="string">
              <text:p text:style-name="P166">Ruhm</text:p>
            </table:table-cell>
            <table:table-cell table:style-name="Table3.B7" office:value-type="string">
              <text:p text:style-name="P166">Du bist <text:span text:style-name="T103">berühmt als Abenteurer, Künstler oder dergleichen.</text:span></text:p>
            </table:table-cell>
          </table:table-row>
          <table:table-row>
            <table:table-cell table:style-name="Table3.A8" office:value-type="string">
              <text:p text:style-name="P166">Status</text:p>
            </table:table-cell>
            <table:table-cell table:style-name="Table3.B8" office:value-type="string">
              <text:p text:style-name="P166">Du bist ein angesehenes Mitglied einer wichtigen Organisation (z.B. Adel <text:span text:style-name="T103">oder Kirche</text:span>).</text:p>
            </table:table-cell>
          </table:table-row>
          <table:table-row>
            <table:table-cell table:style-name="Table3.A9" office:value-type="string">
              <text:p text:style-name="P166">Verbündeter</text:p>
            </table:table-cell>
            <table:table-cell table:style-name="Table3.B9" office:value-type="string">
              <text:p text:style-name="P166">Eine mächtige Person oder Organisation steht dir zur Seite.</text:p>
            </table:table-cell>
          </table:table-row>
          <table:table-row>
            <table:table-cell table:style-name="Table3.A10" office:value-type="string">
              <text:p text:style-name="P166">Zuflucht</text:p>
            </table:table-cell>
            <table:table-cell table:style-name="Table3.B10" office:value-type="string">
              <text:p text:style-name="P166">Du hast einen sicheren oder geheimen Rückzugsort <text:s/>(z.B. gesicherte Villa oder geheime Basis).</text:p>
            </table:table-cell>
          </table:table-row>
        </table:table>
        <text:p text:style-name="P167"/>
      </text:section>
      <text:section text:style-name="Sect1" text:name="Section8">
        <text:h text:style-name="P168" text:outline-level="1">Kapitel <text:span text:style-name="T105">XX</text:span></text:h>
        <text:h text:style-name="P169" text:outline-level="1">Regeln</text:h>
        <text:p text:style-name="P170"><text:span text:style-name="T106">Für den</text:span> Großteil des Spiels <text:span text:style-name="T106">erzählt ihr eine Geschichte. Die</text:span> Spieler übernehmen die Rolle <text:span text:style-name="T106">der</text:span> Helden <text:span text:style-name="T106">und</text:span> der Erzähler <text:span text:style-name="T107">übernimmt den Rest der Welt. </text:span>Für bestimmte Situationen gibt es jedoch Regeln, die den Ausgang der Geschichte bestimmen.</text:p>
        <text:p text:style-name="Standard"><text:span text:style-name="T5">Hinweis</text:span>: Anderswelt ist ein spielerorientiertes System. <text:span text:style-name="T108">Das bedeutet, d</text:span>er Erzähler würfelt niemals. <text:span text:style-name="T108">A</text:span>lle Proben werden von den Spielern abgelegt.</text:p>
        <text:p text:style-name="P171"/>
        <text:section text:style-name="Sect2" text:name="Section4">
          <text:h text:style-name="P172" text:outline-level="2">Einfache Probe</text:h>
          <text:p text:style-name="P173">Wenn ein Held etwas Riskantes oder Ungewisses versucht, kann der Erzähler eine Probe verlangen.</text:p>
          <text:p text:style-name="P173">Er legt die passende Fertigkeit und den Schwierigkeitsgrad (SG) fest.</text:p>
          <text:p text:style-name="P174">Würfle 1W20 und addiere die geprüfte Fertigkeit sowie +2, falls du eine passende Spezialisierung besitzt.</text:p>
          <text:p text:style-name="P174">Erreichst oder übertriffst du den SG, gelingt die Probe.</text:p>
          <text:p text:style-name="P174">Zeigt der Würfel eine natürliche 20, erzielst du einen meisterlichen Erfolg. Die Probe gelingt besonders gut.</text:p>
          <text:p text:style-name="P174"/>
          <table:table table:name="Table8" table:style-name="Table8">
            <table:table-column table:style-name="Table8.A"/>
            <table:table-column table:style-name="Table8.B"/>
            <table:table-row>
              <table:table-cell table:style-name="Table8.A1" office:value-type="string">
                <text:p text:style-name="P175">SG</text:p>
              </table:table-cell>
              <table:table-cell table:style-name="Table8.B1" office:value-type="string">
                <text:p text:style-name="P176">Schwierigkeit</text:p>
              </table:table-cell>
            </table:table-row>
            <table:table-row>
              <table:table-cell table:style-name="Table8.A2" office:value-type="string">
                <text:p text:style-name="P177">10</text:p>
              </table:table-cell>
              <table:table-cell table:style-name="Table8.B2" office:value-type="string">
                <text:p text:style-name="P177">Simpel</text:p>
              </table:table-cell>
            </table:table-row>
            <table:table-row>
              <table:table-cell table:style-name="Table8.A2" office:value-type="string">
                <text:p text:style-name="P177">15</text:p>
              </table:table-cell>
              <table:table-cell table:style-name="Table8.B2" office:value-type="string">
                <text:p text:style-name="P177">Normal</text:p>
              </table:table-cell>
            </table:table-row>
            <table:table-row>
              <table:table-cell table:style-name="Table8.A4" office:value-type="string">
                <text:p text:style-name="P177">20</text:p>
              </table:table-cell>
              <table:table-cell table:style-name="Table8.B4" office:value-type="string">
                <text:p text:style-name="P177">Schwer</text:p>
              </table:table-cell>
            </table:table-row>
            <table:table-row>
              <table:table-cell table:style-name="Table8.A4" office:value-type="string">
                <text:p text:style-name="P177">25</text:p>
              </table:table-cell>
              <table:table-cell table:style-name="Table8.B4" office:value-type="string">
                <text:p text:style-name="P178">Sehr Schwer</text:p>
              </table:table-cell>
            </table:table-row>
            <table:table-row>
              <table:table-cell table:style-name="Table8.A6" office:value-type="string">
                <text:p text:style-name="P177">30</text:p>
              </table:table-cell>
              <table:table-cell table:style-name="Table8.B6" office:value-type="string">
                <text:p text:style-name="P178">Extrem</text:p>
              </table:table-cell>
            </table:table-row>
          </table:table>
          <text:p text:style-name="P173"/>
          <text:h text:style-name="Heading_20_3" text:outline-level="3">Vor- und Nachteile</text:h>
          <text:p text:style-name="P174">Talente und Umstände können Vor- oder Nachteile verleihen.</text:p>
          <text:p text:style-name="P174">Überwiegen die Vorteile, würfle 2W20 und verwende das bessere Ergebnis.</text:p>
          <text:p text:style-name="P174">Überwiegen die Nachteile, würfle 2W20 und verwende das schlechtere Ergebnis.</text:p>
          <text:p text:style-name="P174">Gleichen sich Vor- und Nachteile aus, würfle normal.</text:p>
          <text:p text:style-name="P179"/>
          <text:h text:style-name="Heading_20_2" text:outline-level="2">Vergleich</text:h>
          <text:p text:style-name="P180">Wenn Helden oder andere Figuren direkt miteinander konkurrieren, wird ein Vergleich durchgeführt.</text:p>
          <text:p text:style-name="P180">Alle Beteiligten würfeln eine passende Probe <text:span text:style-name="T109">und derjenige</text:span> <text:span text:style-name="T109">mit dem</text:span> höchste<text:span text:style-name="T109">n</text:span> Ergebnis gewinnt.</text:p>
          <text:p text:style-name="P180">Bei Gleichstand endet der Vergleich unentschieden.</text:p>
          <text:p text:style-name="P180"/>
          <text:p text:style-name="P181"/>
        </text:section>
        <text:p text:style-name="P182"/>
        <text:h text:style-name="P183" text:outline-level="1">Kapitel <text:span text:style-name="T105">X</text:span><text:span text:style-name="T110">X</text:span></text:h>
        <text:h text:style-name="P184" text:outline-level="1">Action Szenen</text:h>
        <text:p text:style-name="Standard">Action-Szenen wie Kämpfe, Verfolgungsjagden, <text:span text:style-name="T108">etc.</text:span> werden in Runden von sechs Sekunden abgehandelt. Bei Bedarf kann die Szene mit einer Skizze dargestellt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Standard">In deinem Zug kannst du dich bewegen und eine Aktion ausführen.</text:p>
          <text:p text:style-name="Standard">Menschen bewegen sich bis zu 9 Meter, sofern sie nicht durch schwieriges Gelände gebremst werden.</text:p>
          <text:p text:style-name="Standard">Kleine Handlungen, wie ein paar Worte zu sagen, erfordern keine Aktion.</text:p>
          <text:p text:style-name="Standard"><text:span text:style-name="T5">Typische Aktionen</text:span>:</text:p>
          <text:list text:style-name="L9">
            <text:list-item>
              <text:p text:style-name="P185">Attackieren</text:p>
            </text:list-item>
            <text:list-item>
              <text:p text:style-name="P185">Eine Waffe ziehen oder wechseln</text:p>
            </text:list-item>
            <text:list-item>
              <text:p text:style-name="P185">Sprinten (erneut bewegen)</text:p>
            </text:list-item>
            <text:list-item>
              <text:p text:style-name="P185">Jemandem helfen (Vorteil auf die nächste Probe des Ziels)</text:p>
            </text:list-item>
          </text:list>
          <text:p text:style-name="P186">Beschworene Kreaturen und Verbündete handeln direkt nach deinem Helden und folgen denselben Regeln.</text:p>
          <text:p text:style-name="P186"/>
          <text:h text:style-name="Heading_20_3" text:outline-level="3">Attacken</text:h>
          <text:p text:style-name="Standard">Um ein Ziel zu attackieren, musst du dich in Reichweite befinden und eine Probe auf Kämpfen gegen den SG des Gegners ablegen.</text:p>
          <text:p text:style-name="Standard">Bei Erfolg erleidet das Ziel 1 Schaden. Bei einem meisterlichen Erfolg <text:span text:style-name="T108">sogar</text:span> 2.</text:p>
          <text:p text:style-name="Standard">Im Nahkampf kannst du statt Schaden anzurichten das Ziel festhalten oder ihm einen Gegenstand entreißen, sofern dies in der Situation plausibel ist.</text:p>
          <text:p text:style-name="Standard"/>
          <text:h text:style-name="Heading_20_2" text:outline-level="2">Erzählerzug</text:h>
          <text:p text:style-name="Standard">Der Erzähler kontrolliert alle Figuren, die nicht von Spielern gesteuert werden.</text:p>
          <text:p text:style-name="Standard">Greift eine Figur einen Helden oder Minion an, legt das Ziel eine Zähigkeitsprobe gegen den SG des Angreifers ab.</text:p>
          <text:p text:style-name="Standard">Misslingt die Probe, erleidet das Ziel 1 Schaden.</text:p>
          <text:p text:style-name="Standard">Bei einem meisterlichen Erfolg wendet sich das Blatt und das Ziel erhält <text:span text:style-name="T21">einen </text:span>Vorteil auf seine nächste Probe.</text:p>
          <text:p text:style-name="P186"/>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lef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0141f"/>
      <style:paragraph-properties fo:margin-left="0pt" fo:margin-top="0pt" fo:margin-bottom="10.01pt" style:contextual-spacing="true" fo:line-height="100%" fo:text-align="center" style:justify-single-word="false" fo:orphans="2" fo:widows="2" style:page-number="auto" fo:background-color="#10141f" fo:padding-left="0pt" fo:padding-right="0pt" fo:padding-top="15pt" fo:padding-bottom="15pt" fo:border="none" style:writing-mode="lr-tb"/>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pt" style:contextual-spacing="false" fo:line-height="100%" fo:text-align="lef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lef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star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right"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1"><text:page-number text:select-page="current">14</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603</meta:editing-cycles>
    <meta:creation-date>2020-04-16T07:43:00</meta:creation-date>
    <dc:date>2026-06-01T13:40:25.347763878</dc:date>
    <meta:generator>LibreOffice/26.2.3.2$Linux_X86_64 LibreOffice_project/70e089b17412e4cb7773e41413306b17a2328c34</meta:generator>
    <meta:editing-duration>P1DT6H58M8S</meta:editing-duration>
    <meta:print-date>2026-04-02T15:54:51.081337174</meta:print-date>
    <meta:document-statistic meta:table-count="4" meta:image-count="0" meta:object-count="0" meta:page-count="15" meta:paragraph-count="396" meta:word-count="2640" meta:character-count="17699" meta:non-whitespace-character-count="15519"/>
    <meta:template xlink:type="simple" xlink:actuate="onRequest" xlink:title="Normal" xlink:href=""/>
  </office:meta>
</office:document-meta>
</file>