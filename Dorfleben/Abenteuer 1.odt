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fo:language="de" fo:country="DE" style:script-type="latin"/>
    </style:style>
    <style:style style:name="P2" style:family="paragraph" style:parent-style-name="Standard">
      <style:text-properties fo:language="de" fo:country="DE" officeooo:rsid="000eb53e" officeooo:paragraph-rsid="0025dd52" style:script-type="latin"/>
    </style:style>
    <style:style style:name="P3" style:family="paragraph" style:parent-style-name="Heading_20_2">
      <style:text-properties fo:language="de" fo:country="DE" officeooo:rsid="000f6e05" officeooo:paragraph-rsid="000f6e05" style:script-type="latin"/>
    </style:style>
    <style:style style:name="P4" style:family="paragraph" style:parent-style-name="List_20_1" style:list-style-name="L1"/>
    <style:style style:name="P5" style:family="paragraph" style:parent-style-name="List_20_1" style:list-style-name="L2"/>
    <style:style style:name="P6" style:family="paragraph" style:parent-style-name="Standard">
      <style:text-properties fo:language="de" fo:country="DE" fo:font-weight="normal" officeooo:rsid="00125770" officeooo:paragraph-rsid="00125770" style:font-weight-asian="normal" style:font-weight-complex="normal" style:script-type="latin"/>
    </style:style>
    <style:style style:name="P7" style:family="paragraph" style:parent-style-name="List_20_1" style:list-style-name="L3"/>
    <style:style style:name="P8" style:family="paragraph" style:parent-style-name="Standard">
      <style:text-properties fo:language="de" fo:country="DE" fo:font-weight="normal" officeooo:rsid="00120956" officeooo:paragraph-rsid="00120956" style:font-weight-asian="normal" style:font-weight-complex="normal" style:script-type="latin"/>
    </style:style>
    <style:style style:name="P9" style:family="paragraph" style:parent-style-name="List_20_1" style:list-style-name="L4"/>
    <style:style style:name="P10" style:family="paragraph" style:parent-style-name="Standard">
      <style:text-properties fo:language="de" fo:country="DE" fo:font-weight="normal" officeooo:rsid="00128b06" officeooo:paragraph-rsid="00128b06" style:font-weight-asian="normal" style:font-weight-complex="normal" style:script-type="latin"/>
    </style:style>
    <style:style style:name="P11" style:family="paragraph" style:parent-style-name="Heading_20_2">
      <style:paragraph-properties fo:break-before="page"/>
      <style:text-properties officeooo:rsid="001c64f5" officeooo:paragraph-rsid="001c64f5"/>
    </style:style>
    <style:style style:name="P12" style:family="paragraph" style:parent-style-name="Text_20_body">
      <style:text-properties fo:font-weight="bold" style:font-weight-asian="bold" style:font-weight-complex="bold"/>
    </style:style>
    <style:style style:name="P13" style:family="paragraph" style:parent-style-name="List_20_1" style:list-style-name="L5"/>
    <style:style style:name="P14" style:family="paragraph" style:parent-style-name="List_20_1" style:list-style-name="L5">
      <style:text-properties officeooo:paragraph-rsid="00219d34"/>
    </style:style>
    <style:style style:name="P15" style:family="paragraph" style:parent-style-name="List_20_1" style:list-style-name="L5">
      <style:text-properties officeooo:paragraph-rsid="00225fa7"/>
    </style:style>
    <style:style style:name="P16" style:family="paragraph" style:parent-style-name="List_20_1" style:list-style-name="L5">
      <style:text-properties officeooo:paragraph-rsid="0021f1ca"/>
    </style:style>
    <style:style style:name="P17" style:family="paragraph" style:parent-style-name="List_20_1">
      <style:text-properties officeooo:paragraph-rsid="00219d34"/>
    </style:style>
    <style:style style:name="P18" style:family="paragraph" style:parent-style-name="Text_20_body">
      <style:text-properties fo:font-weight="bold" officeooo:rsid="001c64f5" officeooo:paragraph-rsid="001c64f5" style:font-weight-asian="bold" style:font-weight-complex="bold"/>
    </style:style>
    <style:style style:name="P19" style:family="paragraph" style:parent-style-name="List_20_1" style:list-style-name="L5">
      <style:text-properties officeooo:paragraph-rsid="001d741f"/>
    </style:style>
    <style:style style:name="P20" style:family="paragraph" style:parent-style-name="Text_20_body">
      <style:text-properties officeooo:rsid="001c64f5" officeooo:paragraph-rsid="001c64f5"/>
    </style:style>
    <style:style style:name="P21" style:family="paragraph" style:parent-style-name="List_20_1" style:list-style-name="L5">
      <style:text-properties officeooo:paragraph-rsid="0020b1ed"/>
    </style:style>
    <style:style style:name="P22" style:family="paragraph" style:parent-style-name="Text_20_body">
      <style:text-properties officeooo:paragraph-rsid="001c64f5"/>
    </style:style>
    <style:style style:name="P23" style:family="paragraph" style:parent-style-name="List_20_1" style:list-style-name="L5">
      <style:text-properties officeooo:paragraph-rsid="00207a8e"/>
    </style:style>
    <style:style style:name="P24" style:family="paragraph" style:parent-style-name="List_20_1" style:list-style-name="L5">
      <style:text-properties officeooo:paragraph-rsid="001f9af7"/>
    </style:style>
    <style:style style:name="P25" style:family="paragraph" style:parent-style-name="Text_20_body">
      <style:text-properties fo:language="de" fo:country="DE" fo:font-weight="bold" officeooo:rsid="001c64f5" officeooo:paragraph-rsid="001f9af7" style:font-weight-asian="bold" style:font-weight-complex="bold" style:script-type="latin"/>
    </style:style>
    <style:style style:name="P26" style:family="paragraph" style:parent-style-name="Text_20_body">
      <style:text-properties fo:language="de" fo:country="DE" officeooo:rsid="001c64f5" officeooo:paragraph-rsid="001c64f5" style:script-type="latin"/>
    </style:style>
    <style:style style:name="P27" style:family="paragraph" style:parent-style-name="List_20_1" style:list-style-name="L6"/>
    <style:style style:name="P28" style:family="paragraph" style:parent-style-name="List_20_1" style:list-style-name="L6">
      <style:text-properties officeooo:rsid="00225fa7" officeooo:paragraph-rsid="00225fa7"/>
    </style:style>
    <style:style style:name="P29" style:family="paragraph" style:parent-style-name="Text_20_body">
      <style:text-properties fo:language="de" fo:country="DE" fo:font-weight="bold" officeooo:rsid="001c64f5" officeooo:paragraph-rsid="001c64f5" style:font-weight-asian="bold" style:font-weight-complex="bold" style:script-type="latin"/>
    </style:style>
    <style:style style:name="P30" style:family="paragraph" style:parent-style-name="List_20_1" style:list-style-name="L7"/>
    <style:style style:name="P31" style:family="paragraph" style:parent-style-name="List_20_1" style:list-style-name="L7">
      <style:text-properties officeooo:paragraph-rsid="00225fa7"/>
    </style:style>
    <style:style style:name="P32" style:family="paragraph" style:parent-style-name="List_20_1">
      <style:text-properties officeooo:paragraph-rsid="00225fa7"/>
    </style:style>
    <style:style style:name="P33" style:family="paragraph" style:parent-style-name="Heading_20_2">
      <style:paragraph-properties fo:break-before="page"/>
      <style:text-properties fo:language="de" fo:country="DE" officeooo:paragraph-rsid="001b930d" style:script-type="latin"/>
    </style:style>
    <style:style style:name="P34" style:family="paragraph" style:parent-style-name="List_20_1" style:list-style-name="L8"/>
    <style:style style:name="P35" style:family="paragraph" style:parent-style-name="List_20_1">
      <style:text-properties officeooo:paragraph-rsid="001b930d"/>
    </style:style>
    <style:style style:name="P36" style:family="paragraph" style:parent-style-name="Heading_20_2">
      <style:text-properties fo:language="de" fo:country="DE" officeooo:paragraph-rsid="001b930d" style:script-type="latin"/>
    </style:style>
    <style:style style:name="P37" style:family="paragraph" style:parent-style-name="Heading_20_3">
      <style:text-properties fo:language="de" fo:country="DE" officeooo:paragraph-rsid="001b930d" style:script-type="latin"/>
    </style:style>
    <style:style style:name="P38" style:family="paragraph" style:parent-style-name="Text_20_body">
      <style:text-properties officeooo:paragraph-rsid="001b930d"/>
    </style:style>
    <style:style style:name="P39" style:family="paragraph" style:parent-style-name="Standard">
      <style:text-properties fo:language="de" fo:country="DE" officeooo:rsid="000822d7" officeooo:paragraph-rsid="001b930d" style:script-type="latin"/>
    </style:style>
    <style:style style:name="P40" style:family="paragraph" style:parent-style-name="Standard">
      <style:text-properties fo:language="de" fo:country="DE" officeooo:paragraph-rsid="001b930d" style:script-type="latin"/>
    </style:style>
    <style:style style:name="P41" style:family="paragraph" style:parent-style-name="Heading_20_3">
      <style:text-properties officeooo:paragraph-rsid="001d741f"/>
    </style:style>
    <style:style style:name="P42" style:family="paragraph" style:parent-style-name="Text_20_body">
      <style:text-properties fo:language="de" fo:country="DE" fo:font-weight="normal" officeooo:rsid="001f9af7" officeooo:paragraph-rsid="001f9af7" style:font-weight-asian="normal" style:font-weight-complex="normal" style:script-type="latin"/>
    </style:style>
    <style:style style:name="P43" style:family="paragraph" style:parent-style-name="Text_20_body">
      <style:text-properties fo:language="de" fo:country="DE" fo:font-weight="normal" officeooo:rsid="00155a0d" style:font-weight-asian="normal" style:font-weight-complex="normal" style:script-type="latin"/>
    </style:style>
    <style:style style:name="P44" style:family="paragraph" style:parent-style-name="Heading_20_2">
      <style:text-properties officeooo:paragraph-rsid="0019ef40"/>
    </style:style>
    <style:style style:name="P45" style:family="paragraph" style:parent-style-name="List_20_1" style:list-style-name="L9"/>
    <style:style style:name="T1" style:family="text">
      <style:text-properties officeooo:rsid="00286e64"/>
    </style:style>
    <style:style style:name="T2" style:family="text">
      <style:text-properties officeooo:rsid="0025dd52"/>
    </style:style>
    <style:style style:name="T3" style:family="text">
      <style:text-properties fo:font-weight="bold" style:font-weight-asian="bold" style:font-weight-complex="bold"/>
    </style:style>
    <style:style style:name="T4" style:family="text">
      <style:text-properties fo:font-weight="bold" officeooo:rsid="0018f357" style:font-weight-asian="bold" style:font-weight-complex="bold"/>
    </style:style>
    <style:style style:name="T5" style:family="text">
      <style:text-properties officeooo:rsid="0018f357"/>
    </style:style>
    <style:style style:name="T6" style:family="text">
      <style:text-properties officeooo:rsid="0013ffa4"/>
    </style:style>
    <style:style style:name="T7" style:family="text">
      <style:text-properties officeooo:rsid="00120956"/>
    </style:style>
    <style:style style:name="T8" style:family="text">
      <style:text-properties officeooo:rsid="00125770"/>
    </style:style>
    <style:style style:name="T9" style:family="text">
      <style:text-properties officeooo:rsid="000f6e05"/>
    </style:style>
    <style:style style:name="T10" style:family="text">
      <style:text-properties officeooo:rsid="001f9af7"/>
    </style:style>
    <style:style style:name="T11" style:family="text">
      <style:text-properties officeooo:rsid="00220a57"/>
    </style:style>
    <style:style style:name="T12" style:family="text">
      <style:text-properties fo:font-weight="bold" officeooo:rsid="001c64f5" style:font-weight-asian="bold" style:font-weight-complex="bold"/>
    </style:style>
    <style:style style:name="T13" style:family="text">
      <style:text-properties officeooo:rsid="0020b1ed"/>
    </style:style>
    <style:style style:name="T14" style:family="text">
      <style:text-properties officeooo:rsid="00219d34"/>
    </style:style>
    <style:style style:name="T15" style:family="text">
      <style:text-properties officeooo:rsid="00207a8e"/>
    </style:style>
    <style:style style:name="T16" style:family="text">
      <style:text-properties fo:language="de" fo:country="DE" officeooo:rsid="001c64f5" style:script-type="latin"/>
    </style:style>
    <style:style style:name="T17" style:family="text">
      <style:text-properties officeooo:rsid="00225fa7"/>
    </style:style>
    <style:style style:name="T18" style:family="text">
      <style:text-properties fo:font-weight="bold" officeooo:rsid="00155a0d" style:font-weight-asian="bold" style:font-weight-complex="bold"/>
    </style:style>
    <style:style style:name="T19" style:family="text">
      <style:text-properties officeooo:rsid="00155a0d"/>
    </style:style>
    <style:style style:name="T20" style:family="text">
      <style:text-properties officeooo:rsid="001b930d"/>
    </style:style>
    <style:style style:name="T21" style:family="text">
      <style:text-properties officeooo:rsid="001d741f"/>
    </style:style>
    <style:style style:name="Sect1" style:family="section">
      <style:section-properties text:dont-balance-text-columns="false" style:editable="false">
        <style:columns fo:column-count="2" fo:column-gap="25pt">
          <style:column style:rel-width="32767*" fo:start-indent="0pt" fo:end-indent="12.5pt"/>
          <style:column style:rel-width="32768*" fo:start-indent="12.5pt" fo:end-indent="0pt"/>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fo:text-align="end">
          <style:list-level-label-alignment text:label-followed-by="listtab" text:list-tab-stop-position="36pt" fo:text-indent="-18pt" fo:margin-left="36pt"/>
        </style:list-level-properties>
        <style:text-properties fo:font-family="OpenSymbol"/>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198pt" fo:text-indent="-18pt" fo:margin-left="198pt"/>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Dorfleben</text:span> 1: Der Tote Postbote</text:h>
      <text:p text:style-name="P2">Das beschauliche Dorf Weidenau trauert um seinen langjährigen Vogt Sumerich Brendacher, als <text:span text:style-name="T2">ein Mord die gemeinde Erschüttert: </text:span>Der beliebte Postbote Retor Farnlieb wird ermordet am Ufer des Weidenstroms aufgefunden. <text:span text:style-name="T2">Ohne Vogt fällt es an eine Gruppe ehrbarer Bürger die Sache aufzuklären.</text:span></text:p>
      <text:p text:style-name="P2">Der tote Postbote ist ein bodenständiges Ermittlungsabenteuer für DSA, <text:span text:style-name="T2">indem die Spieler die Rolle einfacher Dorfbewohner übernehmen. Anstelle von Drachen und Dämonen steht ein kleines Dorf und seine Bewohner im Mittelpunkt.</text:span></text:p>
      <text:p text:style-name="P2"/>
      <text:h text:style-name="P3" text:outline-level="2">Vorgeschichte</text:h>
      <text:section text:style-name="Sect1" text:name="Section4">
        <text:h text:style-name="Heading_20_3" text:outline-level="3">Familie Brendacher</text:h>
        <text:list text:style-name="L1">
          <text:list-item>
            <text:p text:style-name="P4">Gunter Brendacher hat drei Kinder: <text:span text:style-name="T3">Sumerich</text:span> mit seiner ersten Frau <text:span text:style-name="T3">Girte</text:span>, <text:span text:style-name="T3">Alrik</text:span> mit seiner zweiten Frau <text:span text:style-name="T3">Finnla</text:span>, und die uneheliche <text:span text:style-name="T3">Travina</text:span>, die mit ihrer Mutter <text:span text:style-name="T3">Erlg</text:span><text:span text:style-name="T4">run</text:span> in Nadoret lebt.</text:p>
          </text:list-item>
          <text:list-item>
            <text:p text:style-name="P4">Sumerich und Alrik wachsen gemeinsam in Weidenau auf <text:span text:style-name="T5">sind aber in einem Ständigen Konkurrenzkampf.</text:span></text:p>
          </text:list-item>
          <text:list-item>
            <text:p text:style-name="P4">Als Gunter stirbt, erbt Sumerich den Brendacher Hof. Alrik erhält ein großes Stück Land.</text:p>
          </text:list-item>
          <text:list-item>
            <text:p text:style-name="P4">Alrik arbeitet sich im Laufe der Jahre zum zweitgrößten Bauern von Weidenau hoch, steht aber immer im Schatten Sumerichs. Besonders, dass Sumerich vor 20 Jahren zum Vogt ernannt wurde, hat Alrik nie ganz verwunden.</text:p>
          </text:list-item>
          <text:list-item>
            <text:p text:style-name="P4">Sumerich heiratet in jungen Jahren Brunja. Das Paar bleibt kinderlos. Brunja stirbt im Jahr 1001 BF an einer Lungenentzündung.</text:p>
          </text:list-item>
          <text:list-item>
            <text:p text:style-name="P4">Alrik bleibt ein ewiger Junggeselle.</text:p>
          </text:list-item>
          <text:list-item>
            <text:p text:style-name="P4">Travina hat eine Tochter: Elenor. Sie lebt in Nadoret und ist die einzige junge Nachfahrin der Familie.</text:p>
          </text:list-item>
        </text:list>
        <text:p text:style-name="List_20_1"/>
        <text:p text:style-name="List_20_1"/>
        <text:p text:style-name="List_20_1"/>
        <text:p text:style-name="List_20_1"/>
        <text:p text:style-name="List_20_1"/>
        <text:h text:style-name="Heading_20_3" text:outline-level="3">Sumerich und das Erbe</text:h>
        <text:list text:style-name="L2">
          <text:list-item>
            <text:p text:style-name="P5">Sumerich ist lange schwach und Krank, und im Winter 1008 <text:span text:style-name="T6">BF</text:span> beginnt sich sein Zustand zu verschlechtern. Sumerich weiß dass er bald sterben wird.</text:p>
          </text:list-item>
          <text:list-item>
            <text:p text:style-name="P5">Sumerich beginnt seine Angelegenheiten zu ordnen. Er beschließt, den Hof an die nächste Generation weiterzugeben. Da weder er noch Alrik Kinder haben, fällt seine Wahl auf seine Nichte Elenor in Nadoret – die einzige junge Nachfahrin der Familie Brendacher.</text:p>
          </text:list-item>
          <text:list-item>
            <text:p text:style-name="P5">Sumerich bespricht seine Pläne mit seinem <text:span text:style-name="T7">guten </text:span>Freund Bardo. Dieser findet die Idee nicht gut (eine fremde die niemanden hier kennt?)</text:p>
          </text:list-item>
          <text:list-item>
            <text:p text:style-name="P5">Sumerich formuliert sein Testament mit <text:span text:style-name="T7">Magister</text:span> Olorand <text:span text:style-name="T7">(der gebildetste Mann im Dorf)</text:span>, <text:span text:style-name="T7">der die Papiere bis zu seinem Tod verwalten soll.</text:span></text:p>
          </text:list-item>
          <text:list-item>
            <text:p text:style-name="P5">Nach Sumerichs Tod kümmert sich Magister Olorand um das Schreiben an Elenor und die zugehörigen Erbdokumente. Da Postbote Retor Weidenau nur einmal pro Woche besucht, werden die Unterlagen erst am Tag nach der Trauerfeier verschickt. Wie bei allen wichtigen Schriftstücken fertigt Olorand eine Abschrift für seine Unterlagen an – eine Gewohnheit aus seiner Zeit als Hofmagier.</text:p>
          </text:list-item>
        </text:list>
        <text:p text:style-name="P6"/>
        <text:p text:style-name="P6"/>
        <text:h text:style-name="Heading_20_3" text:outline-level="3"><text:soft-page-break/>Alrik und das Erbe</text:h>
        <text:list text:style-name="L3">
          <text:list-item>
            <text:p text:style-name="P7">Alrik hat Sumerich während dessen Krankheit auf dem Hof unterstützt und geht fest davon aus, den Hof seines Bruders zu erben. Für ihn ist es selbstverständlich, dass der Besitz innerhalb der Familie auf den nächsten männlichen Verwandten übergeht.</text:p>
          </text:list-item>
          <text:list-item>
            <text:p text:style-name="P7">Im Vertrauen auf dieses Erbe stellt Alrik zusätzliche Knechte ein und beginnt bereits, Pläne für die Bewirtschaftung des Brendacher Hofes zu schmieden.</text:p>
          </text:list-item>
          <text:list-item>
            <text:p text:style-name="P7">Auf der Trauerfeier erzählt Alrik seinem alten Freund Bardo voller Stolz von seinen Plänen für den Hof. Bardo wird sichtlich unwohl und erklärt schließlich, dass Sumerich den Hof bereits anderweitig vermacht hat.</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3" text:outline-level="3">Der Mord</text:h>
        <text:list text:style-name="L4">
          <text:list-item>
            <text:p text:style-name="P9">Alrik ist außer sich und heuert den Banditen Jarik an. Dieser soll Retor auf seinem Weg abfangen und die Erbunterlagen an sich bringen. Alrik schärft ihm ausdrücklich ein, dass niemand verletzt werden darf.</text:p>
          </text:list-item>
          <text:list-item>
            <text:p text:style-name="P9">Der Überfall ist am Tag nach der Trauerfeier.</text:p>
          </text:list-item>
          <text:list-item>
            <text:p text:style-name="P9">Der Überfall gerät außer Kontrolle. Retor weigert sich, die Posttasche herauszugeben, und versucht zu fliehen. Gerda gerät in Panik und erschießt ihn mit ihrer Armbrust.</text:p>
          </text:list-item>
          <text:list-item>
            <text:p text:style-name="P9">Die Banditen nehmen <text:span text:style-name="T8">Retors Posttasche</text:span> an sich, lassen <text:span text:style-name="T7">in ihrer Eile aber</text:span><text:span text:style-name="T9"> </text:span>alles andere liegen</text:p>
          </text:list-item>
          <text:list-item>
            <text:p text:style-name="P9">Der tote Postbote wird <text:span text:style-name="T8">einen Tag nach dem Mord von Efferdian Tauber beim Fischen gefunden.</text:span></text:p>
          </text:list-item>
          <text:list-item>
            <text:p text:style-name="P9">Efferdian berichtet der Wirtin Gerba, Leni Tauber verbreitet die neuigkeiten – das ganze Dorf ist in Aufregung.</text:p>
          </text:list-item>
          <text:list-item>
            <text:p text:style-name="P9">Durch den Tod von Sumerich gibt es derzeit keinen Vogt. Gerba informiert daher die einzig andere Autoritätsperson im Dorf – die Geweihte Schwester Eolan.</text:p>
          </text:list-item>
          <text:list-item>
            <text:p text:style-name="P9">Schwester Eolan ist heillos überfordert. Es würde Wochen dauern, offizielle Hilfe aus Nadoret anzufordern. Gemeinsam mit Gerba beschließt sie daher, einige ehrbare und fähige Dorfbewohner mit der Aufklärung des Mordes zu beauftragen – die Helden.</text:p>
          </text:list-item>
        </text:list>
      </text:section>
      <text:p text:style-name="P10"/>
      <text:h text:style-name="P11" text:outline-level="2">Spuren / <text:span text:style-name="T10">Hinweise</text:span></text:h>
      <text:h text:style-name="Heading_20_3" text:outline-level="3">Orte</text:h>
      <text:p text:style-name="P12">Überfallstelle</text:p>
      <text:list text:style-name="L5">
        <text:list-item>
          <text:p text:style-name="P13"><text:span text:style-name="T3">Offensichtlich</text:span>: Flussufer am Weidenstrom / Mehrere Bäume nahe der Straße / Retors Leiche liegt im Schilf / Die Leiche wurde offenbar von der Straße dorthin gezogen oder gerollt.</text:p>
        </text:list-item>
        <text:list-item>
          <text:p text:style-name="P13"><text:span text:style-name="T3">Verborgen</text:span>: Spuren deuten auf mehrere Täter hin, die Retor hinter den Bäumen aufgelauert haben / Hufspuren führen zu Retors davongelaufenem Esel, der auf einer nahen Wiese grast / Sehr gut verborgene Fußspuren führen nach Norden zum Banditenlager.</text:p>
        </text:list-item>
      </text:list>
      <text:p text:style-name="P12">Banditenlager</text:p>
      <text:list text:continue-numbering="true" text:style-name="L5">
        <text:list-item>
          <text:p text:style-name="P14"><text:span text:style-name="T3">Verborgen</text:span>: Der eingestürzte Schuppen wird trotz seines Zustands regelmäßig genutzt / Die Beute <text:span text:style-name="T11">(</text:span>einschließlich Retors Posttasche<text:span text:style-name="T11">)</text:span> ist unter einer losen Diele im Schuppen versteckt / Die Beute besteht überwiegend aus Beuteln mit wenigen Kupfer- und Silbermünzen, daneben findet sich ein ungewöhnlich gut gefüllter Beutel mit mehreren Silbermünzen <text:span text:style-name="T11">(</text:span>Alriks Anzahlung für den Auftrag<text:span text:style-name="T11">).</text:span></text:p>
        </text:list-item>
      </text:list>
      <text:p text:style-name="P12">Brendacher Hof / Sumerichs Arbeitszimmer</text:p>
      <text:list text:continue-numbering="true" text:style-name="L5">
        <text:list-item>
          <text:p text:style-name="P13"><text:span text:style-name="T3">Offensichtlich</text:span>: Alter, großer Bauernhof mit kleiner Amtsstube und schlichtem Arbeitszimmer.</text:p>
        </text:list-item>
        <text:list-item>
          <text:p text:style-name="P15"><text:span text:style-name="T3">Verborgen</text:span>: Stark benutztes Buch über das Koscher Erbrecht liegt auf dem Schreibtisch / Umschlag mit einem Empfehlungsschreiben an den Baron, Alrik zum neuen Vogt zu ernennen / Bündel alter und neuer Briefe zwischen Sumerich und seiner Halbschwester Travina.</text:p>
        </text:list-item>
      </text:list>
      <text:p text:style-name="P12">Alriks Hof</text:p>
      <text:list xml:id="list113725988671437" text:continue-numbering="true" text:style-name="L5">
        <text:list-item>
          <text:p text:style-name="P16"><text:span text:style-name="T3">Offensichtlich</text:span>: Gepflegter, wohlhabender Bauernhof / Mehrere Knechte sind bei der Arbeit / <text:span text:style-name="T11">Gebäude sind relativ neue und zeugen von Wohlstand</text:span></text:p>
        </text:list-item>
        <text:list-item>
          <text:p text:style-name="P16"><text:span text:style-name="T3">Verborgen</text:span>: Zusätzliche Schlafplätze für neu eingestellte Knechte / <text:span text:style-name="T11">Knechte sind berreits instruiert um die Bewirtschaftung von Sumerichs Hof zu übernehmen / </text:span>Keiner der Knechte kann bestätigen, dass Alrik den Abend nach der Trauerfeier auf seinem Hof verbracht hat.</text:p>
        </text:list-item>
      </text:list>
      <text:p text:style-name="P17"/>
      <text:h text:style-name="Heading_20_3" text:outline-level="3">Beweisstücke</text:h>
      <text:p text:style-name="P18">Retors Leiche</text:p>
      <text:list xml:id="list113726110485536" text:continue-numbering="true" text:style-name="L5">
        <text:list-item>
          <text:p text:style-name="P19"><text:span text:style-name="T3">Offensichtlich</text:span>: Armbrustbolzen im Rücken / Posttasche fehlt.</text:p>
        </text:list-item>
        <text:list-item>
          <text:p text:style-name="P19"><text:span text:style-name="T3">Verborgen</text:span>: Geldbörse und das kunstvoll gearbeitete Jagdmesser mit Horngriff befinden sich noch am Körper / Keine weiteren Wertsachen wurden entwendet / <text:span text:style-name="T10">Keine Verletzungen außer dem tödlichen Armbrustbolzen</text:span></text:p>
        </text:list-item>
      </text:list>
      <text:p text:style-name="P20"/>
      <text:h text:style-name="Heading_20_3" text:outline-level="3"><text:soft-page-break/>Zeugen</text:h>
      <text:p text:style-name="P18">Alrik</text:p>
      <text:list text:continue-numbering="true" text:style-name="L5">
        <text:list-item>
          <text:p text:style-name="P21"><text:span text:style-name="T3">Offensichtlich</text:span>: Tief erschüttert über den Mord an Retor / Fordert, die Täter schnell zur Rechenschaft zu ziehen</text:p>
        </text:list-item>
        <text:list-item>
          <text:p text:style-name="P21"><text:span text:style-name="T3">Verborgen</text:span>: Verschweigt, dass er vom Testament wusste / Verschweigt den Auftrag an Jarik / Behauptet, den Abend nach der Trauerfeier auf seinem Hof verbracht zu haben / Reagiert gereizt auf Fragen nach Elenor oder dem Erbe</text:p>
        </text:list-item>
      </text:list>
      <text:p text:style-name="P22"><text:span text:style-name="T12">Bardo</text:span></text:p>
      <text:list text:continue-numbering="true" text:style-name="L5">
        <text:list-item>
          <text:p text:style-name="P23"><text:span text:style-name="T3">Offensichtlich</text:span>: Trauert aufrichtig um seinen alten Freund Sumerich / Ist wortkarg und beantwortet Fragen nur knapp.</text:p>
        </text:list-item>
        <text:list-item>
          <text:p text:style-name="P21"><text:span text:style-name="T3">Verborgen</text:span>: <text:span text:style-name="T13">Weiß von Sumerichs Testament </text:span><text:span text:style-name="T14">und seinen Beweggründen </text:span><text:span text:style-name="T13">/ </text:span>Hielt Elenor für die falsche Erbin, da sie Weidenau kaum kennt / Hat Alrik auf der Trauerfeier von Sumerichs Testament erzählt und macht sich deshalb Vorwürfe / Kann bestätigen, dass Magister Olorand das Testament aufgesetzt und verwahrt hat.</text:p>
        </text:list-item>
      </text:list>
      <text:p text:style-name="P18">Gerba</text:p>
      <text:list text:continue-numbering="true" text:style-name="L5">
        <text:list-item>
          <text:p text:style-name="P23"><text:span text:style-name="T3">Offensichtlich</text:span>: <text:span text:style-name="T13">Unterstützt Schwester Eolan</text:span> / Möchte den Mord schnell auf<text:span text:style-name="T13">klären</text:span>.</text:p>
        </text:list-item>
        <text:list-item>
          <text:p text:style-name="P23"><text:span text:style-name="T3">Verborgen</text:span>: Kennt die Geschichte der Familie Brendacher sehr gut / Hat bemerkt, dass Sumerich und Bardo in den letzten Wochen häufig lange im Silberhecht zusammensaßen / Ist überzeugt, dass Sumerich seine Erbentscheidung wohlüberlegt getroffen hat / Weiß, dass Alrik seinen Bruder während der Krankheit aufrichtig unterstützt hat / Kann bestätigen, dass Retor als äußerst zuverlässiger und ehrlicher Postbote galt und niemals Post unterschlagen hätte.</text:p>
        </text:list-item>
      </text:list>
      <text:p text:style-name="P18">Schwester Eolan</text:p>
      <text:list text:continue-numbering="true" text:style-name="L5">
        <text:list-item>
          <text:p text:style-name="P21"><text:span text:style-name="T3">Offensichtlich</text:span>: Ist sichtlich überfordert / Beauftragt die Helden mit den Ermittlungen / Möchte Blutvergießen vermeiden und die Täter vor Gericht stellen / Hat Sumerich während seiner Krankheit betreut und kann <text:span text:style-name="T13">seinen natürlichen Tod bestätigen.</text:span></text:p>
        </text:list-item>
      </text:list>
      <text:p text:style-name="P18">Maigster Olorand</text:p>
      <text:list text:continue-numbering="true" text:style-name="L5">
        <text:list-item>
          <text:p text:style-name="P21"><text:span text:style-name="T3">Offensichtlich</text:span>: Bestätigt, Sumerichs Testament verfasst zu haben / Übergab Retor die Erbunterlagen am Markttag</text:p>
        </text:list-item>
        <text:list-item>
          <text:p text:style-name="P21"><text:span text:style-name="T3">Verborgen</text:span>: Besitzt eine Abschrift aller Dokumente / Kann den Inhalt des Testaments auch ohne Original bezeugen.</text:p>
        </text:list-item>
      </text:list>
      <text:p text:style-name="P22"><text:span text:style-name="T12">Leni</text:span></text:p>
      <text:list text:continue-numbering="true" text:style-name="L5">
        <text:list-item>
          <text:p text:style-name="P23"><text:span text:style-name="T3">Offensichtlich</text:span>: Hat nach Efferdians Fund das halbe Dorf über Retors Tod informiert / Ist neugierig und redet gerne.</text:p>
        </text:list-item>
        <text:list-item>
          <text:p text:style-name="P21"><text:span text:style-name="T3">Verborgen</text:span>: Hat Alrik und Bardo beim Leichenschmaus sprechen sehen / <text:span text:style-name="T13">Hat gesehen das Alrik den Leichenschmaus sichtlich aufgebracht verlassen hat / </text:span>Weiß <text:span text:style-name="T15">das Alrik und Sumerich sich oft gestritten haben / </text:span>Hat gesehen, dass Sumerich und Bardo in den letzten Wochen häufig lange im Silberhecht zusammensaßen / Weiß, dass Alrik zusätzliche Knechte eingestellt hat</text:p>
        </text:list-item>
      </text:list>
      <text:p text:style-name="P18">Efferdian</text:p>
      <text:list text:continue-numbering="true" text:style-name="L5">
        <text:list-item>
          <text:p text:style-name="P24"><text:soft-page-break/><text:span text:style-name="T3">Offensichtlich</text:span>: <text:span text:style-name="T16">Steht sichtlich unter Schock / Fand Retors Leiche am frühen Morgen beim Einholen seiner Reusen / Verständigte sofort Gerba im Silberhecht / Hält sich seitdem im Gasthaus auf.</text:span></text:p>
        </text:list-item>
      </text:list>
      <text:p text:style-name="P25">Jarik &amp; die Banditen</text:p>
      <text:list text:continue-numbering="true" text:style-name="L5">
        <text:list-item>
          <text:p text:style-name="P14"><text:span text:style-name="T3">Offensichtlich</text:span>: Haben Retor überfallen, um seine Posttasche zu stehlen / Die Bande ist vom Ausgang des Überfalls selbst erschüttert und uneins über das weitere Vorgehen.</text:p>
        </text:list-item>
        <text:list-item>
          <text:p text:style-name="P14"><text:span text:style-name="T3">Verborgen</text:span>: Gerda erschoss Retor während des Überfalls aus Panik / Jarik wurde von Alrik angeheuert und sollte ausschließlich die Erbunterlagen beschaffen / Alrik schärfte ausdrücklich ein, dass niemand verletzt werden dürfe / Gerda bereut den Schuss, während Jarik erwägt, sich den Behörden zu stellen und die Schuld allein auf sich zu nehmen.</text:p>
        </text:list-item>
      </text:list>
      <text:p text:style-name="P26"/>
      <text:h text:style-name="Heading_20_3" text:outline-level="3">Andere Fakten</text:h>
      <text:list text:style-name="L6">
        <text:list-item>
          <text:p text:style-name="P27">Retor besucht Weidenau nur einmal pro Woche (Markttag).</text:p>
        </text:list-item>
        <text:list-item>
          <text:p text:style-name="P27">Zwischen Weidenau und Nadoret gibt es keine weiteren Poststationen <text:span text:style-name="T17">(der Postbote nächtigt in den Gasthäusern der Dörfer die er besucht).</text:span></text:p>
        </text:list-item>
        <text:list-item>
          <text:p text:style-name="P27">Die Banditen sind bislang nur wegen kleiner Überfälle bekannt, nicht wegen Mordes.</text:p>
        </text:list-item>
        <text:list-item>
          <text:p text:style-name="P27">Wegen Sumerichs Tod ist das Amt des Vogts derzeit unbesetzt.</text:p>
        </text:list-item>
        <text:list-item>
          <text:p text:style-name="P27">Offizielle Hilfe aus Nadoret würde mehrere Tage oder sogar Wochen benötigen.</text:p>
        </text:list-item>
        <text:list-item>
          <text:p text:style-name="P28">Baron Dajin von Nadoret schenkt den abgelegenen Dörfern seiner Baronie nur wenig Aufmerksamkeit. Eingaben und Gesuche werden daher oft erst nach längerer Zeit bearbeitet.</text:p>
        </text:list-item>
      </text:list>
      <text:p text:style-name="P29">Armbrustbolzen</text:p>
      <text:list text:style-name="L7">
        <text:list-item>
          <text:p text:style-name="P30"><text:span text:style-name="T3">Offensichtlich</text:span>: Steckt noch im Rücken Retors.</text:p>
        </text:list-item>
        <text:list-item>
          <text:p text:style-name="P31"><text:span text:style-name="T3">Verborgen</text:span>: Ein gewöhnlicher Jagdbolzen, wie ihn viele Jäger und Wegelagerer verwenden. Keine individuelle Kennzeichnung.</text:p>
        </text:list-item>
      </text:list>
      <text:p text:style-name="P32"/>
      <text:p text:style-name="P32"/>
      <text:p text:style-name="P32"/>
      <text:p text:style-name="P32"/>
      <text:section text:style-name="Sect1" text:name="Section3">
        <text:h text:style-name="P33" text:outline-level="2">Zeitleiste</text:h>
        <text:p text:style-name="Text_20_body">Der Monat Praios ist Juli und direkt nach den namenlosen Tagen.</text:p>
        <text:list text:style-name="L8">
          <text:list-item>
            <text:p text:style-name="P34"><text:span text:style-name="T3">16 </text:span><text:span text:style-name="T4">Praios</text:span>, Feuertag: Sumerich stirbt.</text:p>
          </text:list-item>
          <text:list-item>
            <text:p text:style-name="P34"><text:span text:style-name="T3">17 </text:span><text:span text:style-name="T4">Praios</text:span>, Wassertag: Leichenschmaus, Alrik erfährt vom Testament.</text:p>
          </text:list-item>
          <text:list-item>
            <text:p text:style-name="P34"><text:span text:style-name="T3">18 </text:span><text:span text:style-name="T4">Praios</text:span>, Windstag, Abend: Alrik nimmt Kontakt mit den Banditen auf und beauftragt den Diebstahl.</text:p>
          </text:list-item>
          <text:list-item>
            <text:p text:style-name="P34"><text:span text:style-name="T3">20. </text:span><text:span text:style-name="T4">Praios</text:span>, Markttag: Retor trifft ein, verteilt die Post und nimmt <text:span text:style-name="T5">ausgehende </text:span>Sendungen entgegen. <text:span text:style-name="T5">Den Abend und die Nacht verbringt er (wie immer) im Silberhecht.</text:span></text:p>
          </text:list-item>
          <text:list-item>
            <text:p text:style-name="P34"><text:span text:style-name="T18">21 </text:span><text:span text:style-name="T4">Praios</text:span><text:span text:style-name="T19">, Praiostag, Morgen: Retor verlässt Weidenau Richtung Nadoret, wird überfallen und ermordet.</text:span></text:p>
          </text:list-item>
          <text:list-item>
            <text:p text:style-name="P34"><text:span text:style-name="T3">22. </text:span><text:span text:style-name="T4">Praios</text:span>, Rohalstag, Morgen: Efferdian <text:span text:style-name="T5">Retors Leiche beim einholen der Reusen.</text:span></text:p>
          </text:list-item>
          <text:list-item>
            <text:p text:style-name="P34"><text:span text:style-name="T3">22 </text:span><text:span text:style-name="T4">Praios</text:span>, Rohalstag, Mittags: Schwester Eolan und Gerba beauftragen die Helden den Fall zu lösen.</text:p>
          </text:list-item>
        </text:list>
        <text:p text:style-name="P35"/>
        <text:h text:style-name="P36" text:outline-level="2">NPCs</text:h>
        <text:h text:style-name="P37" text:outline-level="3">Story</text:h>
        <text:p text:style-name="P38"><text:span text:style-name="Strong_20_Emphasis">Sumerich Brendacher:</text:span> ♂ Verstorben mit 70 / Vogt (seit 20 Jahren) &amp; Großbauer / Halbbruder von Alrik (väterlicherseits) / Gerecht, pflichtbewusst, stur / Verwitwet, kinderlos / Hinterlässt Hof und Felder / Lange krank / Beriet sein Erbe mit Magister Olorand und seinem Freund Bardo.</text:p>
        <text:p text:style-name="P38"><text:span text:style-name="Strong_20_Emphasis">Alrik Brendacher:</text:span> ♂ 60 Jahre / Zweitgrößter Bauer Weidenaus / Halbbruder von Sumerich (väterlicherseits) / Ehrgeizig, grummelig / Hat Sumerich während dessen Krankheit unterstützt / Beschäftigt mehrere Knechte / Versorgte das Dorf nach der Missernte 1004 und finanzierte den Wiederaufbau der Brücke nach der Flut von 1007 / Hält sich für den rechtmäßigen Erben des Brendacher Hofes.</text:p>
        <text:p text:style-name="P38"><text:span text:style-name="Strong_20_Emphasis">Retor Farnlieb:</text:span> ♂ 35 Jahre / Postbote der Region / Zuverlässig, beliebt / Bringt jeden Markttag die Post nach Weidenau und kehrt anschließend im Silberhecht ein.</text:p>
        <text:p text:style-name="P38"><text:span text:style-name="Strong_20_Emphasis">Elenor Brendacher:</text:span> ♀ 25 Jahre / Lebt in Nadoret / Tochter von Travina Brendacher / Nichte und Erbin Sumerichs / Kennt ihre Onkel und Weidenau kaum.</text:p>
        <text:h text:style-name="P37" text:outline-level="3">Dorf</text:h>
        <text:p text:style-name="P39"><text:span text:style-name="T3">Gerba Krüger</text:span>: ♀ 60 Jahre / Wirtin des Silberhechts &amp; inoffizielle Dorfälteste / Ehemalige Abenteurerin / Freundlich, vernünftig / Gilt als neutral, klug und gerecht.</text:p>
        <text:p text:style-name="P39"><text:span text:style-name="T3">Schwester Eolan</text:span>: ♀ 25 Jahre / Wandernde Peraine-Geweihte (betreut fünf Dörfer) / Jung, unerfahren, harmoniebedürftig / Bemüht sich nach Sumerichs Tod um Frieden und Ordnung.</text:p>
        <text:p text:style-name="P39"><text:span text:style-name="T3">Magister Olorand vom Eberstamm</text:span>: ♂ 80 Jahre / Ehemaliger Hofmagier des Barons / Alt, verschroben, zurückgezogen / Lebt im Turm östlich von Weidenau / Hat nur selten Kontakt zu den Dorfbewohnern.</text:p>
        <text:p text:style-name="P39"><text:span text:style-name="T3">Bardo Eisenkamm</text:span>: ♂ <text:span text:style-name="T20">6</text:span>5 Jahre / Veteran der Nadoreter Garde / Wortkarg, besonnen, angesehen / Verkrüppeltes Bein / Alter Freund Sumerichs / Hält Elenor für die falsche Erbin.</text:p>
        <text:p text:style-name="P39"><text:span text:style-name="T3">Leni Tauber</text:span>: ♀ 17 Jahre / Schankmagd im Silberhecht / Freundlich, geschwätzig, naiv / Kennt jedes Gerücht im Dorf und wird oft unterschätzt.</text:p>
        <text:p text:style-name="P39"><text:span text:style-name="T3">Efferdian Tauber</text:span>: ♂ 22 Jahre / Fischer &amp; Lenis Bruder / Abergläubisch, redselig / Kümmert sich um den Efferd-Schrein und findet Retors Leiche.</text:p>
        <text:p text:style-name="P39"/>
        <text:h text:style-name="P37" text:outline-level="3">Banditen</text:h>
        <text:p text:style-name="P40"><text:span text:style-name="T3">Jarik „der Riese“</text:span>: ♂ <text:span text:style-name="T20">4</text:span>0 Jahre / Ehemaliger Fuhrmann, heute Banditenanführer / 1,95 Schritt groß / Wortkarg, einschüchternd, besonnen / Vermeidet unnötige Gewalt / Kennt die Handels- und Postrouten entlang des Großen Flusses.</text:p>
        <text:p text:style-name="P40"><text:span text:style-name="T3">Wulf</text:span>: ♂ 35 Jahre / Ehemaliger Holzfäller / Kräftig, langsam, gutmütig / Folgt Jariks Anweisungen ohne zu hinterfragen.</text:p>
        <text:p text:style-name="P40"><text:soft-page-break/><text:span text:style-name="T3">Gerda</text:span>: ♀ 25 Jahre / Junge Banditin / Impulsiv, aggressiv, draufgängerisch / Erschießt Retor während des Überfalls mit einer Armbrust.</text:p>
        <text:p text:style-name="P40"><text:span text:style-name="T3">Nedo</text:span>: ♂ 30 Jahre / Ehemaliger Jäger und Spurenleser / Nervös, abergläubisch / Zuständig für Fährtenlesen und das Verbergen von Spuren.</text:p>
        <text:p text:style-name="P40"/>
        <text:h text:style-name="Heading_20_2" text:outline-level="2">Orte</text:h>
        <text:h text:style-name="Heading_20_3" text:outline-level="3"><text:span text:style-name="Strong_20_Emphasis">Weidenau</text:span></text:h>
        <text:p text:style-name="Text_20_body">Dorf mit rund 150 Einwohnern an der Südgrenze der Baronie Nadoret, gelegen am schiffbaren Nebenarm des Großen Flusses – dem Weidenstrom.</text:p>
        <text:p text:style-name="Text_20_body"><text:span text:style-name="T3">Struktur</text:span>: Etwa 30 Höfe, Dorfplatz mit Brunnen, Schmiede, Bootsanleger, Getreidespeicher, Vogtshof der Familie Brendacher, Gasthaus Silberhecht, Peraine-Kapelle und Efferd-Schrein.</text:p>
        <text:p text:style-name="Text_20_body"><text:span text:style-name="T3">Hauptgewerbe</text:span>: Landwirtschaft, Viehzucht und Fischfang.</text:p>
        <text:p text:style-name="Text_20_body"><text:span text:style-name="T3">Besonderheit</text:span>: Der Turm des Magisters Olorand, ein ehemaliger Wachturm auf einer bewaldeten Anhöhe, etwa eine Stunde östlich von Weidenau.</text:p>
        <text:p text:style-name="Text_20_body"/>
        <text:h text:style-name="Heading_20_3" text:outline-level="3">Gasthaus Silberhecht</text:h>
        <text:p text:style-name="Text_20_body"><text:span text:style-name="T3">Personen</text:span>: Gerba Krüger / Leni Tauber</text:p>
        <text:p text:style-name="Text_20_body"><text:span text:style-name="T3">Äußeres</text:span>: Größtes Gebäude nach dem Vogtshof. U-förmiges Steinhaus mit Innenhof, Stallungen im Norden und Schankstube im Westen. Überdachte Terrasse mit Blick auf den Weidenstrom.</text:p>
        <text:p text:style-name="Text_20_body"><text:span text:style-name="T3">Speisen</text:span>: Weidenauer Spätzle, Geschnetzeltes, Bauerntopf, Brotzeitplatte, Frühstücksplatte (Speck &amp; Ei), Koscher Brezen.</text:p>
        <text:p text:style-name="Text_20_body"><text:span text:style-name="T3">Getränke</text:span>: Brendacher Glut (klarer Apfelschnaps), Ferdoker Helles, Rotwein aus Flusswiesen.</text:p>
        <text:p text:style-name="Text_20_body"><text:span text:style-name="T3">Inneres</text:span>: Großer Steinkamin mit der orkischen Kriegsaxt Grimms Zahn (Beutestück aus Gerbas Abenteurerzeit). Getrockneter Lavendel zwischen den Dachbalken überdeckt den Geruch von Rauch, Bier und nassen Mänteln.</text:p>
        <text:p text:style-name="Text_20_body"><text:span text:style-name="T3">Schwarzes Brett</text:span>: Kreidetafel neben der Terrassentür für Kaufgesuche, Arbeitsangebote und Bekanntmachungen.</text:p>
        <text:p text:style-name="Text_20_body"><text:span text:style-name="T3">Stammgastbecher</text:span>: Hinter der Schank hängen Zinnbecher an einfachen Haken. Jeder trägt den eingravierten Namen seines Besitzers (Sumerich, Retor, Alrik, Bardo, Schwester Eolan).</text:p>
        <text:p text:style-name="Text_20_body"/>
        <text:h text:style-name="P41" text:outline-level="3"><text:span text:style-name="Strong_20_Emphasis"><text:span text:style-name="T10">Alte Köhlerei (</text:span></text:span><text:span text:style-name="Strong_20_Emphasis"><text:span text:style-name="T21">Banditenlager</text:span></text:span><text:span text:style-name="Strong_20_Emphasis"><text:span text:style-name="T10">)</text:span></text:span></text:h>
        <text:p text:style-name="P42"><text:span text:style-name="T3">Beschreibung</text:span>: Verlassene Köhlerei mit kleiner Blockhütte, eingestürztem Schuppen, altem Kohlemeiler, Brunnen und Feuerstelle.</text:p>
        <text:p text:style-name="P42"><text:span text:style-name="T3">Lage</text:span>: Etwa eine Stunde nördlich von Weidenau, tief im Wald und weit abseits der üblichen Wege. Von dichtem Unterholz umgeben aber über einen schmalen Trampelpfad zu erreichen.</text:p>
        <text:p text:style-name="P43"/>
        <text:h text:style-name="P44" text:outline-level="2"><text:span text:style-name="T5">Amt: </text:span>Dorfvogt</text:h>
        <text:list text:style-name="L9">
          <text:list-item>
            <text:p text:style-name="P45">Vertreter des Barons vor Ort</text:p>
          </text:list-item>
          <text:list-item>
            <text:p text:style-name="P45">Größter Grundbesitzer des Dorfes (kein Vollzeitamt)</text:p>
          </text:list-item>
          <text:list-item>
            <text:p text:style-name="P45">Zieht Steuern und Abgaben für den Baron ein</text:p>
          </text:list-item>
          <text:list-item>
            <text:p text:style-name="P45">Organisiert Frondienste und gemeinschaftliche Arbeiten (z. B. Brücken, Wege)</text:p>
          </text:list-item>
          <text:list-item>
            <text:p text:style-name="P45">Schlichtet kleinere Streitigkeiten zwischen Dorfbewohnern</text:p>
          </text:list-item>
          <text:list-item>
            <text:p text:style-name="P45">Vertritt die Interessen des Dorfes gegenüber der Baronie</text:p>
          </text:list-item>
          <text:list-item>
            <text:p text:style-name="P45">Kümmert sich um die Umsetzung der Anordnungen des Barons</text:p>
          </text:list-item>
          <text:list-item>
            <text:p text:style-name="P45">Beruft Dorfversammlungen ein und übernimmt organisatorische Aufgaben</text:p>
          </text:list-item>
        </text:list>
        <text:p text:style-name="List_20_1"><text:soft-page-break/></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writing-mode="lr-tb" style:flow-with-text="false"/>
      <style:paragraph-properties style:text-autospace="ideograph-alpha" style:line-break="strict" loext:tab-stop-distance="0p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35.46pt"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pt" fo:margin-bottom="4.99pt" style:contextual-spacing="false"/>
      <style:text-properties fo:language="de" fo:country="DE"/>
    </style:style>
    <style:style style:name="Heading" style:family="paragraph" style:parent-style-name="Standard" style:next-style-name="Text_20_body" style:class="chapter">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tab-stops/>
      </style:paragraph-properties>
      <style:text-properties fo:language="de" fo:country="DE"/>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chapter" style:master-page-name="">
      <loext:graphic-properties draw:fill="solid" draw:fill-color="#000000"/>
      <style:paragraph-properties fo:margin-top="0pt" fo:margin-bottom="10.01pt" style:contextual-spacing="false" style:page-number="auto" fo:background-color="#000000" fo:padding="4.99pt" fo:border="non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loext:graphic-properties draw:fill="solid" draw:fill-color="#10141f"/>
      <style:paragraph-properties fo:margin-top="0pt" fo:margin-bottom="4.99pt" style:contextual-spacing="false" fo:background-color="#10141f" fo:padding-left="4.99pt" fo:padding-right="2.01pt" fo:padding-top="2.01pt" fo:padding-bottom="2.01pt" fo:border="non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7pt" fo:margin-bottom="6.01pt" style:contextual-spacing="false" fo:padding="0.4pt" fo:border-left="none" fo:border-right="none" fo:border-top="none" fo:border-bottom="0.06pt solid #000000"/>
      <style:text-properties fo:font-size="14pt" fo:font-weight="bold" style:font-size-asian="14pt" style:font-weight-asian="bold" style:font-size-complex="14pt" style:font-weight-complex="bold"/>
    </style:style>
    <style:style style:name="Liste" style:family="paragraph" style:parent-style-name="Text_20_body"/>
    <style:style style:name="List_20_1" style:display-name="List 1" style:family="paragraph" style:parent-style-name="List" style:class="list" style:master-page-name="">
      <style:paragraph-properties fo:margin-left="18pt" fo:margin-top="0pt" fo:margin-bottom="7pt" style:contextual-spacing="true" fo:text-indent="-18pt" style:auto-text-indent="false" style:page-number="auto"/>
    </style:style>
    <style:style style:name="Horizontal_20_Line" style:display-name="Horizontal Line" style:family="paragraph" style:parent-style-name="Standard" style:next-style-name="Text_20_body" style:class="html">
      <style:paragraph-properties fo:margin-top="0pt" fo:margin-bottom="14.14pt" style:contextual-spacing="false" style:border-line-width-bottom="0.06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23T08:37:40.489216906</meta:creation-date>
    <meta:generator>LibreOffice/26.2.4.2$Linux_X86_64 LibreOffice_project/0229ac93fcf0d7cbc6376066c6f35021cef002dc</meta:generator>
    <dc:date>2026-06-25T11:37:23.918495128</dc:date>
    <meta:editing-duration>PT1H59M46S</meta:editing-duration>
    <meta:editing-cycles>18</meta:editing-cycles>
    <meta:print-date>2026-06-25T11:37:13.941463706</meta:print-date>
    <meta:printed-by>PDF files</meta:printed-by>
    <meta:document-statistic meta:table-count="0" meta:image-count="0" meta:object-count="0" meta:page-count="8" meta:paragraph-count="134" meta:word-count="2327" meta:character-count="15566" meta:non-whitespace-character-count="13436"/>
  </office:meta>
</office:document-meta>
</file>