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de" fo:country="DE" style:script-type="latin"/>
    </style:style>
    <style:style style:name="P2" style:family="paragraph" style:parent-style-name="Standard">
      <style:text-properties fo:language="de" fo:country="DE" officeooo:rsid="000eb53e" officeooo:paragraph-rsid="0025dd52" style:script-type="latin"/>
    </style:style>
    <style:style style:name="P3" style:family="paragraph" style:parent-style-name="Heading_20_2">
      <style:text-properties fo:language="de" fo:country="DE" officeooo:rsid="000f6e05" officeooo:paragraph-rsid="000f6e05" style:script-type="latin"/>
    </style:style>
    <style:style style:name="P4" style:family="paragraph" style:parent-style-name="List_20_1">
      <style:paragraph-properties fo:margin-left="0pt" fo:text-indent="0pt" style:auto-text-indent="false"/>
    </style:style>
    <style:style style:name="P5" style:family="paragraph" style:parent-style-name="Text_20_body">
      <style:text-properties officeooo:paragraph-rsid="003427f7"/>
    </style:style>
    <style:style style:name="P6" style:family="paragraph" style:parent-style-name="List_20_1">
      <style:paragraph-properties fo:margin-left="0pt" fo:text-indent="0pt" style:auto-text-indent="false"/>
      <style:text-properties fo:language="de" fo:country="DE" fo:font-weight="normal" officeooo:rsid="00125770" style:font-weight-asian="normal" style:font-weight-complex="normal" style:script-type="latin"/>
    </style:style>
    <style:style style:name="P7" style:family="paragraph" style:parent-style-name="Standard">
      <style:text-properties fo:language="de" fo:country="DE" fo:font-weight="normal" officeooo:rsid="00125770" officeooo:paragraph-rsid="00125770" style:font-weight-asian="normal" style:font-weight-complex="normal" style:script-type="latin"/>
    </style:style>
    <style:style style:name="P8" style:family="paragraph" style:parent-style-name="Heading_20_2">
      <style:paragraph-properties fo:break-before="page"/>
      <style:text-properties officeooo:rsid="002b0188" officeooo:paragraph-rsid="002b0188"/>
    </style:style>
    <style:style style:name="P9" style:family="paragraph" style:parent-style-name="Heading_20_3">
      <style:text-properties officeooo:paragraph-rsid="002b3f02"/>
    </style:style>
    <style:style style:name="P10" style:family="paragraph" style:parent-style-name="Text_20_body">
      <style:text-properties officeooo:paragraph-rsid="002b3f02"/>
    </style:style>
    <style:style style:name="P11" style:family="paragraph" style:parent-style-name="List_20_1" style:list-style-name="L1">
      <style:paragraph-properties fo:margin-left="0pt" fo:text-indent="0pt" style:auto-text-indent="false"/>
      <style:text-properties officeooo:paragraph-rsid="002b3f02"/>
    </style:style>
    <style:style style:name="P12" style:family="paragraph" style:parent-style-name="List_20_1" style:list-style-name="L2">
      <style:text-properties officeooo:paragraph-rsid="002b3f02"/>
    </style:style>
    <style:style style:name="P13" style:family="paragraph" style:parent-style-name="List_20_1">
      <style:text-properties officeooo:paragraph-rsid="002b3f02"/>
    </style:style>
    <style:style style:name="P14" style:family="paragraph" style:parent-style-name="List_20_1" style:list-style-name="L3">
      <style:text-properties officeooo:paragraph-rsid="002b3f02"/>
    </style:style>
    <style:style style:name="P15" style:family="paragraph" style:parent-style-name="List_20_1" style:list-style-name="L4">
      <style:text-properties officeooo:paragraph-rsid="002b3f02"/>
    </style:style>
    <style:style style:name="P16" style:family="paragraph" style:parent-style-name="List_20_1" style:list-style-name="L4">
      <style:text-properties officeooo:rsid="002b3f02" officeooo:paragraph-rsid="002b3f02"/>
    </style:style>
    <style:style style:name="P17" style:family="paragraph" style:parent-style-name="List_20_1" style:list-style-name="L4">
      <style:text-properties officeooo:rsid="001f9af7" officeooo:paragraph-rsid="002b3f02"/>
    </style:style>
    <style:style style:name="P18" style:family="paragraph" style:parent-style-name="List_20_1" style:list-style-name="L4">
      <style:text-properties officeooo:rsid="00327077" officeooo:paragraph-rsid="00327077"/>
    </style:style>
    <style:style style:name="P19" style:family="paragraph" style:parent-style-name="List_20_1">
      <style:text-properties officeooo:rsid="00327077" officeooo:paragraph-rsid="00327077"/>
    </style:style>
    <style:style style:name="P20" style:family="paragraph" style:parent-style-name="Text_20_body">
      <style:text-properties fo:language="de" fo:country="DE" fo:font-weight="normal" officeooo:rsid="001f9af7" officeooo:paragraph-rsid="002b3f02" style:font-weight-asian="normal" style:font-weight-complex="normal" style:script-type="latin"/>
    </style:style>
    <style:style style:name="P21" style:family="paragraph" style:parent-style-name="List_20_1" style:list-style-name="L5">
      <style:text-properties officeooo:paragraph-rsid="002b3f02"/>
    </style:style>
    <style:style style:name="P22" style:family="paragraph" style:parent-style-name="Heading_20_2">
      <style:paragraph-properties fo:break-before="page"/>
    </style:style>
    <style:style style:name="P23" style:family="paragraph" style:parent-style-name="List_20_1" style:list-style-name="L6"/>
    <style:style style:name="P24" style:family="paragraph" style:parent-style-name="List_20_1" style:list-style-name="L6">
      <style:text-properties officeooo:rsid="003198a9" officeooo:paragraph-rsid="003198a9"/>
    </style:style>
    <style:style style:name="P25" style:family="paragraph" style:parent-style-name="List_20_1" style:list-style-name="L7"/>
    <style:style style:name="P26" style:family="paragraph" style:parent-style-name="List_20_1" style:list-style-name="L8"/>
    <style:style style:name="P27" style:family="paragraph" style:parent-style-name="List_20_1" style:list-style-name="L8">
      <style:text-properties officeooo:paragraph-rsid="003198a9"/>
    </style:style>
    <style:style style:name="P28" style:family="paragraph" style:parent-style-name="List_20_1">
      <style:text-properties officeooo:paragraph-rsid="003198a9"/>
    </style:style>
    <style:style style:name="P29" style:family="paragraph" style:parent-style-name="List_20_1" style:list-style-name="L9"/>
    <style:style style:name="P30" style:family="paragraph" style:parent-style-name="List_20_1" style:list-style-name="L10"/>
    <style:style style:name="P31" style:family="paragraph" style:parent-style-name="List_20_1" style:list-style-name="L10">
      <style:text-properties officeooo:paragraph-rsid="003198a9"/>
    </style:style>
    <style:style style:name="P32" style:family="paragraph" style:parent-style-name="Heading_20_3">
      <style:text-properties officeooo:paragraph-rsid="003198a9"/>
    </style:style>
    <style:style style:name="P33" style:family="paragraph" style:parent-style-name="List_20_1" style:list-style-name="L11">
      <style:text-properties officeooo:paragraph-rsid="003198a9"/>
    </style:style>
    <style:style style:name="P34" style:family="paragraph" style:parent-style-name="Standard" style:list-style-name="L12">
      <style:text-properties fo:language="de" fo:country="DE" officeooo:rsid="000822d7" officeooo:paragraph-rsid="002f7d92" style:script-type="latin"/>
    </style:style>
    <style:style style:name="P35" style:family="paragraph" style:parent-style-name="Standard" style:list-style-name="L12">
      <style:text-properties fo:language="de" fo:country="DE" officeooo:rsid="002f7d92" officeooo:paragraph-rsid="002f7d92" style:script-type="latin"/>
    </style:style>
    <style:style style:name="P36" style:family="paragraph" style:parent-style-name="List_20_1" style:list-style-name="L1"/>
    <style:style style:name="P37" style:family="paragraph" style:parent-style-name="List_20_1" style:list-style-name="L1">
      <style:text-properties officeooo:rsid="002f7d92" officeooo:paragraph-rsid="002f7d92"/>
    </style:style>
    <style:style style:name="P38" style:family="paragraph" style:parent-style-name="List_20_1" style:list-style-name="L13"/>
    <style:style style:name="P39" style:family="paragraph" style:parent-style-name="Text_20_body">
      <style:text-properties officeooo:paragraph-rsid="003198a9"/>
    </style:style>
    <style:style style:name="P40" style:family="paragraph" style:parent-style-name="List_20_1" style:list-style-name="L14"/>
    <style:style style:name="P41" style:family="paragraph" style:parent-style-name="List_20_1" style:list-style-name="L1">
      <style:text-properties officeooo:paragraph-rsid="003198a9"/>
    </style:style>
    <style:style style:name="P42" style:family="paragraph" style:parent-style-name="List_20_1" style:list-style-name="L15"/>
    <style:style style:name="P43" style:family="paragraph" style:parent-style-name="List_20_1" style:list-style-name="L15">
      <style:text-properties officeooo:paragraph-rsid="003198a9"/>
    </style:style>
    <style:style style:name="P44" style:family="paragraph" style:parent-style-name="List_20_1" style:list-style-name="L1">
      <style:text-properties officeooo:rsid="0020b1ed" officeooo:paragraph-rsid="003198a9"/>
    </style:style>
    <style:style style:name="P45" style:family="paragraph" style:parent-style-name="List_20_1" style:list-style-name="L16"/>
    <style:style style:name="P46" style:family="paragraph" style:parent-style-name="List_20_1" style:list-style-name="L16">
      <style:text-properties officeooo:rsid="003198a9" officeooo:paragraph-rsid="003198a9"/>
    </style:style>
    <style:style style:name="P47" style:family="paragraph" style:parent-style-name="List_20_1" style:list-style-name="L17"/>
    <style:style style:name="P48" style:family="paragraph" style:parent-style-name="List_20_1" style:list-style-name="L18"/>
    <style:style style:name="P49" style:family="paragraph" style:parent-style-name="List_20_1" style:list-style-name="L19"/>
    <style:style style:name="P50" style:family="paragraph" style:parent-style-name="List_20_1" style:list-style-name="L20">
      <style:text-properties fo:language="de" fo:country="DE" officeooo:rsid="001c64f5" officeooo:paragraph-rsid="003198a9" style:script-type="latin"/>
    </style:style>
    <style:style style:name="P51" style:family="paragraph" style:parent-style-name="List_20_1">
      <style:paragraph-properties fo:margin-left="0pt" fo:text-indent="0pt" style:auto-text-indent="false"/>
      <style:text-properties fo:language="de" fo:country="DE" officeooo:rsid="001c64f5" officeooo:paragraph-rsid="003198a9" style:script-type="latin"/>
    </style:style>
    <style:style style:name="P52" style:family="paragraph" style:parent-style-name="Heading_20_2">
      <style:text-properties officeooo:rsid="00327077" officeooo:paragraph-rsid="00327077"/>
    </style:style>
    <style:style style:name="P53" style:family="paragraph" style:parent-style-name="List_20_1" style:list-style-name="L21"/>
    <style:style style:name="P54" style:family="paragraph" style:parent-style-name="List_20_1" style:list-style-name="L21">
      <style:text-properties officeooo:rsid="00327077" officeooo:paragraph-rsid="00327077"/>
    </style:style>
    <style:style style:name="P55" style:family="paragraph" style:parent-style-name="List_20_1" style:list-style-name="L21">
      <style:text-properties officeooo:rsid="00225fa7" officeooo:paragraph-rsid="00225fa7"/>
    </style:style>
    <style:style style:name="P56" style:family="paragraph" style:parent-style-name="Text_20_body">
      <style:text-properties officeooo:paragraph-rsid="001c64f5"/>
    </style:style>
    <style:style style:name="P57" style:family="paragraph" style:parent-style-name="Heading_20_3">
      <style:text-properties officeooo:paragraph-rsid="00327077"/>
    </style:style>
    <style:style style:name="P58" style:family="paragraph" style:parent-style-name="Text_20_body">
      <style:text-properties officeooo:paragraph-rsid="00327077"/>
    </style:style>
    <style:style style:name="P59" style:family="paragraph" style:parent-style-name="List_20_1" style:list-style-name="L22">
      <style:text-properties officeooo:paragraph-rsid="00327077"/>
    </style:style>
    <style:style style:name="P60" style:family="paragraph" style:parent-style-name="List_20_1" style:list-style-name="L23"/>
    <style:style style:name="T1" style:family="text">
      <style:text-properties officeooo:rsid="00286e64"/>
    </style:style>
    <style:style style:name="T2" style:family="text">
      <style:text-properties officeooo:rsid="00292104"/>
    </style:style>
    <style:style style:name="T3" style:family="text">
      <style:text-properties officeooo:rsid="002b0188"/>
    </style:style>
    <style:style style:name="T4" style:family="text">
      <style:text-properties officeooo:rsid="0025dd52"/>
    </style:style>
    <style:style style:name="T5" style:family="text">
      <style:text-properties officeooo:rsid="00377bf6"/>
    </style:style>
    <style:style style:name="T6" style:family="text">
      <style:text-properties fo:font-weight="bold" style:font-weight-asian="bold" style:font-weight-complex="bold"/>
    </style:style>
    <style:style style:name="T7" style:family="text">
      <style:text-properties officeooo:rsid="003427f7"/>
    </style:style>
    <style:style style:name="T8" style:family="text">
      <style:text-properties officeooo:rsid="00367b8b"/>
    </style:style>
    <style:style style:name="T9" style:family="text">
      <style:text-properties officeooo:rsid="00220a57"/>
    </style:style>
    <style:style style:name="T10" style:family="text">
      <style:text-properties officeooo:rsid="002b3f02"/>
    </style:style>
    <style:style style:name="T11" style:family="text">
      <style:text-properties officeooo:rsid="001f9af7"/>
    </style:style>
    <style:style style:name="T12" style:family="text">
      <style:text-properties officeooo:rsid="001d741f"/>
    </style:style>
    <style:style style:name="T13" style:family="text">
      <style:text-properties officeooo:rsid="002d3a64"/>
    </style:style>
    <style:style style:name="T14" style:family="text">
      <style:text-properties officeooo:rsid="002dd2bd"/>
    </style:style>
    <style:style style:name="T15" style:family="text">
      <style:text-properties fo:font-weight="bold" officeooo:rsid="002f7d92" style:font-weight-asian="bold" style:font-weight-complex="bold"/>
    </style:style>
    <style:style style:name="T16" style:family="text">
      <style:text-properties fo:font-weight="bold" officeooo:rsid="00304766" style:font-weight-asian="bold" style:font-weight-complex="bold"/>
    </style:style>
    <style:style style:name="T17" style:family="text">
      <style:text-properties officeooo:rsid="003198a9"/>
    </style:style>
    <style:style style:name="T18" style:family="text">
      <style:text-properties officeooo:rsid="0020b1ed"/>
    </style:style>
    <style:style style:name="T19" style:family="text">
      <style:text-properties officeooo:rsid="002f7d92"/>
    </style:style>
    <style:style style:name="T20" style:family="text">
      <style:text-properties officeooo:rsid="001b930d"/>
    </style:style>
    <style:style style:name="T21" style:family="text">
      <style:text-properties officeooo:rsid="00219d34"/>
    </style:style>
    <style:style style:name="T22" style:family="text">
      <style:text-properties officeooo:rsid="00207a8e"/>
    </style:style>
    <style:style style:name="T23" style:family="text">
      <style:text-properties officeooo:rsid="00225fa7"/>
    </style:style>
    <style:style style:name="T24" style:family="text">
      <style:text-properties officeooo:rsid="00327077"/>
    </style:style>
    <style:style style:name="T25" style:family="text">
      <style:text-properties fo:font-weight="bold" officeooo:rsid="0018f357" style:font-weight-asian="bold" style:font-weight-complex="bold"/>
    </style:style>
    <style:style style:name="T26" style:family="text">
      <style:text-properties officeooo:rsid="0018f357"/>
    </style:style>
    <style:style style:name="T27" style:family="text">
      <style:text-properties fo:font-weight="bold" officeooo:rsid="00155a0d" style:font-weight-asian="bold" style:font-weight-complex="bold"/>
    </style:style>
    <style:style style:name="T28" style:family="text">
      <style:text-properties officeooo:rsid="00155a0d"/>
    </style:style>
    <style:style style:name="T29" style:family="text">
      <style:text-properties officeooo:rsid="003726fc"/>
    </style:style>
    <style:style style:name="Sect1" style:family="section">
      <style:section-properties text:dont-balance-text-columns="false" style:editable="false">
        <style:columns fo:column-count="2" fo:column-gap="25pt">
          <style:column style:rel-width="32767*" fo:start-indent="0pt" fo:end-indent="12.5pt"/>
          <style:column style:rel-width="32768*" fo:start-indent="12.5pt" fo:end-indent="0pt"/>
        </style:columns>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198pt" fo:text-indent="-18pt" fo:margin-left="198pt"/>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pt" fo:text-indent="-25pt" fo:margin-left="2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pt" fo:text-indent="-25pt" fo:margin-left="2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orfleben</text:span> 1: <text:span text:style-name="T2">Der letzte Wille des </text:span><text:span text:style-name="T3">Vogts</text:span></text:h>
      <text:p text:style-name="P2">Das beschauliche Dorf Weidenau trauert um seinen langjährigen Vogt Sumerich Brendacher, als <text:span text:style-name="T4">ein Mord die gemeinde Erschüttert: </text:span>Der beliebte Postbote Retor Farnlieb wird ermordet am Ufer des Weidenstroms aufgefunden. <text:span text:style-name="T4">Ohne Vogt fällt es an eine Gruppe ehrbarer Bürger die Sache aufzuklären.</text:span></text:p>
      <text:p text:style-name="P2"><text:span text:style-name="T5">Der letzte Wille des Vogts</text:span> ist ein bodenständiges Ermittlungsabenteuer für DSA, <text:span text:style-name="T4">indem die Spieler die Rolle einfacher Dorfbewohner übernehmen. Anstelle von Drachen und Dämonen steht ein kleines Dorf und seine Bewohner im Mittelpunkt.</text:span></text:p>
      <text:p text:style-name="P2"/>
      <text:h text:style-name="P3" text:outline-level="2">Vorgeschichte</text:h>
      <text:section text:style-name="Sect1" text:name="Section4">
        <text:h text:style-name="Heading_20_3" text:outline-level="3">Familie Brendacher</text:h>
        <text:p text:style-name="Text_20_body">Die Familie Brendacher gehört seit Generationen zu den angesehensten Bauernfamilien Weidenaus. Gunter Brendacher hatte drei Kinder: <text:span text:style-name="T6">Sumerich</text:span> aus seiner ersten Ehe mit Girte, <text:span text:style-name="T6">Alrik</text:span> aus seiner zweiten Ehe mit Finnla sowie die <text:span text:style-name="T6">uneheliche Tochter Travina</text:span>, die mit ihrer Mutter Erlgrun in Nadoret aufwuchs.</text:p>
        <text:p text:style-name="Text_20_body">Sumerich und Alrik verbrachten ihre Kindheit gemeinsam in Weidenau, standen jedoch schon früh in einem ständigen Konkurrenzverhältnis. Nach Gunters Tod erbte Sumerich den Brendacher Hof, während Alrik ein großes Stück Land erhielt. Beide brachten es zu wohlhabenden Bauern, doch Sumerich blieb stets der angesehenere der beiden. Als er vor zwanzig Jahren zum Vogt von Weidenau ernannt wurde, fühlte sich Alrik endgültig in den Schatten seines Halbbruders gestellt.</text:p>
        <text:p text:style-name="Text_20_body">Sumerich heiratete in jungen Jahren Brunja. Die Ehe blieb kinderlos und endete mit Brunjas Tod im Jahr 1001 BF. Alrik heiratete nie. So blieb Travinas Tochter Elenor, die als Näherin in Nadoret lebt, die einzige junge Nachfahrin der Familie Brendacher.</text:p>
        <text:p text:style-name="P4"/>
        <text:p text:style-name="List_20_1"/>
        <text:p text:style-name="List_20_1"/>
        <text:h text:style-name="Heading_20_3" text:outline-level="3">Sumerich und das Erbe</text:h>
        <text:p text:style-name="P5"><text:span text:style-name="T7">Seit dem Tod seiner Frau litt Sumerich zunehmend unter schlechter Gesundheit. </text:span>Im Winter 1008 BF verschlechterte sich sein Zustand merklich, und ihm wurde bewusst, dass ihm nicht mehr viel Zeit blieb. Deshalb begann er, seine Angelegenheiten zu ordnen und über die Zukunft des Brendacher Hofes nachzudenken.</text:p>
        <text:p text:style-name="Text_20_body">Obwohl sein Halbbruder Alrik fest mit dem Erbe rechnete, entschied sich Sumerich bewusst dagegen. Sein Wunsch war es, den Hof an die nächste Generation weiterzugeben. Da weder er noch Alrik Kinder hatten, fiel seine Wahl auf seine Nichte Elenor.</text:p>
        <text:p text:style-name="Text_20_body">Sumerich besprach diese Entscheidung mehrfach mit seinem alten Freund Bardo, der sie kritisch sah. Eine junge Frau aus Nadoret, die weder den Hof noch die Menschen in Weidenau kannte, erschien ihm als schlechte Wahl. Dennoch blieb Sumerich bei seiner Entscheidung.</text:p>
        <text:p text:style-name="Text_20_body">Gemeinsam mit Magister Olorand setzte Sumerich sein Testament auf. Nach seinem Tod übernahm der Magister die Aufgabe, Elenor zu benachrichtigen und die Erbunterlagen mit dem nächsten Postboten nach Nadoret zu schicken.</text:p>
        <text:p text:style-name="P6"/>
        <text:p text:style-name="P7"/>
        <text:h text:style-name="Heading_20_3" text:outline-level="3"><text:soft-page-break/>Alrik und das Erbe</text:h>
        <text:p text:style-name="Text_20_body">Alrik hatte seinen Halbbruder während dessen langer Krankheit nach Kräften unterstützt und war überzeugt, dass ihm der Brendacher Hof eines Tages zufallen würde. Für ihn war es selbstverständlich, dass der Besitz innerhalb der Familie an den nächsten männlichen Verwandten überging. Im Vertrauen auf dieses Erbe stellte er zusätzliche Knechte ein und begann bereits, Pläne für die Bewirtschaftung des Hofes zu schmieden.</text:p>
        <text:p text:style-name="Text_20_body">Erst auf der Trauerfeier erfuhr Alrik die Wahrheit. Als er Bardo voller Stolz von seinen Plänen erzählte, wurde dieser sichtlich unwohl und gestand schließlich, dass Sumerich den Hof seiner Nichte Elenor vermacht hatte. Für Alrik brach in diesem Moment eine Welt zusammen.</text:p>
        <text:p text:style-name="P4"/>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P4"/>
        <text:h text:style-name="Heading_20_3" text:outline-level="3">Der Mord</text:h>
        <text:p text:style-name="Text_20_body">Von Wut und Enttäuschung getrieben nahm Alrik noch am Abend Kontakt zu dem Banditen Jarik auf. Dieser sollte den Postboten Retor auf seinem Weg nach Nadoret abfangen und die Erbunterlagen an sich bringen. Alrik schärfte ihm ausdrücklich ein, dass niemand zu Schaden kommen dürfe.</text:p>
        <text:p text:style-name="Text_20_body"><text:span text:style-name="T7">Der</text:span> Überfall <text:span text:style-name="T7">geriet </text:span>jedoch außer Kontrolle. Retor weigerte sich, seine Posttasche herauszugeben, und versuchte zu fliehen. <text:span text:style-name="T7">Die junge Wegelagering </text:span>Gerda geriet in Panik und erschoss ihn mit ihrer Armbrust. Die Banditen ergriffen hastig die Posttasche und flohen. Geldbörse und alle anderen Wertsachen blieben am Tatort zurück.</text:p>
        <text:p text:style-name="P5">Erst am folgenden Morgen entdeckte der Fischer Efferdian Tauber die Leiche beim Einholen seiner Reusen. Nachdem er die Wirtin Gerba verständigt hatte, verbreitete deren Schankmagd Leni die Nachricht im ganzen Dorf.</text:p>
        <text:p text:style-name="P5">Da Weidenau nach Sumerichs Tod keinen Vogt mehr hatte und offizielle Hilfe aus Nadoret erst nach Tagen oder Wochen eintreffen würde, wandte sich Gerba an <text:span text:style-name="T7">die örtliche Geweihte, </text:span>Schwester Eolan. Gemeinsam beschlossen die beiden, einige ehrbare und fähige Dorfbewohner mit der Aufklärung des Mordes zu beauftragen – die Helden.</text:p>
        <text:p text:style-name="P4"/>
      </text:section>
      <text:p text:style-name="Text_20_body"/>
      <text:h text:style-name="P8" text:outline-level="2">Orte</text:h>
      <text:section text:style-name="Sect1" text:name="Section2">
        <text:h text:style-name="P9" text:outline-level="3">Weidenau</text:h>
        <text:p text:style-name="P10">Dorf mit rund 150 Einwohnern an der Südgrenze der Baronie Nadoret, gelegen am schiffbaren Nebenarm des Großen Flusses – dem Weidenstrom.</text:p>
        <text:p text:style-name="P10"><text:span text:style-name="T6">Struktur</text:span>: Etwa 30 Höfe, Dorfplatz mit Brunnen, <text:span text:style-name="T8">Bardos S</text:span>chmiede, Bootsanleger, Getreidespeicher, Vogtshof der Familie Brendacher, Gasthaus Silberhecht, Peraine-Kapelle und Efferd-Schrein.</text:p>
        <text:p text:style-name="P10"><text:span text:style-name="T6">Hauptgewerbe</text:span>: Landwirtschaft, Viehzucht und Fischfang.</text:p>
        <text:p text:style-name="P10"><text:span text:style-name="T6">Besonderheit</text:span>: Der Turm des Magisters Olorand, ein ehemaliger Wachturm auf einer bewaldeten Anhöhe, etwa eine Stunde östlich von Weidenau.</text:p>
        <text:h text:style-name="P9" text:outline-level="3">Brendacher Hof</text:h>
        <text:list xml:id="list1940727109" text:style-name="L1">
          <text:list-header>
            <text:p text:style-name="P11">Alter, großer Bauernhof mit kleiner Amtsstube und schlichtem Arbeitszimmer.</text:p>
          </text:list-header>
        </text:list>
        <text:p text:style-name="P10"><text:span text:style-name="T6">Verborgen</text:span>:</text:p>
        <text:list text:style-name="L2">
          <text:list-item>
            <text:p text:style-name="P12"><text:span text:style-name="T3">Schreibstich: </text:span>Stark benutztes Buch über das Koscher Erbrecht</text:p>
          </text:list-item>
          <text:list-item>
            <text:p text:style-name="P12"><text:span text:style-name="T3">Schreibstich: </text:span>Empfehlungsschreiben an den Baron <text:span text:style-name="T3">mit der Bitte </text:span>Alrik zum neuen Vogt zu ernennen</text:p>
          </text:list-item>
          <text:list-item>
            <text:p text:style-name="P12"><text:span text:style-name="T3">Schreibtisch: </text:span>Bündel alter und neuer Briefe zwischen Sumerich und seiner Halbschwester Travina.</text:p>
          </text:list-item>
        </text:list>
        <text:p text:style-name="P13"/>
        <text:p text:style-name="P13"/>
        <text:p text:style-name="P13"/>
        <text:p text:style-name="P13"/>
        <text:p text:style-name="P13"/>
        <text:p text:style-name="P13"/>
        <text:p text:style-name="P13"/>
        <text:p text:style-name="P13"/>
        <text:h text:style-name="P9" text:outline-level="3">Alriks Hof</text:h>
        <text:list xml:id="list172454193162365" text:continue-list="list1940727109" text:style-name="L1">
          <text:list-header>
            <text:p text:style-name="P11"><text:span text:style-name="T3">G</text:span>epflegter, <text:span text:style-name="T3">großer</text:span> Bauernhof. <text:span text:style-name="T3">Die Gebäude sind relative neu <text:s/>und wurden in den letzten Jahrzehnten errichtet. Relative viele Knechte und Mägde arbeiten am Hof.</text:span></text:p>
          </text:list-header>
        </text:list>
        <text:p text:style-name="P10"><text:span text:style-name="T6">Verborgen</text:span>:</text:p>
        <text:list text:style-name="L3">
          <text:list-item>
            <text:p text:style-name="P14"><text:span text:style-name="T9">Knechte sind bereits </text:span><text:span text:style-name="T3">vorbereitet</text:span><text:span text:style-name="T9"> um die Bewirtschaftung von Sumerichs Hof zu übernehmen</text:span></text:p>
          </text:list-item>
          <text:list-item>
            <text:p text:style-name="P14">Keiner der Knechte kann bestätigen, dass Alrik den Abend nach der Trauerfeier auf seinem Hof verbracht hat.</text:p>
          </text:list-item>
        </text:list>
        <text:h text:style-name="P9" text:outline-level="3">Gasthaus Silberhecht</text:h>
        <text:p text:style-name="P10"><text:span text:style-name="T6">Personen</text:span>: Gerba Krüger / Leni Tauber</text:p>
        <text:p text:style-name="P10"><text:span text:style-name="T6">Äußeres</text:span>: Größtes Gebäude nach dem Vogtshof. U-förmiges Steinhaus mit Innenhof, Stallungen im Norden und Schankstube im Westen. Überdachte Terrasse mit Blick auf den Weidenstrom.</text:p>
        <text:p text:style-name="P10"><text:span text:style-name="T6">Speisen</text:span>: Weidenauer Spätzle, Geschnetzeltes, Bauerntopf, Brotzeitplatte, Frühstücksplatte (Speck &amp; Ei), Koscher Brezen.</text:p>
        <text:p text:style-name="P10"><text:span text:style-name="T6">Getränke</text:span>: Brendacher Glut (klarer Apfelschnaps), Ferdoker Helles, Rotwein aus Flusswiesen.</text:p>
        <text:p text:style-name="P10"><text:span text:style-name="T6">Inneres</text:span>: Großer Steinkamin mit der orkischen Kriegsaxt Grimms Zahn (Beutestück aus Gerbas Abenteurerzeit). Getrockneter Lavendel zwischen den Dachbalken überdeckt den Geruch von Rauch, Bier und nassen Mänteln.</text:p>
        <text:p text:style-name="P10"><text:span text:style-name="T6">Schwarzes Brett</text:span>: Kreidetafel neben der Terrassentür für Kaufgesuche, Arbeitsangebote und Bekanntmachungen.</text:p>
        <text:p text:style-name="P10"><text:span text:style-name="T6">Stammgastbecher</text:span>: Hinter der Schank hängen Zinnbecher an einfachen Haken. Jeder trägt den eingravierten Namen seines Besitzers (Sumerich, Retor, Alrik, Bardo, Schwester Eolan).</text:p>
        <text:h text:style-name="P9" text:outline-level="3"><text:soft-page-break/><text:span text:style-name="T3">Tatort / Fundort der Leiche</text:span></text:h>
        <text:p text:style-name="P10">Flussufer am Weidenstrom. Mehrere Bäume nahe der Straße. Retors Leiche liegt im Schilf <text:span text:style-name="T3">und wurde offenbar von der Straße dorthin gezogen oder gerollt. </text:span><text:span text:style-name="T10">Retor hat einen Armbrustbolzen im Rücken und seine Posttasche fehlt.</text:span></text:p>
        <text:p text:style-name="P10"><text:span text:style-name="T6">Verborgen</text:span>:</text:p>
        <text:list text:style-name="L4">
          <text:list-item>
            <text:p text:style-name="P15">Spuren deuten auf mehrere Täter hin, die Retor hinter den Bäumen aufgelauert haben</text:p>
          </text:list-item>
          <text:list-item>
            <text:p text:style-name="P15">Hufspuren führen zu Retors davongelaufenem Esel, der auf einer nahen Wiese grast</text:p>
          </text:list-item>
          <text:list-item>
            <text:p text:style-name="P15">Sehr gut verborgene Fußspuren führen nach Norden zum Banditenlager.</text:p>
          </text:list-item>
          <text:list-item>
            <text:p text:style-name="P16">Retors Geldbörse und sein kunstvoll gearbeitetes Jagdmesser mit Horngriff befinden sich noch am Körper</text:p>
          </text:list-item>
          <text:list-item>
            <text:p text:style-name="P15">Keine weiteren Wertsachen wurden entwendet</text:p>
          </text:list-item>
          <text:list-item>
            <text:p text:style-name="P17"><text:span text:style-name="T10">Retor hat keine</text:span> Verletzungen außer dem tödlichen Armbrustbolzen</text:p>
          </text:list-item>
          <text:list-item>
            <text:p text:style-name="P18">Bei dem Armbrustbolzen handelt es sich um einen gewöhnlichen Jagdbolzen ohne individuelle Kennzeichen</text:p>
          </text:list-item>
        </text:list>
        <text:p text:style-name="P19"/>
        <text:p text:style-name="P19"/>
        <text:p text:style-name="P19"/>
        <text:p text:style-name="P19"/>
        <text:p text:style-name="P19"/>
        <text:p text:style-name="P19"/>
        <text:h text:style-name="P9" text:outline-level="3"><text:span text:style-name="Strong_20_Emphasis"><text:span text:style-name="T11">Alte Köhlerei (</text:span></text:span><text:span text:style-name="Strong_20_Emphasis"><text:span text:style-name="T12">Banditenlager</text:span></text:span><text:span text:style-name="Strong_20_Emphasis"><text:span text:style-name="T11">)</text:span></text:span></text:h>
        <text:p text:style-name="P20"><text:span text:style-name="T6">Beschreibung</text:span>: Verlassene Köhlerei mit kleiner Blockhütte, eingestürztem Schuppen, altem Kohlemeiler, Brunnen und Feuerstelle.</text:p>
        <text:p text:style-name="P20"><text:span text:style-name="T6">Lage</text:span>: Etwa eine Stunde nördlich von Weidenau, tief im Wald und weit abseits der üblichen Wege. Von dichtem Unterholz umgeben aber über einen schmalen Trampelpfad zu erreichen.</text:p>
        <text:p text:style-name="P10"><text:span text:style-name="T6">Verborgen</text:span>:</text:p>
        <text:list text:style-name="L5">
          <text:list-item>
            <text:p text:style-name="P21">Der eingestürzte Schuppen wird trotz seines Zustands regelmäßig genutzt</text:p>
          </text:list-item>
          <text:list-item>
            <text:p text:style-name="P21">Die Beute <text:span text:style-name="T9">(</text:span>einschließlich Retors Posttasche<text:span text:style-name="T9">)</text:span> ist unter einer losen Diele im Schuppen versteckt</text:p>
          </text:list-item>
          <text:list-item>
            <text:p text:style-name="P21">Die Beute besteht überwiegend aus Beuteln mit wenigen Kupfer- und Silbermünzen, daneben findet sich ein ungewöhnlich gut gefüllter Beutel mit mehreren Silbermünzen <text:span text:style-name="T9">(</text:span>Alriks Anzahlung für den Auftrag<text:span text:style-name="T9">).</text:span></text:p>
          </text:list-item>
        </text:list>
        <text:p text:style-name="P13"/>
        <text:p text:style-name="P13"/>
        <text:p text:style-name="P13"/>
        <text:p text:style-name="P13"/>
        <text:p text:style-name="P13"/>
        <text:p text:style-name="P13"/>
        <text:p text:style-name="P13"/>
        <text:p text:style-name="P13"/>
        <text:p text:style-name="P13"/>
        <text:p text:style-name="P13"/>
      </text:section>
      <text:p text:style-name="P13"/>
      <text:p text:style-name="P13"/>
      <text:p text:style-name="P13"/>
      <text:h text:style-name="P22" text:outline-level="2">Personen</text:h>
      <text:section text:style-name="Sect1" text:name="Section1">
        <text:h text:style-name="Heading_20_3" text:outline-level="3"><text:span text:style-name="Strong_20_Emphasis">Sumerich Brendacher</text:span></text:h>
        <text:list text:style-name="L6">
          <text:list-item>
            <text:p text:style-name="P23">♂ <text:span text:style-name="T13">war lange Krank und ist mit </text:span>70 <text:span text:style-name="T13">gestorben, </text:span>Großbauer, <text:span text:style-name="T14">war</text:span> die letzten 20 Jahre Vogt von Weidenau</text:p>
          </text:list-item>
          <text:list-item>
            <text:p text:style-name="P23">Verwitwet, kinderlos, Halbbruder von Alrik (väterlicherseits), <text:span text:style-name="T14">guter Freund von Bardo, </text:span></text:p>
          </text:list-item>
          <text:list-item>
            <text:p text:style-name="P23">Gerecht, pflichtbewusst, stur</text:p>
          </text:list-item>
        </text:list>
        <text:p text:style-name="Text_20_body"><text:span text:style-name="T15">Geheimnisse / Info</text:span><text:span text:style-name="T16">s</text:span></text:p>
        <text:list text:continue-numbering="true" text:style-name="L6">
          <text:list-item>
            <text:p text:style-name="P23">Vererbt seinen Hof an seine Nichte Elenor, <text:span text:style-name="T17">damit der Hof an die nächste Generation geht</text:span></text:p>
          </text:list-item>
          <text:list-item>
            <text:p text:style-name="P24">Wünscht sich dass sein Bruder Alrik der neue Vogt von Weidenau wird.</text:p>
          </text:list-item>
          <text:list-item>
            <text:p text:style-name="P23">Hat sich mit Magister Olorand <text:span text:style-name="T14">wegen der Erbschaft beraten lassen.</text:span></text:p>
          </text:list-item>
          <text:list-item>
            <text:p text:style-name="P23">Hat seine Wünsche mit seinem engen Freund Bardo besprochen.</text:p>
          </text:list-item>
        </text:list>
        <text:h text:style-name="Heading_20_3" text:outline-level="3"><text:span text:style-name="Strong_20_Emphasis">Retor Farnlieb</text:span></text:h>
        <text:list text:style-name="L7">
          <text:list-item>
            <text:p text:style-name="P25">♂ 35 Jahre, Postbote der Region</text:p>
          </text:list-item>
          <text:list-item>
            <text:p text:style-name="P25">Zuverlässig, beliebt</text:p>
          </text:list-item>
          <text:list-item>
            <text:p text:style-name="P25">Bringt jeden Markttag die Post nach Weidenau und kehrt anschließend im Silberhecht ein.</text:p>
          </text:list-item>
        </text:list>
        <text:h text:style-name="Heading_20_3" text:outline-level="3"><text:span text:style-name="Strong_20_Emphasis">Elenor Brendacher</text:span></text:h>
        <text:list text:style-name="L8">
          <text:list-item>
            <text:p text:style-name="P26">♀ 25 Jahre, <text:span text:style-name="T10">Näherin in Nadoret</text:span></text:p>
          </text:list-item>
          <text:list-item>
            <text:p text:style-name="P26">Tochter von Travina Brendacher, Nichte und Erbin Sumerichs</text:p>
          </text:list-item>
          <text:list-item>
            <text:p text:style-name="P27">Kennt ihre Onkel und Weidenau kaum.</text:p>
          </text:list-item>
        </text:list>
        <text:p text:style-name="P28"/>
        <text:p text:style-name="P28"/>
        <text:p text:style-name="P28"/>
        <text:p text:style-name="P28"/>
        <text:p text:style-name="P28"/>
        <text:p text:style-name="P28"/>
        <text:p text:style-name="P28"/>
        <text:h text:style-name="Heading_20_3" text:outline-level="3"><text:span text:style-name="Strong_20_Emphasis">Alrik Brendacher</text:span></text:h>
        <text:list text:style-name="L9">
          <text:list-item>
            <text:p text:style-name="P29">♂ 60 Jahre, Zweitgrößter Bauer Weidenaus, Halbbruder von Sumerich (väterlicherseits)</text:p>
          </text:list-item>
          <text:list-item>
            <text:p text:style-name="P29">Ehrgeizig, grummelig</text:p>
          </text:list-item>
          <text:list-item>
            <text:p text:style-name="P29">Hat Sumerich während dessen Krankheit unterstützt</text:p>
          </text:list-item>
          <text:list-item>
            <text:p text:style-name="P29">Beschäftigt mehrere Knechte</text:p>
          </text:list-item>
          <text:list-item>
            <text:p text:style-name="P29">Versorgte das Dorf nach der Missernte 1004 und finanzierte den Wiederaufbau der Brücke nach der Flut von 1007</text:p>
          </text:list-item>
          <text:list-item>
            <text:p text:style-name="P29">Tief erschüttert über den Mord an Retor</text:p>
          </text:list-item>
          <text:list-item>
            <text:p text:style-name="P29">Fordert, die Täter schnell zur Rechenschaft zu ziehen</text:p>
          </text:list-item>
        </text:list>
        <text:p text:style-name="Text_20_body"><text:span text:style-name="T15">Geheimnisse / Info</text:span><text:span text:style-name="T16">s</text:span></text:p>
        <text:list text:style-name="L10">
          <text:list-item>
            <text:p text:style-name="P30">Hält sich für den rechtmäßigen Erben des Brendacher Hofes.</text:p>
          </text:list-item>
          <text:list-item>
            <text:p text:style-name="P30">Verschweigt, dass er vom Testament wusste</text:p>
          </text:list-item>
          <text:list-item>
            <text:p text:style-name="P30">Verschweigt den Auftrag an Jarik</text:p>
          </text:list-item>
          <text:list-item>
            <text:p text:style-name="P30">Behauptet, den Abend nach der Trauerfeier auf seinem Hof verbracht zu haben</text:p>
          </text:list-item>
          <text:list-item>
            <text:p text:style-name="P31">Reagiert gereizt auf Fragen nach Elenor oder dem Erbe</text:p>
          </text:list-item>
        </text:list>
        <text:h text:style-name="P32" text:outline-level="3">Schwester Eolan</text:h>
        <text:list text:style-name="L11">
          <text:list-item>
            <text:p text:style-name="P33">♀ 25 Jahre, <text:span text:style-name="T17">w</text:span>andernde Peraine-Geweihte (betreut fünf Dörfer)</text:p>
          </text:list-item>
          <text:list-item>
            <text:p text:style-name="P33">Jung, unerfahren, harmoniebedürftig</text:p>
          </text:list-item>
          <text:list-item>
            <text:p text:style-name="P33">Bemüht sich nach Sumerichs Tod um Frieden und Ordnung, <text:span text:style-name="T17">ist aber sichtlich überfordert</text:span></text:p>
          </text:list-item>
          <text:list-item>
            <text:p text:style-name="P33">Hat Sumerich während seiner Krankheit betreut und kann <text:span text:style-name="T18">seinen natürlichen Tod bestätigen.</text:span></text:p>
          </text:list-item>
          <text:list-item>
            <text:p text:style-name="P33">Möchte Blutvergießen vermeiden und die Täter vor Gericht stellen</text:p>
          </text:list-item>
        </text:list>
        <text:p text:style-name="P28"/>
        <text:h text:style-name="Heading_20_3" text:outline-level="3"><text:soft-page-break/>G<text:span text:style-name="T19">e</text:span>rba Krüger</text:h>
        <text:list text:style-name="L12">
          <text:list-item>
            <text:p text:style-name="P34">♀ 60 Jahre, Wirtin des Silberhechts &amp; inoffizielle Dorfälteste</text:p>
          </text:list-item>
          <text:list-item>
            <text:p text:style-name="P34">Ehemalige Abenteurerin <text:span text:style-name="T19">und hoch angesehen im Dorf</text:span></text:p>
          </text:list-item>
          <text:list-item>
            <text:p text:style-name="P34">Freundlich, vernünftig, <text:span text:style-name="T19">gerecht und Klug</text:span></text:p>
          </text:list-item>
          <text:list-item>
            <text:p text:style-name="P35">Unterstützt Schwester Eolan und möchte den Mord schnell aufklären</text:p>
          </text:list-item>
        </text:list>
        <text:p text:style-name="Text_20_body"><text:span text:style-name="T15">Geheimnisse / Info</text:span><text:span text:style-name="T16">s</text:span></text:p>
        <text:list xml:id="list172453970426360" text:continue-list="list172454193162365" text:style-name="L1">
          <text:list-item>
            <text:p text:style-name="P36">Kennt die Geschichte der Familie Brendacher sehr gut</text:p>
          </text:list-item>
          <text:list-item>
            <text:p text:style-name="P37">Hat bemerkt das Bardo Sumerich jüngst oft besucht hat.</text:p>
          </text:list-item>
          <text:list-item>
            <text:p text:style-name="P36">Ist überzeugt, dass Sumerich seine Erbentscheidung wohlüberlegt getroffen hat</text:p>
          </text:list-item>
          <text:list-item>
            <text:p text:style-name="P36">Weiß, dass Alrik seinen Bruder während der Krankheit aufrichtig unterstützt hat</text:p>
          </text:list-item>
          <text:list-item>
            <text:p text:style-name="P36">Kann bestätigen, <text:span text:style-name="T19">dass Retor ein zuverlässiger und ehrlicher Postbote war.</text:span></text:p>
          </text:list-item>
        </text:list>
        <text:h text:style-name="Heading_20_3" text:outline-level="3">Magister Olorand</text:h>
        <text:list text:style-name="L13">
          <text:list-item>
            <text:p text:style-name="P38">♂ 80 Jahre, Ehemaliger Hofmagier des Barons</text:p>
          </text:list-item>
          <text:list-item>
            <text:p text:style-name="P38">Alt, verschroben, zurückgezogen <text:span text:style-name="T17">(hat nur selten Kontakt mit den Dörflern)</text:span></text:p>
          </text:list-item>
          <text:list-item>
            <text:p text:style-name="P38">Lebt im Turm östlich von Weidenau</text:p>
          </text:list-item>
        </text:list>
        <text:p text:style-name="P39"><text:span text:style-name="T15">Geheimnisse / Info</text:span><text:span text:style-name="T16">s</text:span></text:p>
        <text:list xml:id="list172454570308831" text:continue-list="list172453970426360" text:style-name="L1">
          <text:list-item>
            <text:p text:style-name="P36"><text:span text:style-name="T17">Hat </text:span>Sumerichs Testament verfasst <text:span text:style-name="T17">und es am Markttag an Retor übergeben.</text:span></text:p>
          </text:list-item>
          <text:list-item>
            <text:p text:style-name="P36">Besitzt eine Abschrift aller Dokumente</text:p>
          </text:list-item>
          <text:list-item>
            <text:p text:style-name="P36">Kann den Inhalt des Testaments auch ohne Original bezeugen.</text:p>
          </text:list-item>
        </text:list>
        <text:p text:style-name="List_20_1"/>
        <text:p text:style-name="List_20_1"/>
        <text:p text:style-name="List_20_1"/>
        <text:p text:style-name="List_20_1"/>
        <text:h text:style-name="Heading_20_3" text:outline-level="3">Bardo Eisenkamm</text:h>
        <text:list text:style-name="L14">
          <text:list-item>
            <text:p text:style-name="P40">♂ <text:span text:style-name="T20">6</text:span>5 Jahre, Veteran der Nadoreter Garde, <text:span text:style-name="T17">Schmied</text:span></text:p>
          </text:list-item>
          <text:list-item>
            <text:p text:style-name="P40">Wortkarg, besonnen, angesehen</text:p>
          </text:list-item>
          <text:list-item>
            <text:p text:style-name="P40">Verkrüppeltes Bein</text:p>
          </text:list-item>
          <text:list-item>
            <text:p text:style-name="P40">Alter Freund Sumerichs</text:p>
          </text:list-item>
        </text:list>
        <text:p text:style-name="P39"><text:span text:style-name="T15">Geheimnisse / Info</text:span><text:span text:style-name="T16">s</text:span></text:p>
        <text:list xml:id="list172455417668627" text:continue-list="list172454570308831" text:style-name="L1">
          <text:list-item>
            <text:p text:style-name="P41"><text:span text:style-name="T18">Weiß von Sumerichs Testament </text:span><text:span text:style-name="T21">und seinen Beweggründen</text:span></text:p>
          </text:list-item>
          <text:list-item>
            <text:p text:style-name="P41">Hielt Elenor für die falsche Erbin, da sie Weidenau kaum kennt</text:p>
          </text:list-item>
          <text:list-item>
            <text:p text:style-name="P41">Hat Alrik auf der Trauerfeier von Sumerichs Testament erzählt und macht sich deshalb Vorwürfe</text:p>
          </text:list-item>
          <text:list-item>
            <text:p text:style-name="P41"><text:span text:style-name="T17">Weiß</text:span> dass Magister Olorand das Testament aufgesetzt und verwahrt hat.</text:p>
          </text:list-item>
        </text:list>
        <text:h text:style-name="Heading_20_3" text:outline-level="3">Leni Tauber</text:h>
        <text:list text:style-name="L15">
          <text:list-item>
            <text:p text:style-name="P42">♀ 17 Jahre, <text:span text:style-name="T17">S</text:span>chankmagd im Silberhecht</text:p>
          </text:list-item>
          <text:list-item>
            <text:p text:style-name="P42">Freundlich, geschwätzig, naiv</text:p>
          </text:list-item>
          <text:list-item>
            <text:p text:style-name="P42">Kennt jedes Gerücht im Dorf</text:p>
          </text:list-item>
          <text:list-item>
            <text:p text:style-name="P43">Hat nach Efferdians Fund das halbe Dorf über Retors Tod informiert </text:p>
          </text:list-item>
        </text:list>
        <text:p text:style-name="Text_20_body"><text:span text:style-name="T15">Geheimnisse / Info</text:span><text:span text:style-name="T16">s</text:span></text:p>
        <text:list text:continue-list="list172455417668627" text:style-name="L1">
          <text:list-item>
            <text:p text:style-name="P41">Hat Alrik und Bardo beim Leichenschmaus sprechen sehen</text:p>
          </text:list-item>
          <text:list-item>
            <text:p text:style-name="P44">Hat gesehen das Alrik den Leichenschmaus sichtlich aufgebracht verlassen hat</text:p>
          </text:list-item>
          <text:list-item>
            <text:p text:style-name="P41">Weiß <text:span text:style-name="T22">das Alrik und Sumerich sich oft gestritten haben</text:span></text:p>
          </text:list-item>
          <text:list-item>
            <text:p text:style-name="P41">Weiß, dass Alrik zusätzliche Knechte eingestellt hat</text:p>
          </text:list-item>
        </text:list>
        <text:p text:style-name="P28"/>
        <text:p text:style-name="P28"/>
        <text:p text:style-name="P28"/>
        <text:p text:style-name="P28"/>
        <text:p text:style-name="P28"/>
        <text:p text:style-name="P28"/>
        <text:p text:style-name="P28"/>
        <text:p text:style-name="P28"/>
        <text:h text:style-name="Heading_20_3" text:outline-level="3"><text:soft-page-break/>Efferdian Tauber</text:h>
        <text:list text:style-name="L16">
          <text:list-item>
            <text:p text:style-name="P45">♂ 22 Jahre, Fischer</text:p>
          </text:list-item>
          <text:list-item>
            <text:p text:style-name="P45">Abergläubisch, redselig</text:p>
          </text:list-item>
          <text:list-item>
            <text:p text:style-name="P45"><text:span text:style-name="T17">L</text:span>enis Bruder</text:p>
          </text:list-item>
          <text:list-item>
            <text:p text:style-name="P45">Kümmert sich um den Efferd-Schrein</text:p>
          </text:list-item>
          <text:list-item>
            <text:p text:style-name="P45">Hat Letos Leiche am Morgen gefunden, als er seine Reusen eingeholt hat.</text:p>
          </text:list-item>
          <text:list-item>
            <text:p text:style-name="P46">Sichtlicht geschockt</text:p>
          </text:list-item>
        </text:list>
        <text:h text:style-name="Heading_20_3" text:outline-level="3">Jarik „der Riese“</text:h>
        <text:list text:style-name="L17">
          <text:list-item>
            <text:p text:style-name="P47">♂ <text:span text:style-name="T20">4</text:span>0 Jahre, <text:span text:style-name="T17">1,95 Schritt groß, e</text:span>hemaliger Fuhrmann, heute Banditenanführer</text:p>
          </text:list-item>
          <text:list-item>
            <text:p text:style-name="P47">Wortkarg, einschüchternd, besonnen</text:p>
          </text:list-item>
          <text:list-item>
            <text:p text:style-name="P47">Vermeidet unnötige Gewalt <text:span text:style-name="T17">und kennt di</text:span>e Handels- und Postrouten entlang des Großen Flusses.</text:p>
          </text:list-item>
        </text:list>
        <text:p text:style-name="P39"><text:span text:style-name="T15">Geheimnisse / Info</text:span><text:span text:style-name="T16">s</text:span></text:p>
        <text:list text:style-name="L18">
          <text:list-item>
            <text:p text:style-name="P48"><text:span text:style-name="T17">W</text:span>urde von Alrik angeheuert <text:span text:style-name="T17">um </text:span>die Erbunterlagen <text:span text:style-name="T17">vom Postboten zu stehlen.</text:span></text:p>
          </text:list-item>
          <text:list-item>
            <text:p text:style-name="P48">Alrik hat deutlich angeordnet dass niemand zu schaden kommen soll.</text:p>
          </text:list-item>
          <text:list-item>
            <text:p text:style-name="P48"><text:span text:style-name="T17">Jarik e</text:span>rwägt, sich den Behörden zu stellen und die Schuld allein auf sich zu nehmen.</text:p>
          </text:list-item>
        </text:list>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p text:style-name="List_20_1"/>
        <text:h text:style-name="Heading_20_3" text:outline-level="3">Die anderen Banditen</text:h>
        <text:list text:style-name="L19">
          <text:list-item>
            <text:p text:style-name="P49"><text:span text:style-name="T6">Wulf</text:span>: ♂ 35 Jahre / Ehemaliger Holzfäller / Kräftig, langsam, gutmütig / Folgt Jariks Anweisungen ohne zu hinterfragen.</text:p>
          </text:list-item>
          <text:list-item>
            <text:p text:style-name="P49"><text:span text:style-name="T6">Gerda</text:span>: ♀ 25 Jahre / Junge Banditin / Impulsiv, aggressiv, draufgängerisch / Erschießt Retor während des Überfalls mit einer Armbrust.</text:p>
          </text:list-item>
          <text:list-item>
            <text:p text:style-name="P49"><text:span text:style-name="T6">Nedo</text:span>: ♂ 30 Jahre / Ehemaliger Jäger und Spurenleser / Nervös, abergläubisch / Zuständig für Fährtenlesen und das Verbergen von Spuren.</text:p>
          </text:list-item>
        </text:list>
        <text:p text:style-name="P39"><text:span text:style-name="T15">Geheimnisse / Info</text:span><text:span text:style-name="T16">s</text:span></text:p>
        <text:list text:style-name="L20">
          <text:list-item>
            <text:p text:style-name="P50">Gerda erschoss Retor während des Überfalls aus Panik</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section>
      <text:h text:style-name="P52" text:outline-level="2"><text:soft-page-break/>Sonstiges</text:h>
      <text:list text:style-name="L21">
        <text:list-item>
          <text:p text:style-name="P53">Retor besucht Weidenau nur einmal pro Woche (Markttag).</text:p>
        </text:list-item>
        <text:list-item>
          <text:p text:style-name="P53">Zwischen Weidenau und Nadoret gibt es keine weiteren Poststationen <text:span text:style-name="T23">(der Postbote nächtigt in den Gasthäusern der Dörfer die er besucht).</text:span></text:p>
        </text:list-item>
        <text:list-item>
          <text:p text:style-name="P54">Die nächste Ortschaft zu Weidenau ist Flusswiesen → etwa einen Tagsmarsch nördlich.</text:p>
        </text:list-item>
        <text:list-item>
          <text:p text:style-name="P53">Die Banditen sind bislang nur wegen kleiner Überfälle bekannt, nicht wegen Mordes.</text:p>
        </text:list-item>
        <text:list-item>
          <text:p text:style-name="P53">Wegen Sumerichs Tod ist das Amt des Vogts derzeit unbesetzt.</text:p>
        </text:list-item>
        <text:list-item>
          <text:p text:style-name="P53">Offizielle Hilfe aus Nadoret würde mehrere Tage oder sogar Wochen benötigen.</text:p>
        </text:list-item>
        <text:list-item>
          <text:p text:style-name="P55">Baron Dajin von Nadoret schenkt den abgelegenen Dörfern seiner Baronie nur wenig Aufmerksamkeit. Eingaben und Gesuche werden daher oft erst nach längerer Zeit bearbeitet.</text:p>
        </text:list-item>
      </text:list>
      <text:p text:style-name="P56"/>
      <text:section text:style-name="Sect1" text:name="Section3">
        <text:h text:style-name="P57" text:outline-level="3">Zeitleiste <text:span text:style-name="T24">des Mords</text:span></text:h>
        <text:p text:style-name="P58">Der Monat Praios ist Juli und direkt nach den namenlosen Tagen.</text:p>
        <text:list text:style-name="L22">
          <text:list-item>
            <text:p text:style-name="P59"><text:span text:style-name="T6">16 </text:span><text:span text:style-name="T25">Praios</text:span>, Feuertag: Sumerich stirbt.</text:p>
          </text:list-item>
          <text:list-item>
            <text:p text:style-name="P59"><text:span text:style-name="T6">17 </text:span><text:span text:style-name="T25">Praios</text:span>, Wassertag: Leichenschmaus, Alrik erfährt vom Testament.</text:p>
          </text:list-item>
          <text:list-item>
            <text:p text:style-name="P59"><text:span text:style-name="T6">18 </text:span><text:span text:style-name="T25">Praios</text:span>, Windstag, Abend: Alrik nimmt Kontakt mit den Banditen auf und beauftragt den Diebstahl.</text:p>
          </text:list-item>
          <text:list-item>
            <text:p text:style-name="P59"><text:span text:style-name="T6">20. </text:span><text:span text:style-name="T25">Praios</text:span>, Markttag: Retor trifft ein, verteilt die Post und nimmt <text:span text:style-name="T26">ausgehende </text:span>Sendungen entgegen. <text:span text:style-name="T26">Den Abend und die Nacht verbringt er (wie immer) im Silberhecht.</text:span></text:p>
          </text:list-item>
          <text:list-item>
            <text:p text:style-name="P59"><text:span text:style-name="T27">21 </text:span><text:span text:style-name="T25">Praios</text:span><text:span text:style-name="T28">, Praiostag, Morgen: Retor verlässt Weidenau Richtung Nadoret, wird überfallen und ermordet.</text:span></text:p>
          </text:list-item>
          <text:list-item>
            <text:p text:style-name="P59"><text:span text:style-name="T6">22. </text:span><text:span text:style-name="T25">Praios</text:span>, Rohalstag, Morgen: Efferdian <text:span text:style-name="T26">Retors Leiche beim einholen der Reusen.</text:span></text:p>
          </text:list-item>
          <text:list-item>
            <text:p text:style-name="P59"><text:span text:style-name="T6">22 </text:span><text:span text:style-name="T25">Praios</text:span>, Rohalstag, Mittags: Schwester Eolan und Gerba beauftragen die Helden den Fall zu lösen.</text:p>
          </text:list-item>
        </text:list>
        <text:h text:style-name="Heading_20_3" text:outline-level="3">Was ist ein Dorfvogt?</text:h>
        <text:list text:style-name="L23">
          <text:list-item>
            <text:p text:style-name="P60">Vertreter des Barons vor Ort <text:span text:style-name="T8">(bei kleinen Orten wie Weidenau ist dass </text:span>kein Vollzeitamt<text:span text:style-name="T8">)</text:span></text:p>
          </text:list-item>
          <text:list-item>
            <text:p text:style-name="P60">Zieht Steuern und Abgaben für den Baron ein</text:p>
          </text:list-item>
          <text:list-item>
            <text:p text:style-name="P60">Organisiert Frondienste und gemeinschaftliche Arbeiten (z. B. Brücken, Wege)</text:p>
          </text:list-item>
          <text:list-item>
            <text:p text:style-name="P60">Schlichtet kleinere Streitigkeiten und spricht <text:span text:style-name="T29">bei einfachen</text:span> <text:span text:style-name="T29">fragen</text:span> Recht</text:p>
          </text:list-item>
          <text:list-item>
            <text:p text:style-name="P60">Vertritt die Interessen des Dorfes gegenüber der Baronie</text:p>
          </text:list-item>
          <text:list-item>
            <text:p text:style-name="P60">Kümmert sich um die Umsetzung der Anordnungen des Barons</text:p>
          </text:list-item>
          <text:list-item>
            <text:p text:style-name="P60">Beruft Dorfversammlungen ein und übernimmt organisatorische Aufgaben</text:p>
          </text:list-item>
        </text:list>
        <text:p text:style-name="List_20_1"/>
        <text:p text:style-name="List_20_1"/>
        <text:p text:style-name="List_20_1"/>
        <text:p text:style-name="List_20_1"/>
        <text:p text:style-name="List_20_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35.46pt"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style:text-properties fo:language="de" fo:country="DE"/>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tab-stops/>
      </style:paragraph-properties>
      <style:text-properties fo:language="de" fo:country="D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master-page-name="">
      <loext:graphic-properties draw:fill="solid" draw:fill-color="#000000"/>
      <style:paragraph-properties fo:margin-top="0pt" fo:margin-bottom="10.01pt" style:contextual-spacing="false" style:page-number="auto" fo:background-color="#000000" fo:padding="4.99pt" fo:border="non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loext:graphic-properties draw:fill="solid" draw:fill-color="#10141f"/>
      <style:paragraph-properties fo:margin-top="0pt" fo:margin-bottom="4.99pt" style:contextual-spacing="false" fo:background-color="#10141f" fo:padding-left="4.99pt" fo:padding-right="2.01pt" fo:padding-top="2.01pt" fo:padding-bottom="2.01pt" fo:border="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7pt" fo:margin-bottom="6.01pt" style:contextual-spacing="false" fo:padding="0.4pt" fo:border-left="none" fo:border-right="none" fo:border-top="none" fo:border-bottom="0.06pt solid #000000"/>
      <style:text-properties fo:font-size="14pt" fo:font-weight="bold" style:font-size-asian="14pt" style:font-weight-asian="bold" style:font-size-complex="14pt" style:font-weight-complex="bold"/>
    </style:style>
    <style:style style:name="Liste" style:family="paragraph" style:parent-style-name="Text_20_body"/>
    <style:style style:name="List_20_1" style:display-name="List 1" style:family="paragraph" style:parent-style-name="List" style:class="list" style:master-page-name="">
      <style:paragraph-properties fo:margin-left="18pt" fo:margin-top="0pt" fo:margin-bottom="7pt" style:contextual-spacing="true" fo:text-indent="-18pt" style:auto-text-indent="false" style:page-number="auto"/>
    </style:style>
    <style:style style:name="Horizontal_20_Line" style:display-name="Horizontal Line" style:family="paragraph" style:parent-style-name="Standard" style:next-style-name="Text_20_body" style:class="html">
      <style:paragraph-properties fo:margin-top="0pt" fo:margin-bottom="14.14pt" style:contextual-spacing="false" style:border-line-width-bottom="0.06pt 0.11pt 0.06pt" fo:padding="0pt"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3T08:37:40.489216906</meta:creation-date>
    <meta:generator>LibreOffice/26.2.4.2$Linux_X86_64 LibreOffice_project/0229ac93fcf0d7cbc6376066c6f35021cef002dc</meta:generator>
    <dc:date>2026-06-25T17:24:53.605918868</dc:date>
    <meta:editing-duration>PT2H33M58S</meta:editing-duration>
    <meta:editing-cycles>29</meta:editing-cycles>
    <meta:print-date>2026-06-25T17:09:14.956240376</meta:print-date>
    <meta:printed-by>PDF files</meta:printed-by>
    <meta:document-statistic meta:table-count="0" meta:image-count="0" meta:object-count="0" meta:page-count="8" meta:paragraph-count="186" meta:word-count="2253" meta:character-count="14957" meta:non-whitespace-character-count="13000"/>
  </office:meta>
</office:document-meta>
</file>